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22pt" officeooo:rsid="00180e70" officeooo:paragraph-rsid="00180e70" style:font-size-asian="22pt" style:font-size-complex="22pt"/>
    </style:style>
    <style:style style:name="P4" style:family="paragraph" style:parent-style-name="Standard">
      <style:text-properties fo:font-size="22pt" officeooo:rsid="0019f04b" officeooo:paragraph-rsid="0019f04b" style:font-size-asian="22pt" style:font-size-complex="22pt"/>
    </style:style>
    <style:style style:name="T1" style:family="text">
      <style:text-properties officeooo:rsid="0019f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mod <text:s text:c="2"/>+x <text:s text:c="2"/>qnx-setup-2.0.4-202501021438-linux.run </text:p>
      <text:p text:style-name="P1">./qnx-setup-2.0.4-202501021438-linux.run</text:p>
      <text:p text:style-name="P1"/>
      <text:p text:style-name="P2"><text:a xlink:type="simple" xlink:href="smb://172.16.151.13/" text:style-name="Internet_20_link" text:visited-style-name="Visited_20_Internet_20_Link">smb://172.16.151.13/</text:a> <text:span text:style-name="T1">(to be connected in KIT network)</text:span></text:p>
      <text:p text:style-name="P3">username: SW</text:p>
      <text:p text:style-name="P3">password: sw12!@</text:p>
      <text:p text:style-name="P3"/>
      <text:p text:style-name="P4">for windows (to be connected in KIT network)</text:p>
      <text:p text:style-name="P4">press windows R</text:p>
      <text:p text:style-name="P4">\\<text:a xlink:type="simple" xlink:href="smb://172.16.151.13/" text:style-name="Internet_20_link" text:visited-style-name="Visited_20_Internet_20_Link">172.16.151.13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2:38:09.053916736</meta:creation-date>
    <dc:date>2026-02-12T15:15:30.475969223</dc:date>
    <meta:editing-duration>PT26M28S</meta:editing-duration>
    <meta:editing-cycles>1</meta:editing-cycles>
    <meta:document-statistic meta:table-count="0" meta:image-count="0" meta:object-count="0" meta:page-count="1" meta:paragraph-count="8" meta:word-count="27" meta:character-count="247" meta:non-whitespace-character-count="223"/>
    <meta:generator>LibreOffice/7.3.7.2$Linux_X86_64 LibreOffice_project/30$Build-2</meta:generator>
  </office:meta>
</office:document-meta>
</file>