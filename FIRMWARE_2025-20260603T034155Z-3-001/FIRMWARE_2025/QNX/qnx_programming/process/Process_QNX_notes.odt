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438cm" table:align="left"/>
    </style:style>
    <style:style style:name="Table1.A" style:family="table-column">
      <style:table-column-properties style:column-width="4.212cm"/>
    </style:style>
    <style:style style:name="Table1.B" style:family="table-column">
      <style:table-column-properties style:column-width="1.381cm"/>
    </style:style>
    <style:style style:name="Table1.C" style:family="table-column">
      <style:table-column-properties style:column-width="2.84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cess Creation in QNX (Neutrino RTOS)</text:h>
      <text:p text:style-name="Text_20_body">In <text:span text:style-name="Strong_20_Emphasis">QNX Neutrino RTOS</text:span>, process creation follows <text:span text:style-name="Strong_20_Emphasis">POSIX standards</text:span>, but QNX strongly recommends <text:span text:style-name="Source_20_Text">posix_spawn()</text:span> instead of <text:span text:style-name="Source_20_Text">fork()</text:span> for real-time efficiency.</text:p>
      <text:p text:style-name="Horizontal_20_Line"/>
      <text:h text:style-name="Heading_20_1" text:outline-level="1">1️⃣ Method 1: Using <text:span text:style-name="Source_20_Text">fork()</text:span> (Traditional POSIX Way)</text:h>
      <text:h text:style-name="Heading_20_3" text:outline-level="3">🔹 How it works</text:h>
      <text:list xml:id="list1169964427" text:style-name="L1">
        <text:list-item>
          <text:p text:style-name="P3"><text:span text:style-name="Source_20_Text">fork()</text:span> creates a child process by duplicating the parent.</text:p>
        </text:list-item>
        <text:list-item>
          <text:p text:style-name="P3">Both processes continue execution from the next instruction.</text:p>
        </text:list-item>
        <text:list-item>
          <text:p text:style-name="P3"><text:span text:style-name="Source_20_Text">fork()</text:span> returns:</text:p>
          <text:list>
            <text:list-item>
              <text:p text:style-name="P3"><text:span text:style-name="Source_20_Text">0</text:span> → Child process</text:p>
            </text:list-item>
            <text:list-item>
              <text:p text:style-name="P3"><text:span text:style-name="Source_20_Text">&gt;0</text:span> → Parent (child PID)</text:p>
            </text:list-item>
            <text:list-item>
              <text:p text:style-name="P3"><text:span text:style-name="Source_20_Text">-1</text:span> → Error</text:p>
            </text:list-item>
          </text:list>
        </text:list-item>
      </text:list>
      <text:p text:style-name="Horizontal_20_Line"/>
      <text:h text:style-name="Heading_20_3" text:outline-level="3">✅ Example: Basic fork in QNX</text:h>
      <text:p text:style-name="P1"><text:span text:style-name="Source_20_Text">/*</text:span></text:p>
      <text:p text:style-name="P1"><text:span text:style-name="Source_20_Text"><text:s text:c="3"/>fork_example.c</text:span></text:p>
      <text:p text:style-name="P1"><text:span text:style-name="Source_20_Text"><text:s text:c="3"/>QNX Process Creation using fork()</text:span></text:p>
      <text:p text:style-name="P1"><text:span text:style-name="Source_20_Text">*/</text:span></text:p>
      <text:p text:style-name="P1"/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unistd.h&gt;</text:span></text:p>
      <text:p text:style-name="P1"><text:span text:style-name="Source_20_Text">#include &lt;sys/wait.h&gt;</text:span></text:p>
      <text:p text:style-name="P1"/>
      <text:p text:style-name="P1"><text:span text:style-name="Source_20_Text">int main() {</text:span></text:p>
      <text:p text:style-name="P1"><text:span text:style-name="Source_20_Text"><text:s text:c="4"/>pid_t pid;</text:span></text:p>
      <text:p text:style-name="P1"/>
      <text:p text:style-name="P1"><text:span text:style-name="Source_20_Text"><text:s text:c="4"/>pid = fork();</text:span></text:p>
      <text:p text:style-name="P1"/>
      <text:p text:style-name="P1"><text:span text:style-name="Source_20_Text"><text:s text:c="4"/>if (pid &lt; 0) {</text:span></text:p>
      <text:p text:style-name="P1"><text:span text:style-name="Source_20_Text"><text:s text:c="8"/>perror("Fork failed");</text:span></text:p>
      <text:p text:style-name="P1"><text:span text:style-name="Source_20_Text"><text:s text:c="8"/>exit(EXIT_FAILURE);</text:span></text:p>
      <text:p text:style-name="P1"><text:span text:style-name="Source_20_Text"><text:s text:c="4"/>}</text:span></text:p>
      <text:p text:style-name="P1"><text:span text:style-name="Source_20_Text"><text:s text:c="4"/>else if (pid == 0) {</text:span></text:p>
      <text:p text:style-name="P1"><text:span text:style-name="Source_20_Text"><text:s text:c="8"/>// Child process</text:span></text:p>
      <text:p text:style-name="P1"><text:span text:style-name="Source_20_Text"><text:s text:c="8"/>printf("Child Process: PID = %d, Parent PID = %d\n", getpid(), getppid());</text:span></text:p>
      <text:p text:style-name="P1"><text:span text:style-name="Source_20_Text"><text:s text:c="8"/>exit(5);</text:span></text:p>
      <text:p text:style-name="P1"><text:span text:style-name="Source_20_Text"><text:s text:c="4"/>}</text:span></text:p>
      <text:p text:style-name="P1"><text:span text:style-name="Source_20_Text"><text:s text:c="4"/>else {</text:span></text:p>
      <text:p text:style-name="P1"><text:span text:style-name="Source_20_Text"><text:s text:c="8"/>// Parent process</text:span></text:p>
      <text:p text:style-name="P1"><text:span text:style-name="Source_20_Text"><text:s text:c="8"/>int status;</text:span></text:p>
      <text:p text:style-name="P1"><text:span text:style-name="Source_20_Text"><text:s text:c="8"/>wait(&amp;status);</text:span></text:p>
      <text:p text:style-name="P1"><text:soft-page-break/><text:span text:style-name="Source_20_Text"><text:s text:c="8"/>printf("Parent Process: Child exited with status %d\n", WEXITSTATUS(status)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return 0;</text:span></text:p>
      <text:p text:style-name="P2"><text:span text:style-name="Source_20_Text">}</text:span></text:p>
      <text:h text:style-name="Heading_20_3" text:outline-level="3">🔹 Compile in QNX</text:h>
      <text:p text:style-name="P2"><text:span text:style-name="Source_20_Text">qcc fork_example.c -o fork_example</text:span></text:p>
      <text:p text:style-name="Horizontal_20_Line"/>
      <text:h text:style-name="Heading_20_3" text:outline-level="3">⚠ Why <text:span text:style-name="Source_20_Text">fork()</text:span> is not preferred in QNX?</text:h>
      <text:list xml:id="list1366385603" text:style-name="L2">
        <text:list-item>
          <text:p text:style-name="P4">Copies entire process memory.</text:p>
        </text:list-item>
        <text:list-item>
          <text:p text:style-name="P4">Not deterministic for real-time systems.</text:p>
        </text:list-item>
        <text:list-item>
          <text:p text:style-name="P4">Higher latency.</text:p>
        </text:list-item>
      </text:list>
      <text:p text:style-name="Text_20_body">QNX is microkernel-based → prefers <text:span text:style-name="Source_20_Text">spawn()</text:span>.</text:p>
      <text:p text:style-name="Horizontal_20_Line"/>
      <text:h text:style-name="Heading_20_1" text:outline-level="1">2️⃣ Method 2: Using <text:span text:style-name="Source_20_Text">posix_spawn()</text:span> (Recommended in QNX)</text:h>
      <text:p text:style-name="Text_20_body"><text:span text:style-name="Source_20_Text">posix_spawn()</text:span> combines:</text:p>
      <text:list xml:id="list3531014299" text:style-name="L3">
        <text:list-item>
          <text:p text:style-name="P5"><text:span text:style-name="Source_20_Text">fork()</text:span></text:p>
        </text:list-item>
        <text:list-item>
          <text:p text:style-name="P5"><text:span text:style-name="Source_20_Text">exec()</text:span></text:p>
        </text:list-item>
      </text:list>
      <text:p text:style-name="Text_20_body">into a <text:span text:style-name="Strong_20_Emphasis">single efficient system call</text:span>.</text:p>
      <text:p text:style-name="Horizontal_20_Line"/>
      <text:h text:style-name="Heading_20_3" text:outline-level="3">🔹 Advantages in QNX</text:h>
      <text:list xml:id="list2480753583" text:style-name="L4">
        <text:list-item>
          <text:p text:style-name="P6">Faster than fork</text:p>
        </text:list-item>
        <text:list-item>
          <text:p text:style-name="P6">Deterministic</text:p>
        </text:list-item>
        <text:list-item>
          <text:p text:style-name="P6">Better for real-time applications</text:p>
        </text:list-item>
        <text:list-item>
          <text:p text:style-name="P6">No full address space duplication</text:p>
        </text:list-item>
      </text:list>
      <text:p text:style-name="Horizontal_20_Line"/>
      <text:h text:style-name="Heading_20_3" text:outline-level="3">✅ Example: posix_spawn()</text:h>
      <text:p text:style-name="P1"><text:span text:style-name="Source_20_Text">/*</text:span></text:p>
      <text:p text:style-name="P1"><text:span text:style-name="Source_20_Text"><text:s text:c="3"/>spawn_example.c</text:span></text:p>
      <text:p text:style-name="P1"><text:span text:style-name="Source_20_Text"><text:s text:c="3"/>QNX Process Creation using posix_spawn()</text:span></text:p>
      <text:p text:style-name="P1"><text:span text:style-name="Source_20_Text">*/</text:span></text:p>
      <text:p text:style-name="P1"/>
      <text:p text:style-name="P1"><text:soft-page-break/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spawn.h&gt;</text:span></text:p>
      <text:p text:style-name="P1"><text:span text:style-name="Source_20_Text">#include &lt;sys/wait.h&gt;</text:span></text:p>
      <text:p text:style-name="P1"><text:span text:style-name="Source_20_Text">#include &lt;unistd.h&gt;</text:span></text:p>
      <text:p text:style-name="P1"/>
      <text:p text:style-name="P1"><text:span text:style-name="Source_20_Text">extern char **environ;</text:span></text:p>
      <text:p text:style-name="P1"/>
      <text:p text:style-name="P1"><text:span text:style-name="Source_20_Text">int main() {</text:span></text:p>
      <text:p text:style-name="P1"><text:span text:style-name="Source_20_Text"><text:s text:c="4"/>pid_t pid;</text:span></text:p>
      <text:p text:style-name="P1"><text:span text:style-name="Source_20_Text"><text:s text:c="4"/>int status;</text:span></text:p>
      <text:p text:style-name="P1"/>
      <text:p text:style-name="P1"><text:span text:style-name="Source_20_Text"><text:s text:c="4"/>char *argv[] = {"/bin/ls", "-l", NULL};</text:span></text:p>
      <text:p text:style-name="P1"/>
      <text:p text:style-name="P1"><text:span text:style-name="Source_20_Text"><text:s text:c="4"/>int ret = posix_spawn(&amp;pid, "/bin/ls", NULL, NULL, argv, environ);</text:span></text:p>
      <text:p text:style-name="P1"/>
      <text:p text:style-name="P1"><text:span text:style-name="Source_20_Text"><text:s text:c="4"/>if (ret != 0) {</text:span></text:p>
      <text:p text:style-name="P1"><text:span text:style-name="Source_20_Text"><text:s text:c="8"/>perror("posix_spawn failed");</text:span></text:p>
      <text:p text:style-name="P1"><text:span text:style-name="Source_20_Text"><text:s text:c="8"/>exit(EXIT_FAILURE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rintf("Spawned process with PID: %d\n", pid);</text:span></text:p>
      <text:p text:style-name="P1"/>
      <text:p text:style-name="P1"><text:span text:style-name="Source_20_Text"><text:s text:c="4"/>waitpid(pid, &amp;status, 0);</text:span></text:p>
      <text:p text:style-name="P1"/>
      <text:p text:style-name="P1"><text:span text:style-name="Source_20_Text"><text:s text:c="4"/>if (WIFEXITED(status)) {</text:span></text:p>
      <text:p text:style-name="P1"><text:span text:style-name="Source_20_Text"><text:s text:c="8"/>printf("Child exited with status %d\n", WEXITSTATUS(status)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3" text:outline-level="3">🔹 Compile</text:h>
      <text:p text:style-name="P2"><text:span text:style-name="Source_20_Text">qcc spawn_example.c -o spawn_example</text:span></text:p>
      <text:p text:style-name="Horizontal_20_Line"/>
      <text:h text:style-name="Heading_20_1" text:outline-level="1">3️⃣ QNX-Specific Advanced Spawn (Real-Time Example)</text:h>
      <text:p text:style-name="Text_20_body">QNX allows priority setting during spawn using <text:span text:style-name="Source_20_Text">posix_spawnattr_t</text:span>.</text:p>
      <text:h text:style-name="Heading_20_3" text:outline-level="3">✅ Example: Spawn with Priority</text:h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spawn.h&gt;</text:span></text:p>
      <text:p text:style-name="P1"><text:span text:style-name="Source_20_Text">#include &lt;sys/wait.h&gt;</text:span></text:p>
      <text:p text:style-name="P1"><text:span text:style-name="Source_20_Text">#include &lt;unistd.h&gt;</text:span></text:p>
      <text:p text:style-name="P1"><text:span text:style-name="Source_20_Text">#include &lt;sched.h&gt;</text:span></text:p>
      <text:p text:style-name="P1"/>
      <text:p text:style-name="P1"><text:span text:style-name="Source_20_Text">extern char **environ;</text:span></text:p>
      <text:p text:style-name="P1"/>
      <text:p text:style-name="P1"><text:span text:style-name="Source_20_Text">int main() {</text:span></text:p>
      <text:p text:style-name="P1"><text:span text:style-name="Source_20_Text"><text:s text:c="4"/>pid_t pid;</text:span></text:p>
      <text:p text:style-name="P1"><text:span text:style-name="Source_20_Text"><text:s text:c="4"/>posix_spawnattr_t attr;</text:span></text:p>
      <text:p text:style-name="P1"><text:soft-page-break/><text:span text:style-name="Source_20_Text"><text:s text:c="4"/>struct sched_param param;</text:span></text:p>
      <text:p text:style-name="P1"/>
      <text:p text:style-name="P1"><text:span text:style-name="Source_20_Text"><text:s text:c="4"/>posix_spawnattr_init(&amp;attr);</text:span></text:p>
      <text:p text:style-name="P1"/>
      <text:p text:style-name="P1"><text:span text:style-name="Source_20_Text"><text:s text:c="4"/>param.sched_priority = 20;</text:span></text:p>
      <text:p text:style-name="P1"/>
      <text:p text:style-name="P1"><text:span text:style-name="Source_20_Text"><text:s text:c="4"/>posix_spawnattr_setschedpolicy(&amp;attr, SCHED_RR);</text:span></text:p>
      <text:p text:style-name="P1"><text:span text:style-name="Source_20_Text"><text:s text:c="4"/>posix_spawnattr_setschedparam(&amp;attr, &amp;param);</text:span></text:p>
      <text:p text:style-name="P1"><text:span text:style-name="Source_20_Text"><text:s text:c="4"/>posix_spawnattr_setflags(&amp;attr,</text:span></text:p>
      <text:p text:style-name="P1"><text:span text:style-name="Source_20_Text"><text:s text:c="8"/>POSIX_SPAWN_SETSCHEDPARAM | POSIX_SPAWN_SETSCHEDULER);</text:span></text:p>
      <text:p text:style-name="P1"/>
      <text:p text:style-name="P1"><text:span text:style-name="Source_20_Text"><text:s text:c="4"/>char *argv[] = {"/bin/ls", NULL};</text:span></text:p>
      <text:p text:style-name="P1"/>
      <text:p text:style-name="P1"><text:span text:style-name="Source_20_Text"><text:s text:c="4"/>posix_spawn(&amp;pid, "/bin/ls", NULL, &amp;attr, argv, environ);</text:span></text:p>
      <text:p text:style-name="P1"/>
      <text:p text:style-name="P1"><text:span text:style-name="Source_20_Text"><text:s text:c="4"/>wait(NULL);</text:span></text:p>
      <text:p text:style-name="P1"/>
      <text:p text:style-name="P1"><text:span text:style-name="Source_20_Text"><text:s text:c="4"/>posix_spawnattr_destroy(&amp;attr);</text:span></text:p>
      <text:p text:style-name="P1"/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1" text:outline-level="1">🔎 fork() vs posix_spawn() in QNX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fork()</text:p>
            </table:table-cell>
            <table:table-cell table:style-name="Table1.A1" office:value-type="string">
              <text:p text:style-name="Table_20_Heading">posix_spawn()</text:p>
            </table:table-cell>
          </table:table-row>
        </table:table-header-rows>
        <table:table-row>
          <table:table-cell table:style-name="Table1.A1" office:value-type="string">
            <text:p text:style-name="Table_20_Contents">Memory copy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No full copy</text:p>
          </table:table-cell>
        </table:table-row>
        <table:table-row>
          <table:table-cell table:style-name="Table1.A1" office:value-type="string">
            <text:p text:style-name="Table_20_Contents">Real-time friendly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Deterministic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Recommended in QNX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Speed</text:p>
          </table:table-cell>
          <table:table-cell table:style-name="Table1.A1" office:value-type="string">
            <text:p text:style-name="Table_20_Contents">Slower</text:p>
          </table:table-cell>
          <table:table-cell table:style-name="Table1.A1" office:value-type="string">
            <text:p text:style-name="Table_20_Contents">Faster</text:p>
          </table:table-cell>
        </table:table-row>
      </table:table>
      <text:p text:style-name="Horizontal_20_Line"/>
      <text:h text:style-name="Heading_20_1" text:outline-level="1">4️⃣ When to Use What?</text:h>
      <text:h text:style-name="Heading_20_3" text:outline-level="3">Use <text:span text:style-name="Source_20_Text">fork()</text:span> if:</text:h>
      <text:list xml:id="list1289120075" text:style-name="L5">
        <text:list-item>
          <text:p text:style-name="P7">You need parent memory copy</text:p>
        </text:list-item>
        <text:list-item>
          <text:p text:style-name="P7">Writing generic POSIX code</text:p>
        </text:list-item>
        <text:list-item>
          <text:p text:style-name="P7">Doing process trees experiments</text:p>
        </text:list-item>
      </text:list>
      <text:h text:style-name="Heading_20_3" text:outline-level="3">Use <text:span text:style-name="Source_20_Text">posix_spawn()</text:span> if:</text:h>
      <text:list xml:id="list1255326156" text:style-name="L6">
        <text:list-item>
          <text:p text:style-name="P8">Real-time application</text:p>
        </text:list-item>
        <text:list-item>
          <text:p text:style-name="P8">Priority control needed</text:p>
        </text:list-item>
        <text:list-item>
          <text:p text:style-name="P8">Production QNX system</text:p>
        </text:list-item>
        <text:list-item>
          <text:p text:style-name="P8">Server-client architecture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09:48:20.193862800</meta:creation-date>
    <dc:date>2026-02-19T12:52:59.029658498</dc:date>
    <meta:editing-duration>PT1H3M46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4" meta:paragraph-count="140" meta:word-count="459" meta:character-count="3377" meta:non-whitespace-character-count="2832"/>
  </office:meta>
</office:document-meta>
</file>