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AF000000810E794153EE4DFB2E.png" manifest:media-type="image/png"/>
  <manifest:file-entry manifest:full-path="Pictures/100000010000024F00000103B3CF058E745E1FE6.png" manifest:media-type="image/png"/>
  <manifest:file-entry manifest:full-path="Pictures/100000010000000E0000000E8697AB9408BC6EAB.png" manifest:media-type="image/png"/>
  <manifest:file-entry manifest:full-path="Pictures/10000001000001FF0000008BD5A27385D24C51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</office:font-face-decls>
  <office:automatic-styles>
    <style:style style:name="Table1" style:family="table">
      <style:table-properties style:width="16.688cm" table:align="left"/>
    </style:style>
    <style:style style:name="Table1.A" style:family="table-column">
      <style:table-column-properties style:column-width="16.688cm"/>
    </style:style>
    <style:style style:name="Table1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2" style:family="table">
      <style:table-properties style:width="6.657cm" table:align="left"/>
    </style:style>
    <style:style style:name="Table2.A" style:family="table-column">
      <style:table-column-properties style:column-width="2.069cm"/>
    </style:style>
    <style:style style:name="Table2.B" style:family="table-column">
      <style:table-column-properties style:column-width="2.418cm"/>
    </style:style>
    <style:style style:name="Table2.C" style:family="table-column">
      <style:table-column-properties style:column-width="2.17cm"/>
    </style:style>
    <style:style style:name="Table2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3" style:family="table">
      <style:table-properties style:width="9.996cm" table:align="left"/>
    </style:style>
    <style:style style:name="Table3.A" style:family="table-column">
      <style:table-column-properties style:column-width="2.069cm"/>
    </style:style>
    <style:style style:name="Table3.B" style:family="table-column">
      <style:table-column-properties style:column-width="1.831cm"/>
    </style:style>
    <style:style style:name="Table3.C" style:family="table-column">
      <style:table-column-properties style:column-width="3.5cm"/>
    </style:style>
    <style:style style:name="Table3.D" style:family="table-column">
      <style:table-column-properties style:column-width="2.596cm"/>
    </style:style>
    <style:style style:name="Table3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4" style:family="table">
      <style:table-properties style:width="6.657cm" table:align="left"/>
    </style:style>
    <style:style style:name="Table4.A" style:family="table-column">
      <style:table-column-properties style:column-width="2.069cm"/>
    </style:style>
    <style:style style:name="Table4.B" style:family="table-column">
      <style:table-column-properties style:column-width="2.418cm"/>
    </style:style>
    <style:style style:name="Table4.C" style:family="table-column">
      <style:table-column-properties style:column-width="2.17cm"/>
    </style:style>
    <style:style style:name="Table4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5" style:family="table">
      <style:table-properties style:width="9.996cm" table:align="left"/>
    </style:style>
    <style:style style:name="Table5.A" style:family="table-column">
      <style:table-column-properties style:column-width="2.069cm"/>
    </style:style>
    <style:style style:name="Table5.B" style:family="table-column">
      <style:table-column-properties style:column-width="1.831cm"/>
    </style:style>
    <style:style style:name="Table5.C" style:family="table-column">
      <style:table-column-properties style:column-width="3.5cm"/>
    </style:style>
    <style:style style:name="Table5.D" style:family="table-column">
      <style:table-column-properties style:column-width="2.596cm"/>
    </style:style>
    <style:style style:name="Table5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6" style:family="table">
      <style:table-properties style:width="6.657cm" table:align="left"/>
    </style:style>
    <style:style style:name="Table6.A" style:family="table-column">
      <style:table-column-properties style:column-width="2.069cm"/>
    </style:style>
    <style:style style:name="Table6.B" style:family="table-column">
      <style:table-column-properties style:column-width="2.418cm"/>
    </style:style>
    <style:style style:name="Table6.C" style:family="table-column">
      <style:table-column-properties style:column-width="2.17cm"/>
    </style:style>
    <style:style style:name="Table6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.106cm" fo:margin-bottom="0.318cm" style:contextual-spacing="false" fo:text-indent="0cm" style:auto-text-indent="false" fo:padding="0cm" fo:border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margin-top="0.265cm" fo:margin-bottom="0.265cm" style:contextual-spacing="false" fo:text-align="center" style:justify-single-word="false" fo:orphans="2" fo:widows="2"/>
    </style:style>
    <style:style style:name="P7" style:family="paragraph" style:parent-style-name="Text_20_body">
      <style:paragraph-properties fo:margin-top="0.397cm" fo:margin-bottom="0.397cm" style:contextual-spacing="false" fo:text-align="center" style:justify-single-word="false" fo:orphans="2" fo:widows="2"/>
    </style:style>
    <style:style style:name="P8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fo:letter-spacing="normal"/>
    </style:style>
    <style:style style:name="P9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0" style:family="paragraph" style:parent-style-name="Text_20_body">
      <style:paragraph-properties fo:margin-left="0.053cm" fo:margin-right="0.053cm" fo:margin-top="0.053cm" fo:margin-bottom="0.053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P11" style:family="paragraph" style:parent-style-name="Text_20_body">
      <style:paragraph-properties fo:margin-left="0cm" fo:margin-right="0cm" fo:margin-top="0.265cm" fo:margin-bottom="0.265cm" style:contextual-spacing="false" style:line-height-at-least="0.397cm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9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</style:style>
    <style:style style:name="P13" style:family="paragraph" style:parent-style-name="Table_20_Contents" style:list-style-name="L1">
      <style:paragraph-properties fo:margin-left="0.397cm" fo:margin-right="0cm" fo:margin-top="0.106cm" fo:margin-bottom="0.106cm" style:contextual-spacing="false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5" style:family="paragraph" style:parent-style-name="Text_20_body" style:list-style-name="L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6" style:family="paragraph" style:parent-style-name="Text_20_body" style:list-style-name="L4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7" style:family="paragraph" style:parent-style-name="Text_20_body" style:list-style-name="L5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8" style:family="paragraph" style:parent-style-name="Text_20_body" style:list-style-name="L6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9" style:family="paragraph" style:parent-style-name="Text_20_body" style:list-style-name="L7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0" style:family="paragraph" style:parent-style-name="Text_20_body" style:list-style-name="L8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1" style:family="paragraph" style:parent-style-name="Text_20_body" style:list-style-name="L9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2" style:family="paragraph" style:parent-style-name="Text_20_body">
      <style:paragraph-properties fo:margin-top="0.265cm" fo:margin-bottom="0.265cm" style:contextual-spacing="false" fo:text-align="center" style:justify-single-word="false" fo:orphans="2" fo:widows="2"/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.265cm" fo:margin-bottom="0.265cm" style:contextual-spacing="false" style:line-height-at-least="0.397cm" fo:text-align="center" style:justify-single-word="false" fo:orphans="2" fo:widows="2" fo:text-indent="0cm" style:auto-text-indent="false"/>
      <style:text-properties fo:font-variant="normal" fo:text-transform="none" fo:color="#303030" loext:opacity="100%" fo:letter-spacing="normal"/>
    </style:style>
    <style:style style:name="P24" style:family="paragraph" style:parent-style-name="Text_20_body" style:list-style-name="L4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</style:style>
    <style:style style:name="T1" style:family="text">
      <style:text-properties style:font-name="Roboto Condensed" style:text-underline-style="solid" style:text-underline-width="auto" style:text-underline-color="font-color"/>
    </style:style>
    <style:style style:name="T2" style:family="text">
      <style:text-properties fo:font-variant="normal" fo:text-transform="none" fo:color="#303030" loext:opacity="100%" style:font-name="Roboto Condensed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T4" style:family="text">
      <style:text-properties fo:font-variant="normal" fo:text-transform="none" fo:color="#303030" loext:opacity="100%" style:font-name="Arimo" fo:font-size="12pt" fo:letter-spacing="normal" fo:font-style="normal" fo:font-weight="normal"/>
    </style:style>
    <style:style style:name="T5" style:family="text">
      <style:text-properties fo:font-variant="normal" fo:text-transform="none" fo:color="#910000" loext:opacity="100%" style:font-name="Arimo" fo:font-size="11.2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color="#910000" loext:opacity="100%" style:text-underline-style="solid" style:text-underline-width="auto" style:text-underline-color="font-color"/>
    </style:style>
    <style:style style:name="T7" style:family="text">
      <style:text-properties fo:color="#910000" loext:opacity="100%" fo:font-size="15pt" style:text-underline-style="solid" style:text-underline-width="auto" style:text-underline-color="font-color" fo:font-weight="bold"/>
    </style:style>
    <style:style style:name="T8" style:family="text">
      <style:text-properties fo:font-size="12pt"/>
    </style:style>
    <style:style style:name="fr1" style:family="graphic" style:parent-style-name="Graphics">
      <style:graphic-properties fo:margin-left="0.106cm" fo:margin-right="0.106cm" fo:margin-top="0.106cm" fo:margin-bottom="0.10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scrollbar="false" draw:frame-display-border="fals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2">FCFS Scheduling-</text:span></text:span></text:h>
      <text:p text:style-name="P8"> </text:p>
      <text:p text:style-name="P9">In FCFS Scheduling,</text:p>
      <text:list xml:id="list1107464160" text:style-name="L2">
        <text:list-item>
          <text:p text:style-name="P14">The process which arrives first in the ready queue is firstly assigned the CPU.</text:p>
        </text:list-item>
        <text:list-item>
          <text:p text:style-name="P14">In case of a tie, process with smaller process id is executed first.</text:p>
        </text:list-item>
        <text:list-item>
          <text:p text:style-name="P14">It is always non-preemptive in nature.</text:p>
        </text:list-item>
      </text:list>
      <text:p text:style-name="P8"> </text:p>
      <text:h text:style-name="P1" text:outline-level="2"><text:span text:style-name="Strong_20_Emphasis"><text:span text:style-name="T2">Advantages-</text:span></text:span></text:h>
      <text:p text:style-name="P8"> </text:p>
      <text:list xml:id="list2138581854" text:style-name="L3">
        <text:list-item>
          <text:p text:style-name="P15">It is simple and easy to understand.</text:p>
        </text:list-item>
        <text:list-item>
          <text:p text:style-name="P15">It can be easily implemented using queue data structure.</text:p>
        </text:list-item>
        <text:list-item>
          <text:p text:style-name="P15">It does not lead to starvation.</text:p>
        </text:list-item>
      </text:list>
      <text:p text:style-name="P8"> </text:p>
      <text:h text:style-name="P1" text:outline-level="2"><text:span text:style-name="Strong_20_Emphasis"><text:span text:style-name="T2">Disadvantages-</text:span></text:span></text:h>
      <text:p text:style-name="P8"> </text:p>
      <text:list xml:id="list1699358513" text:style-name="L4">
        <text:list-item>
          <text:p text:style-name="P16">It does not consider the priority or burst time of the processes.</text:p>
        </text:list-item>
        <text:list-item>
          <text:p text:style-name="P24"><text:span text:style-name="T3">It suffers from </text:span><text:span text:style-name="Strong_20_Emphasis"><text:span text:style-name="T3">convoy effect</text:span></text:span><text:span text:style-name="T3">.</text:span></text:p>
        </text:list-item>
      </text:list>
      <text:p text:style-name="P8"> 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3"><text:span text:style-name="Strong_20_Emphasis"><text:span text:style-name="T1">Convoy Effect</text:span></text:span></text:h>
            <text:p text:style-name="P4">In convoy effect,</text:p>
            <text:list xml:id="list3592322220" text:style-name="L1">
              <text:list-item>
                <text:p text:style-name="P13">Consider processes with higher burst time arrived before the processes with smaller burst time.</text:p>
              </text:list-item>
              <text:list-item>
                <text:p text:style-name="P13">Then, smaller processes have to wait for a long time for longer processes to release the CPU.</text:p>
              </text:list-item>
            </text:list>
          </table:table-cell>
        </table:table-row>
      </table:table>
      <text:p text:style-name="P8"> </text:p>
      <text:h text:style-name="P1" text:outline-level="2"><text:span text:style-name="Strong_20_Emphasis"><text:span text:style-name="T2">PRACTICE PROBLEMS BASED ON FCFS SCHEDULING-</text:span></text:span></text:h>
      <text:p text:style-name="P8"> </text:p>
      <text:h text:style-name="P1" text:outline-level="2"><text:span text:style-name="Strong_20_Emphasis"><text:span text:style-name="T2">Problem-01:</text:span></text:span></text:h>
      <text:p text:style-name="P8"> </text:p>
      <text:p text:style-name="P9"><text:soft-page-break/>Consider the set of 5 processes whose arrival time and burst time are given below-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Strong_20_Emphasis"><text:span text:style-name="T8">Process Id</text:span></text:span></text:p>
          </table:table-cell>
          <table:table-cell table:style-name="Table2.A1" office:value-type="string">
            <text:p text:style-name="P5"><text:span text:style-name="Strong_20_Emphasis"><text:span text:style-name="T8">Arrival time</text:span></text:span></text:p>
          </table:table-cell>
          <table:table-cell table:style-name="Table2.A1" office:value-type="string">
            <text:p text:style-name="P5"><text:span text:style-name="Strong_20_Emphasis"><text:span text:style-name="T8">Burst time</text:span></text:span></text:p>
          </table:table-cell>
        </table:table-row>
        <table:table-row>
          <table:table-cell table:style-name="Table2.A1" office:value-type="string">
            <text:p text:style-name="P5">P1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</table:table-row>
        <table:table-row>
          <table:table-cell table:style-name="Table2.A1" office:value-type="string">
            <text:p text:style-name="P5">P2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3</text:p>
          </table:table-cell>
        </table:table-row>
        <table:table-row>
          <table:table-cell table:style-name="Table2.A1" office:value-type="string">
            <text:p text:style-name="P5">P3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2</text:p>
          </table:table-cell>
        </table:table-row>
        <table:table-row>
          <table:table-cell table:style-name="Table2.A1" office:value-type="string">
            <text:p text:style-name="P5">P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1</text:p>
          </table:table-cell>
        </table:table-row>
        <table:table-row>
          <table:table-cell table:style-name="Table2.A1" office:value-type="string">
            <text:p text:style-name="P5">P5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3</text:p>
          </table:table-cell>
        </table:table-row>
      </table:table>
      <text:p text:style-name="P8"> </text:p>
      <text:p text:style-name="P9">If the CPU scheduling policy is FCFS, calculate the average waiting time and average turn around time.</text:p>
      <text:p text:style-name="P8"> </text:p>
      <text:h text:style-name="P1" text:outline-level="2"><text:span text:style-name="Strong_20_Emphasis"><text:span text:style-name="T2">Solution-</text:span></text:span></text:h>
      <text:p text:style-name="P8"> </text:p>
      <text:h text:style-name="P2" text:outline-level="3"><text:span text:style-name="Strong_20_Emphasis"><text:span text:style-name="T2">Gantt Chart-</text:span></text:span></text:h>
      <text:p text:style-name="P8"> </text:p>
      <text:p text:style-name="P8"><draw:frame draw:style-name="fr1" draw:name="Image1" text:anchor-type="as-char" svg:width="13.52cm" svg:height="3.678cm" draw:z-index="1"><draw:image xlink:href="Pictures/10000001000001FF0000008BD5A27385D24C51F3.png" xlink:type="simple" xlink:show="embed" xlink:actuate="onLoad" draw:mime-type="image/png"/></draw:frame></text:p>
      <text:p text:style-name="P8"> </text:p>
      <text:p text:style-name="P9">Here, black box represents the idle time of CPU.</text:p>
      <text:p text:style-name="P8"> </text:p>
      <text:p text:style-name="P9">Now, we know-</text:p>
      <text:list xml:id="list1989667650" text:style-name="L5">
        <text:list-item>
          <text:p text:style-name="P17">Turn Around time = Exit time – Arrival time</text:p>
        </text:list-item>
        <text:list-item>
          <text:p text:style-name="P17">Waiting time = Turn Around time – Burst time</text:p>
        </text:list-item>
      </text:list>
      <text:p text:style-name="P8"> </text:p>
      <text:p text:style-name="P12"><text:soft-page-break/><text:span text:style-name="Strong_20_Emphasis"><text:span text:style-name="T4">Also read-</text:span></text:span><text:span text:style-name="T3"> </text:span><text:a xlink:type="simple" xlink:href="https://www.gatevidyalay.com/turn-around-time-response-time-waiting-time/" office:target-frame-name="_blank" xlink:show="new" text:style-name="Internet_20_link" text:visited-style-name="Visited_20_Internet_20_Link"><text:span text:style-name="Strong_20_Emphasis"><text:span text:style-name="T5">Various Times of Process</text:span></text:span></text:a></text:p>
      <text:p text:style-name="P8"> 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<text:span text:style-name="Strong_20_Emphasis"><text:span text:style-name="T8">Process Id</text:span></text:span></text:p>
          </table:table-cell>
          <table:table-cell table:style-name="Table3.A1" office:value-type="string">
            <text:p text:style-name="P5"><text:span text:style-name="Strong_20_Emphasis"><text:span text:style-name="T8">Exit time</text:span></text:span></text:p>
          </table:table-cell>
          <table:table-cell table:style-name="Table3.A1" office:value-type="string">
            <text:p text:style-name="P5"><text:span text:style-name="Strong_20_Emphasis"><text:span text:style-name="T8">Turn Around time</text:span></text:span></text:p>
          </table:table-cell>
          <table:table-cell table:style-name="Table3.A1" office:value-type="string">
            <text:p text:style-name="P5"><text:span text:style-name="Strong_20_Emphasis"><text:span text:style-name="T8">Waiting time</text:span></text:span></text:p>
          </table:table-cell>
        </table:table-row>
        <table:table-row>
          <table:table-cell table:style-name="Table3.A1" office:value-type="string">
            <text:p text:style-name="P5">P1</text:p>
          </table:table-cell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7 – 3 = 4</text:p>
          </table:table-cell>
          <table:table-cell table:style-name="Table3.A1" office:value-type="string">
            <text:p text:style-name="P5">4 – 4 = 0</text:p>
          </table:table-cell>
        </table:table-row>
        <table:table-row>
          <table:table-cell table:style-name="Table3.A1" office:value-type="string">
            <text:p text:style-name="P5">P2</text:p>
          </table:table-cell>
          <table:table-cell table:style-name="Table3.A1" office:value-type="string">
            <text:p text:style-name="P5">13</text:p>
          </table:table-cell>
          <table:table-cell table:style-name="Table3.A1" office:value-type="string">
            <text:p text:style-name="P5">13 – 5 = 8</text:p>
          </table:table-cell>
          <table:table-cell table:style-name="Table3.A1" office:value-type="string">
            <text:p text:style-name="P5">8 – 3 = 5</text:p>
          </table:table-cell>
        </table:table-row>
        <table:table-row>
          <table:table-cell table:style-name="Table3.A1" office:value-type="string">
            <text:p text:style-name="P5">P3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2 – 0 = 2</text:p>
          </table:table-cell>
          <table:table-cell table:style-name="Table3.A1" office:value-type="string">
            <text:p text:style-name="P5">2 – 2 = 0</text:p>
          </table:table-cell>
        </table:table-row>
        <table:table-row>
          <table:table-cell table:style-name="Table3.A1" office:value-type="string">
            <text:p text:style-name="P5">P4</text:p>
          </table:table-cell>
          <table:table-cell table:style-name="Table3.A1" office:value-type="string">
            <text:p text:style-name="P5">14</text:p>
          </table:table-cell>
          <table:table-cell table:style-name="Table3.A1" office:value-type="string">
            <text:p text:style-name="P5">14 – 5 = 9</text:p>
          </table:table-cell>
          <table:table-cell table:style-name="Table3.A1" office:value-type="string">
            <text:p text:style-name="P5">9 – 1 = 8</text:p>
          </table:table-cell>
        </table:table-row>
        <table:table-row>
          <table:table-cell table:style-name="Table3.A1" office:value-type="string">
            <text:p text:style-name="P5">P5</text:p>
          </table:table-cell>
          <table:table-cell table:style-name="Table3.A1" office:value-type="string">
            <text:p text:style-name="P5">10</text:p>
          </table:table-cell>
          <table:table-cell table:style-name="Table3.A1" office:value-type="string">
            <text:p text:style-name="P5">10 – 4 = 6</text:p>
          </table:table-cell>
          <table:table-cell table:style-name="Table3.A1" office:value-type="string">
            <text:p text:style-name="P5">6 – 3 = 3</text:p>
          </table:table-cell>
        </table:table-row>
      </table:table>
      <text:p text:style-name="P8"> </text:p>
      <text:p text:style-name="P9">Now,</text:p>
      <text:list xml:id="list3768458976" text:style-name="L6">
        <text:list-item>
          <text:p text:style-name="P18">Average Turn Around time = (4 + 8 + 2 + 9 + 6) / 5 = 29 / 5 = 5.8 unit</text:p>
        </text:list-item>
        <text:list-item>
          <text:p text:style-name="P18">Average waiting time = (0 + 5 + 0 + 8 + 3) / 5 = 16 / 5 = 3.2 unit</text:p>
        </text:list-item>
      </text:list>
      <text:p text:style-name="P8"> </text:p>
      <text:h text:style-name="P1" text:outline-level="2"><text:span text:style-name="Strong_20_Emphasis"><text:span text:style-name="T2">Problem-02:</text:span></text:span></text:h>
      <text:p text:style-name="P8"> </text:p>
      <text:p text:style-name="P9">Consider the set of 3 processes whose arrival time and burst time are given below-</text:p>
      <text:p text:style-name="P8"> 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<text:span text:style-name="Strong_20_Emphasis"><text:span text:style-name="T8">Process Id</text:span></text:span></text:p>
          </table:table-cell>
          <table:table-cell table:style-name="Table4.A1" office:value-type="string">
            <text:p text:style-name="P5"><text:span text:style-name="Strong_20_Emphasis"><text:span text:style-name="T8">Arrival time</text:span></text:span></text:p>
          </table:table-cell>
          <table:table-cell table:style-name="Table4.A1" office:value-type="string">
            <text:p text:style-name="P5"><text:span text:style-name="Strong_20_Emphasis"><text:span text:style-name="T8">Burst time</text:span></text:span></text:p>
          </table:table-cell>
        </table:table-row>
        <table:table-row>
          <table:table-cell table:style-name="Table4.A1" office:value-type="string">
            <text:p text:style-name="P5">P1</text:p>
          </table:table-cell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2</text:p>
          </table:table-cell>
        </table:table-row>
        <table:table-row>
          <table:table-cell table:style-name="Table4.A1" office:value-type="string">
            <text:p text:style-name="P5">P2</text:p>
          </table:table-cell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5">1</text:p>
          </table:table-cell>
        </table:table-row>
        <table:table-row>
          <table:table-cell table:style-name="Table4.A1" office:value-type="string">
            <text:p text:style-name="P5">P3</text:p>
          </table:table-cell>
          <table:table-cell table:style-name="Table4.A1" office:value-type="string">
            <text:p text:style-name="P5">5</text:p>
          </table:table-cell>
          <table:table-cell table:style-name="Table4.A1" office:value-type="string">
            <text:p text:style-name="P5">6</text:p>
          </table:table-cell>
        </table:table-row>
      </table:table>
      <text:p text:style-name="P8"> </text:p>
      <text:p text:style-name="P9">If the CPU scheduling policy is FCFS, calculate the average waiting time and average turn around time.</text:p>
      <text:p text:style-name="P11"><text:bookmark text:name="ezoic-pub-ad-placeholder-161"/>Advertisements<text:bookmark text:name="div-gpt-ad-gatevidyalay_com-medrectangle-4-0"/></text:p>
      <text:section text:style-name="Sect1" text:name="google_ads_iframe_/23058280356,22896314604/gatevidyalay_com-medrectangle-4_0__container__">
        <text:p text:style-name="P6"/>
        <text:section text:style-name="Sect1" text:name="div-gpt-ad-gatevidyalay_com-medrectangle-4-0_charity">
          <text:p text:style-name="P6"><text:soft-page-break/><text:span text:style-name="T6"><draw:frame draw:style-name="fr3" draw:name="Object3" text:anchor-type="as-char" svg:width="7.938cm" svg:height="6.615cm" draw:z-index="2"><draw:floating-frame xlink:href="https://go.ezodn.com/charity/http/charity-ads.s3.amazonaws.com/charity_ads/1157/300x250.png" xlink:type="simple" xlink:show="embed" xlink:actuate="onLoad"/></draw:frame></text:span><text:a xlink:type="simple" xlink:href="https://go.ezodn.com/ads/charity/proxy?p_id=63ee33a7-80b5-48f0-622a-8a13f30c20db&amp;d_id=449383&amp;imp_id=5473507909905161&amp;c_id=1157&amp;l_id=10016&amp;url=https%3A%2F%2Fplanetwild.com%2Fcontribute%2Fstart%3Fredirect%3D%2F%26amp%3Butm_campaign%3Dtofu_free_traffic_2507%26amp%3Butm_medium%3DAd%26amp%3Butm_source%3DGoogle%26amp%3Butm_funnel%3Dtofu%26amp%3Butm_type%3Dtraffic&amp;ffid=1&amp;co=IN" text:style-name="Internet_20_link" text:visited-style-name="Visited_20_Internet_20_Link"><text:span text:style-name="T7">×</text:span></text:a></text:p>
        </text:section>
      </text:section>
      <text:p text:style-name="P10"><draw:frame draw:style-name="fr2" draw:name="?pageview_id=63ee33a7-80b5-48f0-622a-8a13f30c20db&amp;ad_position_id=161&amp;impression_group_id=gatevidyalay_com-medrectangle-4/2026-02-11/5473507909905161&amp;ad_size=300x250&amp;domain_id=449383&amp;url=https://www.gatevidyalay.com/first-come-first-serve-cpu-scheduling/" text:anchor-type="as-char" svg:width="0.37cm" svg:height="0.37cm" draw:z-index="3"><draw:image xlink:href="Pictures/100000010000000E0000000E8697AB9408BC6EAB.png" xlink:type="simple" xlink:show="embed" xlink:actuate="onLoad" draw:mime-type="image/png"/><svg:title>Ezoic</svg:title></draw:frame></text:p>
      <text:p text:style-name="P8"> </text:p>
      <text:h text:style-name="P1" text:outline-level="2"><text:span text:style-name="Strong_20_Emphasis"><text:span text:style-name="T2">Solution-</text:span></text:span></text:h>
      <text:p text:style-name="P8"> </text:p>
      <text:h text:style-name="P2" text:outline-level="3"><text:span text:style-name="Strong_20_Emphasis"><text:span text:style-name="T2">Gantt Chart-</text:span></text:span></text:h>
      <text:p text:style-name="P8"> </text:p>
      <text:p text:style-name="P8"><draw:frame draw:style-name="fr1" draw:name="Image2" text:anchor-type="as-char" svg:width="11.404cm" svg:height="3.413cm" draw:z-index="4"><draw:image xlink:href="Pictures/10000001000001AF000000810E794153EE4DFB2E.png" xlink:type="simple" xlink:show="embed" xlink:actuate="onLoad" draw:mime-type="image/png"/></draw:frame></text:p>
      <text:p text:style-name="P8"> </text:p>
      <text:p text:style-name="P9">Here, black box represents the idle time of CPU.</text:p>
      <text:p text:style-name="P8"> </text:p>
      <text:p text:style-name="P9">Now, we know-</text:p>
      <text:list xml:id="list556491942" text:style-name="L7">
        <text:list-item>
          <text:p text:style-name="P19">Turn Around time = Exit time – Arrival time</text:p>
        </text:list-item>
        <text:list-item>
          <text:p text:style-name="P19">Waiting time = Turn Around time – Burst time</text:p>
        </text:list-item>
      </text:list>
      <text:p text:style-name="P8"> 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"><text:span text:style-name="Strong_20_Emphasis"><text:span text:style-name="T8">Process Id</text:span></text:span></text:p>
          </table:table-cell>
          <table:table-cell table:style-name="Table5.A1" office:value-type="string">
            <text:p text:style-name="P5"><text:span text:style-name="Strong_20_Emphasis"><text:span text:style-name="T8">Exit time</text:span></text:span></text:p>
          </table:table-cell>
          <table:table-cell table:style-name="Table5.A1" office:value-type="string">
            <text:p text:style-name="P5"><text:span text:style-name="Strong_20_Emphasis"><text:span text:style-name="T8">Turn Around time</text:span></text:span></text:p>
          </table:table-cell>
          <table:table-cell table:style-name="Table5.A1" office:value-type="string">
            <text:p text:style-name="P5"><text:span text:style-name="Strong_20_Emphasis"><text:span text:style-name="T8">Waiting time</text:span></text:span></text:p>
          </table:table-cell>
        </table:table-row>
        <table:table-row>
          <table:table-cell table:style-name="Table5.A1" office:value-type="string">
            <text:p text:style-name="P5">P1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2 – 0 = 2</text:p>
          </table:table-cell>
          <table:table-cell table:style-name="Table5.A1" office:value-type="string">
            <text:p text:style-name="P5">2 – 2 = 0</text:p>
          </table:table-cell>
        </table:table-row>
        <text:soft-page-break/>
        <table:table-row>
          <table:table-cell table:style-name="Table5.A1" office:value-type="string">
            <text:p text:style-name="P5">P2</text:p>
          </table:table-cell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4 – 3 = 1</text:p>
          </table:table-cell>
          <table:table-cell table:style-name="Table5.A1" office:value-type="string">
            <text:p text:style-name="P5">1 – 1 = 0</text:p>
          </table:table-cell>
        </table:table-row>
        <table:table-row>
          <table:table-cell table:style-name="Table5.A1" office:value-type="string">
            <text:p text:style-name="P5">P3</text:p>
          </table:table-cell>
          <table:table-cell table:style-name="Table5.A1" office:value-type="string">
            <text:p text:style-name="P5">11</text:p>
          </table:table-cell>
          <table:table-cell table:style-name="Table5.A1" office:value-type="string">
            <text:p text:style-name="P5">11- 5 = 6</text:p>
          </table:table-cell>
          <table:table-cell table:style-name="Table5.A1" office:value-type="string">
            <text:p text:style-name="P5">6 – 6 = 0</text:p>
          </table:table-cell>
        </table:table-row>
      </table:table>
      <text:p text:style-name="P8"> </text:p>
      <text:p text:style-name="P9">Now,</text:p>
      <text:list xml:id="list1780533056" text:style-name="L8">
        <text:list-item>
          <text:p text:style-name="P20">Average Turn Around time = (2 + 1 + 6) / 3 = 9 / 3 = 3 unit</text:p>
        </text:list-item>
        <text:list-item>
          <text:p text:style-name="P20">Average waiting time = (0 + 0 + 0) / 3 = 0 / 3 = 0 unit</text:p>
        </text:list-item>
      </text:list>
      <text:p text:style-name="P8"> </text:p>
      <text:h text:style-name="P1" text:outline-level="2"><text:span text:style-name="Strong_20_Emphasis"><text:span text:style-name="T2">Problem-03:</text:span></text:span></text:h>
      <text:p text:style-name="P8"> </text:p>
      <text:p text:style-name="P9">Consider the set of 6 processes whose arrival time and burst time are given below-</text:p>
      <text:p text:style-name="P8"> 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<text:span text:style-name="Strong_20_Emphasis"><text:span text:style-name="T8">Process Id</text:span></text:span></text:p>
          </table:table-cell>
          <table:table-cell table:style-name="Table6.A1" office:value-type="string">
            <text:p text:style-name="P5"><text:span text:style-name="Strong_20_Emphasis"><text:span text:style-name="T8">Arrival time</text:span></text:span></text:p>
          </table:table-cell>
          <table:table-cell table:style-name="Table6.A1" office:value-type="string">
            <text:p text:style-name="P5"><text:span text:style-name="Strong_20_Emphasis"><text:span text:style-name="T8">Burst time</text:span></text:span></text:p>
          </table:table-cell>
        </table:table-row>
        <table:table-row>
          <table:table-cell table:style-name="Table6.A1" office:value-type="string">
            <text:p text:style-name="P5">P1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3</text:p>
          </table:table-cell>
        </table:table-row>
        <table:table-row>
          <table:table-cell table:style-name="Table6.A1" office:value-type="string">
            <text:p text:style-name="P5">P2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2</text:p>
          </table:table-cell>
        </table:table-row>
        <table:table-row>
          <table:table-cell table:style-name="Table6.A1" office:value-type="string">
            <text:p text:style-name="P5">P3</text:p>
          </table:table-cell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">1</text:p>
          </table:table-cell>
        </table:table-row>
        <table:table-row>
          <table:table-cell table:style-name="Table6.A1" office:value-type="string">
            <text:p text:style-name="P5">P4</text:p>
          </table:table-cell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5">4</text:p>
          </table:table-cell>
        </table:table-row>
        <table:table-row>
          <table:table-cell table:style-name="Table6.A1" office:value-type="string">
            <text:p text:style-name="P5">P5</text:p>
          </table:table-cell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5">5</text:p>
          </table:table-cell>
        </table:table-row>
        <table:table-row>
          <table:table-cell table:style-name="Table6.A1" office:value-type="string">
            <text:p text:style-name="P5">P6</text:p>
          </table:table-cell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5">2</text:p>
          </table:table-cell>
        </table:table-row>
      </table:table>
      <text:p text:style-name="P8"> </text:p>
      <text:p text:style-name="P9">If the CPU scheduling policy is FCFS and there is 1 unit of overhead in scheduling the processes, find the efficiency of the algorithm.</text:p>
      <text:p text:style-name="P8"> </text:p>
      <text:h text:style-name="P1" text:outline-level="2"><text:span text:style-name="Strong_20_Emphasis"><text:span text:style-name="T2">Solution-</text:span></text:span></text:h>
      <text:p text:style-name="P8"> </text:p>
      <text:h text:style-name="P2" text:outline-level="3"><text:span text:style-name="Strong_20_Emphasis"><text:span text:style-name="T2">Gantt Chart-</text:span></text:span></text:h>
      <text:p text:style-name="P8"> </text:p>
      <text:p text:style-name="P8"><text:soft-page-break/><draw:frame draw:style-name="fr1" draw:name="Image3" text:anchor-type="as-char" svg:width="15.637cm" svg:height="6.853cm" draw:z-index="0"><draw:image xlink:href="Pictures/100000010000024F00000103B3CF058E745E1FE6.png" xlink:type="simple" xlink:show="embed" xlink:actuate="onLoad" draw:mime-type="image/png"/></draw:frame></text:p>
      <text:p text:style-name="P8"> </text:p>
      <text:p text:style-name="P9">Here, δ denotes the context switching overhead.</text:p>
      <text:p text:style-name="P8"> </text:p>
      <text:p text:style-name="P9">Now,</text:p>
      <text:list xml:id="list2767207466" text:style-name="L9">
        <text:list-item>
          <text:p text:style-name="P21">Useless time / Wasted time = 6 x δ = 6 x 1 = 6 unit</text:p>
        </text:list-item>
        <text:list-item>
          <text:p text:style-name="P21">Total time = 23 unit</text:p>
        </text:list-item>
        <text:list-item>
          <text:p text:style-name="P21">Useful time = 23 unit – 6 unit = 17 unit</text:p>
        </text:list-item>
      </text:list>
      <text:p text:style-name="P8"> </text:p>
      <text:p text:style-name="P9">Efficiency (η)</text:p>
      <text:p text:style-name="P9">= Useful time  / Total Total</text:p>
      <text:p text:style-name="P9">= 17 unit / 23 unit</text:p>
      <text:p text:style-name="P9">= 0.7391</text:p>
      <text:p text:style-name="P9">= 73.91%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9:51:33.398487622</meta:creation-date>
    <dc:date>2026-02-16T10:03:38.706965522</dc:date>
    <meta:editing-duration>PT1H13M31S</meta:editing-duration>
    <meta:editing-cycles>2</meta:editing-cycles>
    <meta:generator>LibreOffice/7.3.7.2$Linux_X86_64 LibreOffice_project/30$Build-2</meta:generator>
    <meta:document-statistic meta:table-count="6" meta:image-count="4" meta:object-count="1" meta:page-count="6" meta:paragraph-count="193" meta:word-count="620" meta:character-count="2729" meta:non-whitespace-character-count="2220"/>
  </office:meta>
</office:document-meta>
</file>