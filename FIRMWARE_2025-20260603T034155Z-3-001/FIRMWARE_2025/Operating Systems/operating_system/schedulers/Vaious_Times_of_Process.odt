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1A76A90F857E5CCB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Condensed" svg:font-family="'Roboto Condensed', sans-serif"/>
    <style:font-face style:name="inherit" svg:font-family="inherit"/>
  </office:font-face-decls>
  <office:automatic-styles>
    <style:style style:name="Table1" style:family="table">
      <style:table-properties style:width="14.796cm" table:align="left"/>
    </style:style>
    <style:style style:name="Table1.A" style:family="table-column">
      <style:table-column-properties style:column-width="14.796cm"/>
    </style:style>
    <style:style style:name="Table1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2" style:family="table">
      <style:table-properties style:width="15.61cm" table:align="left"/>
    </style:style>
    <style:style style:name="Table2.A" style:family="table-column">
      <style:table-column-properties style:column-width="15.61cm"/>
    </style:style>
    <style:style style:name="Table2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3" style:family="table">
      <style:table-properties style:width="16.007cm" table:align="left"/>
    </style:style>
    <style:style style:name="Table3.A" style:family="table-column">
      <style:table-column-properties style:column-width="16.007cm"/>
    </style:style>
    <style:style style:name="Table3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4" style:family="table">
      <style:table-properties style:width="16.007cm" table:align="left"/>
    </style:style>
    <style:style style:name="Table4.A" style:family="table-column">
      <style:table-column-properties style:column-width="16.007cm"/>
    </style:style>
    <style:style style:name="Table4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fo:letter-spacing="normal"/>
    </style:style>
    <style:style style:name="P4" style:family="paragraph" style:parent-style-name="Text_20_body">
      <style:paragraph-properties fo:margin-left="0.397cm" fo:margin-right="0.397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8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9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0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1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2" style:family="paragraph" style:parent-style-name="Text_20_body" style:list-style-name="L7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3" style:family="paragraph" style:parent-style-name="Text_20_body" style:list-style-name="L8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 fo:orphans="2" fo:widows="2"/>
    </style:style>
    <style:style style:name="P19" style:family="paragraph" style:parent-style-name="Text_20_body">
      <style:paragraph-properties fo:margin-top="0.265cm" fo:margin-bottom="0.265cm" style:contextual-spacing="false" fo:text-align="center" style:justify-single-word="false" fo:orphans="2" fo:widows="2"/>
    </style:style>
    <style:style style:name="P20" style:family="paragraph" style:parent-style-name="Text_20_body">
      <style:paragraph-properties fo:margin-left="0.397cm" fo:margin-right="0.397cm" fo:margin-top="0cm" fo:margin-bottom="0cm" style:contextual-spacing="false" fo:text-align="center" style:justify-single-word="false" fo:orphans="2" fo:widows="2" fo:text-indent="0cm" style:auto-text-indent="false"/>
      <style:text-properties fo:color="#5f6368" loext:opacity="100%" style:font-name="Google Sans Text" fo:font-size="12pt" fo:font-weight="bold" loext:padding="0cm" loext:border="none"/>
    </style:style>
    <style:style style:name="T1" style:family="text">
      <style:text-properties fo:font-variant="normal" fo:text-transform="none" fo:color="#303030" loext:opacity="100%" style:font-name="Roboto Condensed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T3" style:family="text">
      <style:text-properties fo:font-variant="normal" fo:text-transform="none" fo:color="#303030" loext:opacity="100%" style:font-name="Arimo" fo:font-size="11.25pt" fo:letter-spacing="normal" fo:font-style="normal" fo:font-weight="normal" fo:background-color="transparent" loext:char-shading-value="0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T4" style:family="text">
      <style:text-properties fo:font-variant="normal" fo:text-transform="none" fo:color="#303030" loext:opacity="100%" style:font-name="Arimo" fo:font-size="12pt" fo:letter-spacing="normal" fo:font-style="normal" fo:font-weight="normal"/>
    </style:style>
    <style:style style:name="T5" style:family="text">
      <style:text-properties fo:font-variant="normal" fo:text-transform="none" fo:color="#303030" loext:opacity="100%" fo:letter-spacing="normal"/>
    </style:style>
    <style:style style:name="T6" style:family="text">
      <style:text-properties fo:font-variant="normal" fo:text-transform="none" fo:color="#910000" loext:opacity="100%" style:font-name="Arimo" fo:font-size="11.2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a73e8" loext:opacity="100%" style:font-name="inherit" fo:font-size="12pt" fo:letter-spacing="normal" fo:font-style="normal" fo:font-weight="bold" fo:background-color="transparent" loext:char-shading-value="0" loext:padding="0cm" loext:border="none"/>
    </style:style>
    <style:style style:name="T8" style:family="text">
      <style:text-properties fo:color="#910000" loext:opacity="100%" style:text-underline-style="solid" style:text-underline-width="auto" style:text-underline-color="font-color"/>
    </style:style>
    <style:style style:name="T9" style:family="text">
      <style:text-properties fo:color="#910000" loext:opacity="100%" fo:font-size="15pt" style:text-underline-style="solid" style:text-underline-width="auto" style:text-underline-color="font-color" fo:font-weight="bold"/>
    </style:style>
    <style:style style:name="T10" style:family="text">
      <style:text-properties loext:padding="0cm" loext:border="none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Various Times Related To Process-</text:span></text:span></text:h>
      <text:p text:style-name="P3"> </text:p>
      <text:p text:style-name="P14"><text:span text:style-name="T2"/></text:p>
      <text:p text:style-name="P17"><text:span text:style-name="T5"/></text:p>
      <text:p text:style-name="P5">Various times related to process are-</text:p>
      <text:p text:style-name="P3"> </text:p>
      <text:p text:style-name="P3"><draw:frame draw:style-name="fr1" draw:name="Image1" text:anchor-type="as-char" svg:width="15.859cm" svg:height="11.192cm" draw:z-index="0"><draw:image xlink:href="Pictures/10000001000001E1000001A76A90F857E5CCB21B.png" xlink:type="simple" xlink:show="embed" xlink:actuate="onLoad" draw:mime-type="image/png"/></draw:frame></text:p>
      <text:p text:style-name="P3"> </text:p>
      <text:list xml:id="list1739915506" text:style-name="L1">
        <text:list-item>
          <text:p text:style-name="P6">Arrival time</text:p>
        </text:list-item>
        <text:list-item>
          <text:p text:style-name="P6">Waiting time</text:p>
        </text:list-item>
        <text:list-item>
          <text:p text:style-name="P6">Response time</text:p>
        </text:list-item>
        <text:list-item>
          <text:p text:style-name="P6">Burst time</text:p>
        </text:list-item>
        <text:list-item>
          <text:p text:style-name="P6">Completion time</text:p>
        </text:list-item>
        <text:list-item>
          <text:p text:style-name="P6">Turn Around Time</text:p>
        </text:list-item>
      </text:list>
      <text:p text:style-name="P3"> </text:p>
      <text:h text:style-name="P1" text:outline-level="2"><text:soft-page-break/><text:span text:style-name="Strong_20_Emphasis"><text:span text:style-name="T1">1. Arrival Time-</text:span></text:span></text:h>
      <text:p text:style-name="P3"> </text:p>
      <text:list xml:id="list3056543152" text:style-name="L2">
        <text:list-item>
          <text:p text:style-name="P7">Arrival time is the point of time at which a process enters the ready queue.</text:p>
        </text:list-item>
      </text:list>
      <text:p text:style-name="P3"> </text:p>
      <text:h text:style-name="P1" text:outline-level="2"><text:span text:style-name="Strong_20_Emphasis"><text:span text:style-name="T1">2. Waiting Time-</text:span></text:span></text:h>
      <text:p text:style-name="P3"> </text:p>
      <text:list xml:id="list2304833261" text:style-name="L3">
        <text:list-item>
          <text:p text:style-name="P8">Waiting time is the amount of time spent by a process waiting in the ready queue for getting the CPU.</text:p>
        </text:list-item>
      </text:list>
      <text:p text:style-name="P3"> 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Waiting time = Turn Around time – Burst time</text:p>
          </table:table-cell>
        </table:table-row>
      </table:table>
      <text:p text:style-name="P3"> </text:p>
      <text:h text:style-name="P1" text:outline-level="2"><text:span text:style-name="Strong_20_Emphasis"><text:span text:style-name="T1">3. Response Time-</text:span></text:span></text:h>
      <text:p text:style-name="P3"> </text:p>
      <text:list xml:id="list560927529" text:style-name="L4">
        <text:list-item>
          <text:p text:style-name="P9">Response time is the amount of time after which a process gets the CPU for the first time after entering the ready queue.</text:p>
        </text:list-item>
      </text:list>
      <text:p text:style-name="P3"> 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Response Time = Time at which process first gets the CPU – Arrival time</text:p>
          </table:table-cell>
        </table:table-row>
      </table:table>
      <text:p text:style-name="P3"> </text:p>
      <text:h text:style-name="P1" text:outline-level="2"><text:span text:style-name="Strong_20_Emphasis"><text:span text:style-name="T1">4. Burst Time-</text:span></text:span></text:h>
      <text:p text:style-name="P3"> </text:p>
      <text:list xml:id="list3607214490" text:style-name="L5">
        <text:list-item>
          <text:p text:style-name="P10">Burst time is the amount of time required by a process for executing on CPU.</text:p>
        </text:list-item>
        <text:list-item>
          <text:p text:style-name="P15"><text:span text:style-name="T2">It is also called as </text:span><text:span text:style-name="Strong_20_Emphasis"><text:span text:style-name="T2">execution time</text:span></text:span><text:span text:style-name="T2"> or </text:span><text:span text:style-name="Strong_20_Emphasis"><text:span text:style-name="T2">running time</text:span></text:span><text:span text:style-name="T2">.</text:span></text:p>
        </text:list-item>
        <text:list-item>
          <text:p text:style-name="P10">Burst time of a process can not be known in advance before executing the process.</text:p>
        </text:list-item>
        <text:list-item>
          <text:p text:style-name="P10">It can be known only after the process has executed.</text:p>
        </text:list-item>
      </text:list>
      <text:p text:style-name="P3"> </text:p>
      <text:h text:style-name="P1" text:outline-level="2"><text:span text:style-name="Strong_20_Emphasis"><text:span text:style-name="T1">5. Completion Time-</text:span></text:span></text:h>
      <text:p text:style-name="P3"> </text:p>
      <text:list xml:id="list2284426239" text:style-name="L6">
        <text:list-item>
          <text:p text:style-name="P11">Completion time is the point of time at which a process completes its execution on the CPU and takes exit from the system.</text:p>
        </text:list-item>
        <text:list-item>
          <text:p text:style-name="P16"><text:soft-page-break/><text:span text:style-name="T2">It is also called as </text:span><text:span text:style-name="Strong_20_Emphasis"><text:span text:style-name="T2">exit time</text:span></text:span><text:span text:style-name="T2">.</text:span></text:p>
        </text:list-item>
      </text:list>
      <text:p text:style-name="P3"> </text:p>
      <text:h text:style-name="P1" text:outline-level="2"><text:span text:style-name="Strong_20_Emphasis"><text:span text:style-name="T1">6. Turn Around Time-</text:span></text:span></text:h>
      <text:p text:style-name="P3"> </text:p>
      <text:list xml:id="list111106283" text:style-name="L7">
        <text:list-item>
          <text:p text:style-name="P12">Turn Around time is the total amount of time spent by a process in the system.</text:p>
        </text:list-item>
        <text:list-item>
          <text:p text:style-name="P12">When present in the system, a process is either waiting in the ready queue for getting the CPU or it is executing on the CPU.</text:p>
        </text:list-item>
      </text:list>
      <text:p text:style-name="P3"> 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Turn Around time = Burst time + Waiting time</text:p>
          </table:table-cell>
        </table:table-row>
      </table:table>
      <text:p text:style-name="P14"><text:span text:style-name="Strong_20_Emphasis"><text:span text:style-name="T4">OR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Turn Around time = Completion time – Arrival time</text:p>
          </table:table-cell>
        </table:table-row>
      </table:table>
      <text:p text:style-name="P3"> </text:p>
      <text:h text:style-name="P1" text:outline-level="2"><text:span text:style-name="Strong_20_Emphasis"><text:span text:style-name="T1">Important Note-</text:span></text:span></text:h>
      <text:p text:style-name="P3"> </text:p>
      <text:p text:style-name="P5">While discussing the above definitions,</text:p>
      <text:list xml:id="list873690756" text:style-name="L8">
        <text:list-item>
          <text:p text:style-name="P13">We have considered that the process does not require an I/O operation.</text:p>
        </text:list-item>
        <text:list-item>
          <text:p text:style-name="P13">When process is present in the system, it will be either waiting for the CPU in the ready state or it will be executing on the CPU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Condensed" svg:font-family="'Roboto Condensed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9:57:37.675036766</meta:creation-date>
    <dc:date>2026-02-12T11:04:41.594715649</dc:date>
    <meta:editing-duration>PT22S</meta:editing-duration>
    <meta:editing-cycles>2</meta:editing-cycles>
    <meta:generator>LibreOffice/7.3.7.2$Linux_X86_64 LibreOffice_project/30$Build-2</meta:generator>
    <meta:document-statistic meta:table-count="4" meta:image-count="1" meta:object-count="0" meta:page-count="3" meta:paragraph-count="55" meta:word-count="326" meta:character-count="1675" meta:non-whitespace-character-count="1379"/>
  </office:meta>
</office:document-meta>
</file>