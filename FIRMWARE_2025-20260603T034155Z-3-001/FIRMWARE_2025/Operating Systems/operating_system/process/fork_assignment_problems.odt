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1️⃣ Basic Parent–Child Identification</text:span></text:h>
      <text:p text:style-name="Text_20_body">Write a C program where a parent creates a child process using <text:span text:style-name="Source_20_Text">fork()</text:span>.</text:p>
      <text:list xml:id="list3017097200" text:style-name="L1">
        <text:list-item>
          <text:p text:style-name="P1">The parent should print its PID and child PID.</text:p>
        </text:list-item>
        <text:list-item>
          <text:p text:style-name="P1">The child should print its own PID and parent PID.</text:p>
        </text:list-item>
      </text:list>
      <text:p text:style-name="Horizontal_20_Line"/>
      <text:h text:style-name="Heading_20_2" text:outline-level="2"><text:span text:style-name="Strong_20_Emphasis">2️⃣ Multiple fork inside condition</text:span></text:h>
      <text:p text:style-name="Text_20_body">Write a C program that uses <text:span text:style-name="Source_20_Text">fork()</text:span> inside an <text:span text:style-name="Source_20_Text">if</text:span> condition using logical AND (<text:span text:style-name="Source_20_Text">&amp;&amp;</text:span>) or OR (<text:span text:style-name="Source_20_Text">||</text:span>).</text:p>
      <text:list xml:id="list3839028972" text:style-name="L2">
        <text:list-item>
          <text:p text:style-name="P2">Print process ID from each process.</text:p>
        </text:list-item>
        <text:list-item>
          <text:p text:style-name="P2">Count total number of processes created.</text:p>
        </text:list-item>
      </text:list>
      <text:p text:style-name="Horizontal_20_Line"/>
      <text:h text:style-name="Heading_20_2" text:outline-level="2"><text:span text:style-name="Strong_20_Emphasis">3️⃣ fork inside loop</text:span></text:h>
      <text:p text:style-name="Text_20_body">Write a program where <text:span text:style-name="Source_20_Text">fork()</text:span> is called inside a loop (3 iterations).</text:p>
      <text:list xml:id="list3214907993" text:style-name="L3">
        <text:list-item>
          <text:p text:style-name="P3">Each process prints its PID.</text:p>
        </text:list-item>
        <text:list-item>
          <text:p text:style-name="P3">Observe how processes increase exponentially.</text:p>
        </text:list-item>
      </text:list>
      <text:p text:style-name="Horizontal_20_Line"/>
      <text:h text:style-name="Heading_20_2" text:outline-level="2"><text:span text:style-name="Strong_20_Emphasis">4️⃣ Parent waits for child completion</text:span></text:h>
      <text:p text:style-name="Text_20_body">Write a program where:</text:p>
      <text:list xml:id="list1777684220" text:style-name="L4">
        <text:list-item>
          <text:p text:style-name="P4">Parent creates one child process.</text:p>
        </text:list-item>
        <text:list-item>
          <text:p text:style-name="P4">Child sleeps for few seconds and exits.</text:p>
        </text:list-item>
        <text:list-item>
          <text:p text:style-name="P4">Parent waits using <text:span text:style-name="Source_20_Text">wait()</text:span> before printing a completion message.</text:p>
        </text:list-item>
      </text:list>
      <text:p text:style-name="Horizontal_20_Line"/>
      <text:h text:style-name="Heading_20_2" text:outline-level="2"><text:span text:style-name="Strong_20_Emphasis">5️⃣ Parent–Child communication using exit status</text:span></text:h>
      <text:p text:style-name="Text_20_body">Write a program where:</text:p>
      <text:list xml:id="list3773114501" text:style-name="L5">
        <text:list-item>
          <text:p text:style-name="P5">Child computes square of a number.</text:p>
        </text:list-item>
        <text:list-item>
          <text:p text:style-name="P5">Child exits using <text:span text:style-name="Source_20_Text">exit(result)</text:span>.</text:p>
        </text:list-item>
        <text:list-item>
          <text:p text:style-name="P5">Parent retrieves and prints result using <text:span text:style-name="Source_20_Text">wait()</text:span>.</text:p>
        </text:list-item>
      </text:list>
      <text:p text:style-name="Horizontal_20_Line"/>
      <text:h text:style-name="Heading_20_2" text:outline-level="2"><text:soft-page-break/><text:span text:style-name="Strong_20_Emphasis">6️⃣ Even or Odd using fork</text:span></text:h>
      <text:p text:style-name="Text_20_body">Write a program where:</text:p>
      <text:list xml:id="list1214821860" text:style-name="L6">
        <text:list-item>
          <text:p text:style-name="P6">Parent reads an integer.</text:p>
        </text:list-item>
        <text:list-item>
          <text:p text:style-name="P6">Child checks whether number is even or odd.</text:p>
        </text:list-item>
        <text:list-item>
          <text:p text:style-name="P6">Child exits with status code.</text:p>
        </text:list-item>
        <text:list-item>
          <text:p text:style-name="P6">Parent prints result based on exit status.</text:p>
        </text:list-item>
      </text:list>
      <text:p text:style-name="Horizontal_20_Line"/>
      <text:h text:style-name="Heading_20_2" text:outline-level="2"><text:span text:style-name="Strong_20_Emphasis">7️⃣ Zombie process creation</text:span></text:h>
      <text:p text:style-name="Text_20_body">Write a program that intentionally creates a zombie process.</text:p>
      <text:list xml:id="list4009259993" text:style-name="L7">
        <text:list-item>
          <text:p text:style-name="P7">Child exits immediately.</text:p>
        </text:list-item>
        <text:list-item>
          <text:p text:style-name="P7">Parent sleeps for 10 seconds before calling <text:span text:style-name="Source_20_Text">wait()</text:span>.</text:p>
        </text:list-item>
        <text:list-item>
          <text:p text:style-name="P7">Observe zombie using system process command.</text:p>
        </text:list-item>
      </text:list>
      <text:p text:style-name="Horizontal_20_Line"/>
      <text:h text:style-name="Heading_20_2" text:outline-level="2"><text:span text:style-name="Strong_20_Emphasis">8️⃣ Orphan process demonstration</text:span></text:h>
      <text:p text:style-name="Text_20_body">Write a program where:</text:p>
      <text:list xml:id="list978112166" text:style-name="L8">
        <text:list-item>
          <text:p text:style-name="P8">Parent exits immediately.</text:p>
        </text:list-item>
        <text:list-item>
          <text:p text:style-name="P8">Child continues execution and prints new parent PID after few seconds.</text:p>
        </text:list-item>
      </text:list>
      <text:p text:style-name="Horizontal_20_Line"/>
      <text:h text:style-name="Heading_20_2" text:outline-level="2"><text:span text:style-name="Strong_20_Emphasis">9️⃣ fork with exec (run external command)</text:span></text:h>
      <text:p text:style-name="Text_20_body">Write a program where:</text:p>
      <text:list xml:id="list1284109763" text:style-name="L9">
        <text:list-item>
          <text:p text:style-name="P9">Parent creates a child using <text:span text:style-name="Source_20_Text">fork()</text:span>.</text:p>
        </text:list-item>
        <text:list-item>
          <text:p text:style-name="P9">Child executes <text:span text:style-name="Source_20_Text">ls</text:span> command using an exec API.</text:p>
        </text:list-item>
        <text:list-item>
          <text:p text:style-name="P9">Parent waits for child completion.</text:p>
        </text:list-item>
      </text:list>
      <text:p text:style-name="Horizontal_20_Line"/>
      <text:h text:style-name="Heading_20_2" text:outline-level="2">🔟 Multiple children with waitpid**</text:h>
      <text:p text:style-name="Text_20_body">Write a program where:</text:p>
      <text:list xml:id="list2097246450" text:style-name="L10">
        <text:list-item>
          <text:p text:style-name="P10">Parent creates 3 child processes.</text:p>
        </text:list-item>
        <text:list-item>
          <text:p text:style-name="P10">Each child prints its PID.</text:p>
        </text:list-item>
        <text:list-item>
          <text:p text:style-name="P10">Parent waits for a specific child using <text:span text:style-name="Source_20_Text">waitpid()</text:span>.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0T08:43:22.221885398</meta:creation-date>
    <dc:date>2026-02-10T08:44:33.495307736</dc:date>
    <meta:editing-duration>PT1M12S</meta:editing-duration>
    <meta:editing-cycles>1</meta:editing-cycles>
    <meta:document-statistic meta:table-count="0" meta:image-count="0" meta:object-count="0" meta:page-count="3" meta:paragraph-count="47" meta:word-count="327" meta:character-count="1834" meta:non-whitespace-character-count="1583"/>
    <meta:generator>LibreOffice/7.3.7.2$Linux_X86_64 LibreOffice_project/30$Build-2</meta:generator>
  </office:meta>
</office:document-meta>
</file>