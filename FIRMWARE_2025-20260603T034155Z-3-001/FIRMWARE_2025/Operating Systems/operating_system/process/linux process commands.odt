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32cm" table:align="left"/>
    </style:style>
    <style:style style:name="Table1.A" style:family="table-column">
      <style:table-column-properties style:column-width="2.118cm"/>
    </style:style>
    <style:style style:name="Table1.B" style:family="table-column">
      <style:table-column-properties style:column-width="4.41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🔹 What is a Process </text:h>
      <text:p text:style-name="Text_20_body">A <text:span text:style-name="Strong_20_Emphasis">process</text:span> is a program in execution.<text:line-break/>Each process has:</text:p>
      <text:list xml:id="list1569652261" text:style-name="L1">
        <text:list-item>
          <text:p text:style-name="P3"><text:span text:style-name="Strong_20_Emphasis">PID</text:span> (Process ID)</text:p>
        </text:list-item>
        <text:list-item>
          <text:p text:style-name="P3"><text:span text:style-name="Strong_20_Emphasis">PPID</text:span> (Parent PID)</text:p>
        </text:list-item>
        <text:list-item>
          <text:p text:style-name="P3">State (Running, Sleeping, Zombie, etc.)</text:p>
        </text:list-item>
      </text:list>
      <text:p text:style-name="Horizontal_20_Line"/>
      <text:h text:style-name="Heading_20_2" text:outline-level="2">🔹 Basic Process Viewing Commands</text:h>
      <text:h text:style-name="Heading_20_3" text:outline-level="3">1️⃣ <text:span text:style-name="Source_20_Text">ps</text:span> – Process Status</text:h>
      <text:p text:style-name="Text_20_body">Displays current running processes.</text:p>
      <text:p text:style-name="P2"><text:span text:style-name="Source_20_Text">ps</text:span></text:p>
      <text:p text:style-name="Text_20_body">Common useful options:</text:p>
      <text:p text:style-name="P1"><text:span text:style-name="Source_20_Text">ps -e <text:s text:c="7"/># All processes</text:span></text:p>
      <text:p text:style-name="P1"><text:span text:style-name="Source_20_Text">ps -f <text:s text:c="7"/># Full format</text:span></text:p>
      <text:p text:style-name="P1"><text:span text:style-name="Source_20_Text">ps -ef <text:s text:c="6"/># Most commonly used</text:span></text:p>
      <text:p text:style-name="P2"><text:span text:style-name="Source_20_Text">ps aux <text:s text:c="6"/># BSD style (very popular)</text:span></text:p>
      <text:p text:style-name="Text_20_body">Example:</text:p>
      <text:p text:style-name="P2"><text:span text:style-name="Source_20_Text">ps -ef | grep ssh</text:span></text:p>
      <text:p text:style-name="Horizontal_20_Line"/>
      <text:h text:style-name="Heading_20_3" text:outline-level="3">2️⃣ <text:span text:style-name="Source_20_Text">top</text:span> – Real-Time Process Monitor</text:h>
      <text:p text:style-name="Text_20_body">Shows live CPU, memory usage.</text:p>
      <text:p text:style-name="P2"><text:span text:style-name="Source_20_Text">top</text:span></text:p>
      <text:p text:style-name="Text_20_body">Key shortcuts inside <text:span text:style-name="Source_20_Text">top</text:span>:</text:p>
      <text:list xml:id="list866233226" text:style-name="L2">
        <text:list-item>
          <text:p text:style-name="P4"><text:span text:style-name="Source_20_Text">P</text:span> → Sort by CPU</text:p>
        </text:list-item>
        <text:list-item>
          <text:p text:style-name="P4"><text:span text:style-name="Source_20_Text">M</text:span> → Sort by Memory</text:p>
        </text:list-item>
        <text:list-item>
          <text:p text:style-name="P4"><text:span text:style-name="Source_20_Text">k</text:span> → Kill a process</text:p>
        </text:list-item>
        <text:list-item>
          <text:p text:style-name="P4"><text:span text:style-name="Source_20_Text">q</text:span> → Quit</text:p>
        </text:list-item>
      </text:list>
      <text:p text:style-name="Horizontal_20_Line"/>
      <text:h text:style-name="Heading_20_3" text:outline-level="3">3️⃣ <text:span text:style-name="Source_20_Text">htop</text:span> (Advanced <text:span text:style-name="Source_20_Text">top</text:span>)</text:h>
      <text:p text:style-name="Text_20_body">Interactive and colorful (needs installation).</text:p>
      <text:p text:style-name="P2"><text:span text:style-name="Source_20_Text">htop</text:span></text:p>
      <text:p text:style-name="Text_20_body"><text:soft-page-break/>👍 Much better for debugging performance issues.</text:p>
      <text:p text:style-name="Horizontal_20_Line"/>
      <text:h text:style-name="Heading_20_2" text:outline-level="2">🔹 Process Control Commands</text:h>
      <text:h text:style-name="Heading_20_3" text:outline-level="3">4️⃣ <text:span text:style-name="Source_20_Text">kill</text:span> – Send Signal to Process</text:h>
      <text:p text:style-name="Text_20_body">Used to terminate or signal a process.</text:p>
      <text:p text:style-name="P2"><text:span text:style-name="Source_20_Text">kill PID</text:span></text:p>
      <text:p text:style-name="Text_20_body">Common signals:</text:p>
      <text:p text:style-name="P1"><text:span text:style-name="Source_20_Text">kill -9 PID <text:s text:c="4"/># Force kill (SIGKILL)</text:span></text:p>
      <text:p text:style-name="P2"><text:span text:style-name="Source_20_Text">kill -15 PID <text:s text:c="3"/># Graceful kill (SIGTERM)</text:span></text:p>
      <text:p text:style-name="Horizontal_20_Line"/>
      <text:h text:style-name="Heading_20_3" text:outline-level="3">5️⃣ <text:span text:style-name="Source_20_Text">pkill</text:span> – Kill by Process Name</text:h>
      <text:p text:style-name="P2"><text:span text:style-name="Source_20_Text">pkill firefox</text:span></text:p>
      <text:p text:style-name="Horizontal_20_Line"/>
      <text:h text:style-name="Heading_20_3" text:outline-level="3">6️⃣ <text:span text:style-name="Source_20_Text">killall</text:span> – Kill All Instances</text:h>
      <text:p text:style-name="P2"><text:span text:style-name="Source_20_Text">killall chrome</text:span></text:p>
      <text:p text:style-name="Horizontal_20_Line"/>
      <text:h text:style-name="Heading_20_2" text:outline-level="2">🔹 Background &amp; Foreground Control</text:h>
      <text:h text:style-name="Heading_20_3" text:outline-level="3">7️⃣ <text:span text:style-name="Source_20_Text">&amp;</text:span> – Run Process in Background</text:h>
      <text:p text:style-name="P2"><text:span text:style-name="Source_20_Text">./a.out &amp;</text:span></text:p>
      <text:p text:style-name="Horizontal_20_Line"/>
      <text:h text:style-name="Heading_20_3" text:outline-level="3">8️⃣ <text:span text:style-name="Source_20_Text">jobs</text:span> – List Background Jobs</text:h>
      <text:p text:style-name="P2"><text:span text:style-name="Source_20_Text">jobs</text:span></text:p>
      <text:p text:style-name="Horizontal_20_Line"/>
      <text:h text:style-name="Heading_20_3" text:outline-level="3">9️⃣ <text:span text:style-name="Source_20_Text">fg</text:span> – Bring to Foreground</text:h>
      <text:p text:style-name="P2"><text:span text:style-name="Source_20_Text">fg %1</text:span></text:p>
      <text:p text:style-name="Horizontal_20_Line"/>
      <text:h text:style-name="Heading_20_3" text:outline-level="3">🔟 <text:span text:style-name="Source_20_Text">bg</text:span> – Resume in Background</text:h>
      <text:p text:style-name="P2"><text:span text:style-name="Source_20_Text">bg %1</text:span></text:p>
      <text:p text:style-name="Horizontal_20_Line"/>
      <text:h text:style-name="Heading_20_2" text:outline-level="2"><text:soft-page-break/>🔹 Process Identification</text:h>
      <text:h text:style-name="Heading_20_3" text:outline-level="3">1️⃣1️⃣ <text:span text:style-name="Source_20_Text">pidof</text:span> – Get PID of a Program</text:h>
      <text:p text:style-name="P2"><text:span text:style-name="Source_20_Text">pidof sshd</text:span></text:p>
      <text:p text:style-name="Horizontal_20_Line"/>
      <text:h text:style-name="Heading_20_3" text:outline-level="3">1️⃣2️⃣ <text:span text:style-name="Source_20_Text">pgrep</text:span> – Search Process by Name</text:h>
      <text:p text:style-name="P2"><text:span text:style-name="Source_20_Text">pgrep nginx</text:span></text:p>
      <text:p text:style-name="Horizontal_20_Line"/>
      <text:h text:style-name="Heading_20_2" text:outline-level="2">🔹 Process Priority &amp; Scheduling</text:h>
      <text:h text:style-name="Heading_20_3" text:outline-level="3">1️⃣3️⃣ <text:span text:style-name="Source_20_Text">nice</text:span> – Start Process with Priority</text:h>
      <text:p text:style-name="P2"><text:span text:style-name="Source_20_Text">nice -n 10 ./app</text:span></text:p>
      <text:p text:style-name="Text_20_body">Range:</text:p>
      <text:list xml:id="list78940168" text:style-name="L3">
        <text:list-item>
          <text:p text:style-name="P5"><text:span text:style-name="Source_20_Text">-20</text:span> → Highest priority</text:p>
        </text:list-item>
        <text:list-item>
          <text:p text:style-name="P5"><text:span text:style-name="Source_20_Text">19</text:span> → Lowest priority</text:p>
        </text:list-item>
      </text:list>
      <text:p text:style-name="Horizontal_20_Line"/>
      <text:h text:style-name="Heading_20_3" text:outline-level="3">1️⃣4️⃣ <text:span text:style-name="Source_20_Text">renice</text:span> – Change Priority of Running Process</text:h>
      <text:p text:style-name="P2"><text:span text:style-name="Source_20_Text">renice -5 -p PID</text:span></text:p>
      <text:p text:style-name="Horizontal_20_Line"/>
      <text:h text:style-name="Heading_20_2" text:outline-level="2">🔹 Process Tree &amp; Hierarchy</text:h>
      <text:h text:style-name="Heading_20_3" text:outline-level="3">1️⃣5️⃣ <text:span text:style-name="Source_20_Text">pstree</text:span> – Show Parent-Child Relationship</text:h>
      <text:p text:style-name="P1"><text:span text:style-name="Source_20_Text">pstree</text:span></text:p>
      <text:p text:style-name="P2"><text:span text:style-name="Source_20_Text">pstree -p</text:span></text:p>
      <text:p text:style-name="Text_20_body">Very useful for <text:span text:style-name="Strong_20_Emphasis">fork()</text:span> understanding.</text:p>
      <text:p text:style-name="Horizontal_20_Line"/>
      <text:h text:style-name="Heading_20_2" text:outline-level="2">🔹 Process State &amp; System Load</text:h>
      <text:h text:style-name="Heading_20_3" text:outline-level="3">1️⃣6️⃣ <text:span text:style-name="Source_20_Text">uptime</text:span></text:h>
      <text:p text:style-name="Text_20_body">Shows:</text:p>
      <text:list xml:id="list3040101739" text:style-name="L4">
        <text:list-item>
          <text:p text:style-name="P6">System running time</text:p>
        </text:list-item>
        <text:list-item>
          <text:p text:style-name="P6">Load average</text:p>
        </text:list-item>
      </text:list>
      <text:p text:style-name="P2"><text:soft-page-break/><text:span text:style-name="Source_20_Text">uptime</text:span></text:p>
      <text:p text:style-name="Horizontal_20_Line"/>
      <text:h text:style-name="Heading_20_3" text:outline-level="3">1️⃣7️⃣ <text:span text:style-name="Source_20_Text">watch</text:span></text:h>
      <text:p text:style-name="Text_20_body">Run command repeatedly.</text:p>
      <text:p text:style-name="P2"><text:span text:style-name="Source_20_Text">watch ps -ef</text:span></text:p>
      <text:p text:style-name="Horizontal_20_Line"/>
      <text:h text:style-name="Heading_20_2" text:outline-level="2">🔹 File &amp; Process Relationship</text:h>
      <text:h text:style-name="Heading_20_3" text:outline-level="3">1️⃣8️⃣ <text:span text:style-name="Source_20_Text">lsof</text:span> – List Open Files by Process</text:h>
      <text:p text:style-name="P1"><text:span text:style-name="Source_20_Text">lsof -p PID</text:span></text:p>
      <text:p text:style-name="P2"><text:span text:style-name="Source_20_Text">lsof -i :8080</text:span></text:p>
      <text:p text:style-name="Text_20_body">🔥 Great for debugging port issues.</text:p>
      <text:p text:style-name="Horizontal_20_Line"/>
      <text:h text:style-name="Heading_20_2" text:outline-level="2">🔹 Advanced / Debugging Commands</text:h>
      <text:h text:style-name="Heading_20_3" text:outline-level="3">1️⃣9️⃣ <text:span text:style-name="Source_20_Text">strace</text:span> – System Call Trace</text:h>
      <text:p text:style-name="P1"><text:span text:style-name="Source_20_Text">strace ./a.out</text:span></text:p>
      <text:p text:style-name="P2"><text:span text:style-name="Source_20_Text">strace -p PID</text:span></text:p>
      <text:p text:style-name="Text_20_body">Used heavily in <text:span text:style-name="Strong_20_Emphasis">Linux debugging</text:span>.</text:p>
      <text:p text:style-name="Horizontal_20_Line"/>
      <text:h text:style-name="Heading_20_3" text:outline-level="3">2️⃣0️⃣ <text:span text:style-name="Source_20_Text">time</text:span> – Execution Time of Process</text:h>
      <text:p text:style-name="P2"><text:span text:style-name="Source_20_Text">time ./program</text:span></text:p>
      <text:p text:style-name="Horizontal_20_Line"/>
      <text:h text:style-name="Heading_20_2" text:outline-level="2">🔹 Zombie &amp; Orphan Process Detection</text:h>
      <text:p text:style-name="P2"><text:span text:style-name="Source_20_Text">ps -el | grep Z</text:span></text:p>
      <text:p text:style-name="Text_20_body"><text:span text:style-name="Source_20_Text">Z</text:span> → Zombie process</text:p>
      <text:p text:style-name="Horizontal_20_Line"/>
      <text:h text:style-name="Heading_20_2" text:outline-level="2">🔹 Summary Table (Quick Revision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ps</text:p>
          </table:table-cell>
          <table:table-cell table:style-name="Table1.A1" office:value-type="string">
            <text:p text:style-name="Table_20_Contents">Process status</text:p>
          </table:table-cell>
        </table:table-row>
        <table:table-row>
          <table:table-cell table:style-name="Table1.A1" office:value-type="string">
            <text:p text:style-name="Table_20_Contents">top / htop</text:p>
          </table:table-cell>
          <table:table-cell table:style-name="Table1.A1" office:value-type="string">
            <text:p text:style-name="Table_20_Contents">Live process monitor</text:p>
          </table:table-cell>
        </table:table-row>
        <text:soft-page-break/>
        <table:table-row>
          <table:table-cell table:style-name="Table1.A1" office:value-type="string">
            <text:p text:style-name="Table_20_Contents">kill</text:p>
          </table:table-cell>
          <table:table-cell table:style-name="Table1.A1" office:value-type="string">
            <text:p text:style-name="Table_20_Contents">Send signal</text:p>
          </table:table-cell>
        </table:table-row>
        <table:table-row>
          <table:table-cell table:style-name="Table1.A1" office:value-type="string">
            <text:p text:style-name="Table_20_Contents">pkill</text:p>
          </table:table-cell>
          <table:table-cell table:style-name="Table1.A1" office:value-type="string">
            <text:p text:style-name="Table_20_Contents">Kill by name</text:p>
          </table:table-cell>
        </table:table-row>
        <table:table-row>
          <table:table-cell table:style-name="Table1.A1" office:value-type="string">
            <text:p text:style-name="Table_20_Contents">jobs</text:p>
          </table:table-cell>
          <table:table-cell table:style-name="Table1.A1" office:value-type="string">
            <text:p text:style-name="Table_20_Contents">Background jobs</text:p>
          </table:table-cell>
        </table:table-row>
        <table:table-row>
          <table:table-cell table:style-name="Table1.A1" office:value-type="string">
            <text:p text:style-name="Table_20_Contents">fg / bg</text:p>
          </table:table-cell>
          <table:table-cell table:style-name="Table1.A1" office:value-type="string">
            <text:p text:style-name="Table_20_Contents">Foreground/Background</text:p>
          </table:table-cell>
        </table:table-row>
        <table:table-row>
          <table:table-cell table:style-name="Table1.A1" office:value-type="string">
            <text:p text:style-name="Table_20_Contents">nice</text:p>
          </table:table-cell>
          <table:table-cell table:style-name="Table1.A1" office:value-type="string">
            <text:p text:style-name="Table_20_Contents">Set priority</text:p>
          </table:table-cell>
        </table:table-row>
        <table:table-row>
          <table:table-cell table:style-name="Table1.A1" office:value-type="string">
            <text:p text:style-name="Table_20_Contents">renice</text:p>
          </table:table-cell>
          <table:table-cell table:style-name="Table1.A1" office:value-type="string">
            <text:p text:style-name="Table_20_Contents">Change priority</text:p>
          </table:table-cell>
        </table:table-row>
        <table:table-row>
          <table:table-cell table:style-name="Table1.A1" office:value-type="string">
            <text:p text:style-name="Table_20_Contents">pstree</text:p>
          </table:table-cell>
          <table:table-cell table:style-name="Table1.A1" office:value-type="string">
            <text:p text:style-name="Table_20_Contents">Process hierarchy</text:p>
          </table:table-cell>
        </table:table-row>
        <table:table-row>
          <table:table-cell table:style-name="Table1.A1" office:value-type="string">
            <text:p text:style-name="Table_20_Contents">pidof</text:p>
          </table:table-cell>
          <table:table-cell table:style-name="Table1.A1" office:value-type="string">
            <text:p text:style-name="Table_20_Contents">Get PID</text:p>
          </table:table-cell>
        </table:table-row>
        <table:table-row>
          <table:table-cell table:style-name="Table1.A1" office:value-type="string">
            <text:p text:style-name="Table_20_Contents">lsof</text:p>
          </table:table-cell>
          <table:table-cell table:style-name="Table1.A1" office:value-type="string">
            <text:p text:style-name="Table_20_Contents">Open files</text:p>
          </table:table-cell>
        </table:table-row>
        <table:table-row>
          <table:table-cell table:style-name="Table1.A1" office:value-type="string">
            <text:p text:style-name="Table_20_Contents">strace</text:p>
          </table:table-cell>
          <table:table-cell table:style-name="Table1.A1" office:value-type="string">
            <text:p text:style-name="Table_20_Contents">Syscall trac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11:46:10.950957635</meta:creation-date>
    <dc:date>2026-02-03T13:43:39.401261602</dc:date>
    <meta:editing-duration>PT1H57M29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5" meta:paragraph-count="117" meta:word-count="427" meta:character-count="2324" meta:non-whitespace-character-count="1974"/>
  </office:meta>
</office:document-meta>
</file>