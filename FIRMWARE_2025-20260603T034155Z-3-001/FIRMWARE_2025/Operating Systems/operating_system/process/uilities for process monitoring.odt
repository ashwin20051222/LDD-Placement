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92cm" table:align="left"/>
    </style:style>
    <style:style style:name="Table1.A" style:family="table-column">
      <style:table-column-properties style:column-width="1.478cm"/>
    </style:style>
    <style:style style:name="Table1.B" style:family="table-column">
      <style:table-column-properties style:column-width="2.157cm"/>
    </style:style>
    <style:style style:name="Table1.C" style:family="table-column">
      <style:table-column-properties style:column-width="1.774cm"/>
    </style:style>
    <style:style style:name="Table1.D" style:family="table-column">
      <style:table-column-properties style:column-width="3.794cm"/>
    </style:style>
    <style:style style:name="Table1.E" style:family="table-column">
      <style:table-column-properties style:column-width="3.3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️⃣ <text:span text:style-name="Strong_20_Emphasis">htop</text:span> ⭐ (Most Popular)</text:h>
      <text:p text:style-name="Text_20_body">Interactive, colorful, user-friendly replacement for <text:span text:style-name="Source_20_Text">top</text:span>.</text:p>
      <text:p text:style-name="Text_20_body"><text:span text:style-name="Strong_20_Emphasis">Features</text:span></text:p>
      <text:list xml:id="list935326200" text:style-name="L1">
        <text:list-item>
          <text:p text:style-name="P3">Tree view (parent–child)</text:p>
        </text:list-item>
        <text:list-item>
          <text:p text:style-name="P3">Mouse support</text:p>
        </text:list-item>
        <text:list-item>
          <text:p text:style-name="P3">Kill / renice directly</text:p>
        </text:list-item>
        <text:list-item>
          <text:p text:style-name="P3">Per-core CPU view</text:p>
        </text:list-item>
      </text:list>
      <text:p text:style-name="P1"><text:span text:style-name="Source_20_Text">sudo apt install htop</text:span></text:p>
      <text:p text:style-name="P2"><text:span text:style-name="Source_20_Text">htop</text:span></text:p>
      <text:p text:style-name="Text_20_body">Best for: <text:span text:style-name="Strong_20_Emphasis">Everyday monitoring &amp; teaching</text:span></text:p>
      <text:p text:style-name="Horizontal_20_Line"/>
      <text:h text:style-name="Heading_20_3" text:outline-level="3">2️⃣ <text:span text:style-name="Strong_20_Emphasis">atop</text:span> (Advanced Performance Monitor)</text:h>
      <text:p text:style-name="Text_20_body">Records system performance over time.</text:p>
      <text:p text:style-name="Text_20_body"><text:span text:style-name="Strong_20_Emphasis">Features</text:span></text:p>
      <text:list xml:id="list2017088451" text:style-name="L2">
        <text:list-item>
          <text:p text:style-name="P4">CPU, memory, disk, network</text:p>
        </text:list-item>
        <text:list-item>
          <text:p text:style-name="P4">Historical analysis</text:p>
        </text:list-item>
        <text:list-item>
          <text:p text:style-name="P4">Process-level resource usage</text:p>
        </text:list-item>
      </text:list>
      <text:p text:style-name="P1"><text:span text:style-name="Source_20_Text">sudo apt install atop</text:span></text:p>
      <text:p text:style-name="P2"><text:span text:style-name="Source_20_Text">atop</text:span></text:p>
      <text:p text:style-name="Text_20_body">Replay old logs:</text:p>
      <text:p text:style-name="P2"><text:span text:style-name="Source_20_Text">atop -r /var/log/atop/atop_*</text:span></text:p>
      <text:p text:style-name="Text_20_body">Best for: <text:span text:style-name="Strong_20_Emphasis">Server &amp; production debugging</text:span></text:p>
      <text:p text:style-name="Horizontal_20_Line"/>
      <text:h text:style-name="Heading_20_3" text:outline-level="3">3️⃣ <text:span text:style-name="Strong_20_Emphasis">btop</text:span> ⭐ (Modern Replacement)</text:h>
      <text:p text:style-name="Text_20_body">Super modern, very visual.</text:p>
      <text:p text:style-name="Text_20_body"><text:span text:style-name="Strong_20_Emphasis">Features</text:span></text:p>
      <text:list xml:id="list1860891541" text:style-name="L3">
        <text:list-item>
          <text:p text:style-name="P5">CPU, memory, disk, network in one screen</text:p>
        </text:list-item>
        <text:list-item>
          <text:p text:style-name="P5">Smooth graphs</text:p>
        </text:list-item>
        <text:list-item>
          <text:p text:style-name="P5">Tree process view</text:p>
        </text:list-item>
      </text:list>
      <text:p text:style-name="P1"><text:span text:style-name="Source_20_Text">sudo apt install btop</text:span></text:p>
      <text:p text:style-name="P2"><text:span text:style-name="Source_20_Text">btop</text:span></text:p>
      <text:p text:style-name="Text_20_body">Best for: <text:span text:style-name="Strong_20_Emphasis">Modern Linux desktops</text:span></text:p>
      <text:p text:style-name="Horizontal_20_Line"><text:soft-page-break/></text:p>
      <text:h text:style-name="Heading_20_3" text:outline-level="3">4️⃣ <text:span text:style-name="Strong_20_Emphasis">bashtop</text:span> (Older btop)</text:h>
      <text:p text:style-name="Text_20_body">Written in Bash (slower than btop).</text:p>
      <text:p text:style-name="P2"><text:span text:style-name="Source_20_Text">sudo apt install bashtop</text:span></text:p>
      <text:p text:style-name="Horizontal_20_Line"/>
      <text:h text:style-name="Heading_20_2" text:outline-level="2">🔹 Lightweight / Embedded-Friendly Tools</text:h>
      <text:h text:style-name="Heading_20_3" text:outline-level="3">5️⃣ <text:span text:style-name="Strong_20_Emphasis">top</text:span></text:h>
      <text:p text:style-name="Text_20_body">Default everywhere.</text:p>
      <text:p text:style-name="P2"><text:span text:style-name="Source_20_Text">top</text:span></text:p>
      <text:p text:style-name="Text_20_body">✔ Works on <text:span text:style-name="Strong_20_Emphasis">busybox &amp; embedded Linux</text:span></text:p>
      <text:p text:style-name="Horizontal_20_Line"/>
      <text:h text:style-name="Heading_20_3" text:outline-level="3">6️⃣ <text:span text:style-name="Strong_20_Emphasis">htop-ng</text:span></text:h>
      <text:p text:style-name="Text_20_body">Minimal version of htop.</text:p>
      <text:p text:style-name="Text_20_body">Good for: <text:span text:style-name="Strong_20_Emphasis">Low-memory systems</text:span></text:p>
      <text:p text:style-name="Horizontal_20_Line"/>
      <text:h text:style-name="Heading_20_3" text:outline-level="3">7️⃣ <text:span text:style-name="Strong_20_Emphasis">procps-ng tools</text:span></text:h>
      <text:p text:style-name="Text_20_body">Not interactive but essential:</text:p>
      <text:p text:style-name="P1"><text:span text:style-name="Source_20_Text">vmstat</text:span></text:p>
      <text:p text:style-name="P1"><text:span text:style-name="Source_20_Text">mpstat</text:span></text:p>
      <text:p text:style-name="P2"><text:span text:style-name="Source_20_Text">pidstat</text:span></text:p>
      <text:p text:style-name="Text_20_body">Example:</text:p>
      <text:p text:style-name="P2"><text:span text:style-name="Source_20_Text">pidstat -p PID 1</text:span></text:p>
      <text:p text:style-name="Text_20_body">Used in <text:span text:style-name="Strong_20_Emphasis">performance analysis</text:span>.</text:p>
      <text:p text:style-name="Horizontal_20_Line"/>
      <text:h text:style-name="Heading_20_2" text:outline-level="2">🔹 Tree &amp; Visualization Utilities</text:h>
      <text:h text:style-name="Heading_20_3" text:outline-level="3">8️⃣ <text:span text:style-name="Strong_20_Emphasis">pstree</text:span></text:h>
      <text:p text:style-name="Text_20_body">Shows process hierarchy.</text:p>
      <text:p text:style-name="P2"><text:span text:style-name="Source_20_Text">pstree -p</text:span></text:p>
      <text:p text:style-name="Text_20_body">Perfect for understanding <text:span text:style-name="Strong_20_Emphasis">fork() relationships</text:span>.</text:p>
      <text:p text:style-name="Horizontal_20_Line"/>
      <text:h text:style-name="Heading_20_3" text:outline-level="3"><text:soft-page-break/>9️⃣ <text:span text:style-name="Strong_20_Emphasis">glances</text:span> (All-in-One Dashboard)</text:h>
      <text:p text:style-name="Text_20_body">Python-based system monitor.</text:p>
      <text:p text:style-name="P1"><text:span text:style-name="Source_20_Text">sudo apt install glances</text:span></text:p>
      <text:p text:style-name="P2"><text:span text:style-name="Source_20_Text">glances</text:span></text:p>
      <text:p text:style-name="Text_20_body">Can run as:</text:p>
      <text:list xml:id="list381433738" text:style-name="L4">
        <text:list-item>
          <text:p text:style-name="P6">CLI</text:p>
        </text:list-item>
        <text:list-item>
          <text:p text:style-name="P6">Web UI</text:p>
        </text:list-item>
        <text:list-item>
          <text:p text:style-name="P6">Client-server mode</text:p>
        </text:list-item>
      </text:list>
      <text:p text:style-name="Text_20_body">Best for: <text:span text:style-name="Strong_20_Emphasis">Remote monitoring</text:span></text:p>
      <text:p text:style-name="Horizontal_20_Line"/>
      <text:h text:style-name="Heading_20_2" text:outline-level="2">🔹 Debugging &amp; Advanced Analysis</text:h>
      <text:h text:style-name="Heading_20_3" text:outline-level="3">🔟 <text:span text:style-name="Strong_20_Emphasis">nmon</text:span></text:h>
      <text:p text:style-name="Text_20_body">IBM’s performance tool.</text:p>
      <text:p text:style-name="P1"><text:span text:style-name="Source_20_Text">sudo apt install nmon</text:span></text:p>
      <text:p text:style-name="P2"><text:span text:style-name="Source_20_Text">nmon</text:span></text:p>
      <text:p text:style-name="Text_20_body">Interactive shortcuts:</text:p>
      <text:list xml:id="list1167218751" text:style-name="L5">
        <text:list-item>
          <text:p text:style-name="P7"><text:span text:style-name="Source_20_Text">c</text:span> → CPU</text:p>
        </text:list-item>
        <text:list-item>
          <text:p text:style-name="P7"><text:span text:style-name="Source_20_Text">m</text:span> → Memory</text:p>
        </text:list-item>
        <text:list-item>
          <text:p text:style-name="P7"><text:span text:style-name="Source_20_Text">d</text:span> → Disk</text:p>
        </text:list-item>
      </text:list>
      <text:p text:style-name="Horizontal_20_Line"/>
      <text:h text:style-name="Heading_20_3" text:outline-level="3">1️⃣1️⃣ <text:span text:style-name="Strong_20_Emphasis">perf</text:span></text:h>
      <text:p text:style-name="Text_20_body">Kernel-level performance analysis.</text:p>
      <text:p text:style-name="P1"><text:span text:style-name="Source_20_Text">perf top</text:span></text:p>
      <text:p text:style-name="P2"><text:span text:style-name="Source_20_Text">perf stat ./program</text:span></text:p>
      <text:p text:style-name="Text_20_body">Used for <text:span text:style-name="Strong_20_Emphasis">low-level Linux profiling</text:span>.</text:p>
      <text:p text:style-name="Horizontal_20_Line"/>
      <text:h text:style-name="Heading_20_3" text:outline-level="3">1️⃣2️⃣ <text:span text:style-name="Strong_20_Emphasis">strace</text:span> (Process Behavior)</text:h>
      <text:p text:style-name="Text_20_body">Tracks system calls.</text:p>
      <text:p text:style-name="P2"><text:span text:style-name="Source_20_Text">strace -p PID</text:span></text:p>
      <text:p text:style-name="Text_20_body">Not a monitor—but critical for <text:span text:style-name="Strong_20_Emphasis">process debugging</text:span>.</text:p>
      <text:p text:style-name="Horizontal_20_Line"/>
      <text:h text:style-name="Heading_20_2" text:outline-level="2"><text:soft-page-break/>🔹 Summary Comparison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Interactive</text:p>
            </table:table-cell>
            <table:table-cell table:style-name="Table1.A1" office:value-type="string">
              <text:p text:style-name="Table_20_Heading">Visual</text:p>
            </table:table-cell>
            <table:table-cell table:style-name="Table1.A1" office:value-type="string">
              <text:p text:style-name="Table_20_Heading">Embedded Friendly</text:p>
            </table:table-cell>
            <table:table-cell table:style-name="Table1.A1" office:value-type="string">
              <text:p text:style-name="Table_20_Heading">Best Use</text:p>
            </table:table-cell>
          </table:table-row>
        </table:table-header-rows>
        <table:table-row>
          <table:table-cell table:style-name="Table1.A1" office:value-type="string">
            <text:p text:style-name="Table_20_Contents">htop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Daily use</text:p>
          </table:table-cell>
        </table:table-row>
        <table:table-row>
          <table:table-cell table:style-name="Table1.A1" office:value-type="string">
            <text:p text:style-name="Table_20_Contents">atop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Historical analysis</text:p>
          </table:table-cell>
        </table:table-row>
        <table:table-row>
          <table:table-cell table:style-name="Table1.A1" office:value-type="string">
            <text:p text:style-name="Table_20_Contents">btop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⭐⭐⭐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Modern UI</text:p>
          </table:table-cell>
        </table:table-row>
        <table:table-row>
          <table:table-cell table:style-name="Table1.A1" office:value-type="string">
            <text:p text:style-name="Table_20_Contents">top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Universal</text:p>
          </table:table-cell>
        </table:table-row>
        <table:table-row>
          <table:table-cell table:style-name="Table1.A1" office:value-type="string">
            <text:p text:style-name="Table_20_Contents">glances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Remote</text:p>
          </table:table-cell>
        </table:table-row>
        <table:table-row>
          <table:table-cell table:style-name="Table1.A1" office:value-type="string">
            <text:p text:style-name="Table_20_Contents">nmo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Performance</text:p>
          </table:table-cell>
        </table:table-row>
        <table:table-row>
          <table:table-cell table:style-name="Table1.A1" office:value-type="string">
            <text:p text:style-name="Table_20_Contents">pstre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Process hierarch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1:47:20.309319576</meta:creation-date>
    <dc:date>2026-02-03T11:47:40.588287123</dc:date>
    <meta:editing-duration>PT21S</meta:editing-duration>
    <meta:editing-cycles>1</meta:editing-cycles>
    <meta:document-statistic meta:table-count="1" meta:image-count="0" meta:object-count="0" meta:page-count="4" meta:paragraph-count="122" meta:word-count="331" meta:character-count="1887" meta:non-whitespace-character-count="1696"/>
    <meta:generator>LibreOffice/7.3.7.2$Linux_X86_64 LibreOffice_project/30$Build-2</meta:generator>
  </office:meta>
</office:document-meta>
</file>