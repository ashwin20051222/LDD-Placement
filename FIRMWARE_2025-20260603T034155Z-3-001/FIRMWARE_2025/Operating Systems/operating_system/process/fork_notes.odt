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43cm" table:align="left"/>
    </style:style>
    <style:style style:name="Table1.A" style:family="table-column">
      <style:table-column-properties style:column-width="2.628cm"/>
    </style:style>
    <style:style style:name="Table1.B" style:family="table-column">
      <style:table-column-properties style:column-width="5.41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672cm" table:align="left"/>
    </style:style>
    <style:style style:name="Table2.A" style:family="table-column">
      <style:table-column-properties style:column-width="1.808cm"/>
    </style:style>
    <style:style style:name="Table2.B" style:family="table-column">
      <style:table-column-properties style:column-width="1.86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708cm" table:align="left"/>
    </style:style>
    <style:style style:name="Table3.A" style:family="table-column">
      <style:table-column-properties style:column-width="2.716cm"/>
    </style:style>
    <style:style style:name="Table3.B" style:family="table-column">
      <style:table-column-properties style:column-width="2.99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7.678cm" table:align="left"/>
    </style:style>
    <style:style style:name="Table4.A" style:family="table-column">
      <style:table-column-properties style:column-width="2.542cm"/>
    </style:style>
    <style:style style:name="Table4.B" style:family="table-column">
      <style:table-column-properties style:column-width="5.13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215cm" table:align="left"/>
    </style:style>
    <style:style style:name="Table5.A" style:family="table-column">
      <style:table-column-properties style:column-width="4.87cm"/>
    </style:style>
    <style:style style:name="Table5.B" style:family="table-column">
      <style:table-column-properties style:column-width="2.912cm"/>
    </style:style>
    <style:style style:name="Table5.C" style:family="table-column">
      <style:table-column-properties style:column-width="2.43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002cm" table:align="left"/>
    </style:style>
    <style:style style:name="Table6.A" style:family="table-column">
      <style:table-column-properties style:column-width="3.034cm"/>
    </style:style>
    <style:style style:name="Table6.B" style:family="table-column">
      <style:table-column-properties style:column-width="1.969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>
      <style:paragraph-properties fo:break-before="page"/>
    </style:style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44099080" text:style-name="L1">
        <text:list-item>
          <text:p text:style-name="P4"><text:span text:style-name="Source_20_Text">fork()</text:span></text:p>
        </text:list-item>
        <text:list-item>
          <text:p text:style-name="P4"><text:span text:style-name="Source_20_Text">wait()</text:span></text:p>
        </text:list-item>
        <text:list-item>
          <text:p text:style-name="P4"><text:span text:style-name="Source_20_Text">exit()</text:span></text:p>
        </text:list-item>
        <text:list-item>
          <text:p text:style-name="P4">Multiple <text:span text:style-name="Source_20_Text">fork()</text:span></text:p>
        </text:list-item>
        <text:list-item>
          <text:p text:style-name="P4">Process Tree</text:p>
        </text:list-item>
        <text:list-item>
          <text:p text:style-name="P4">Child Process</text:p>
        </text:list-item>
        <text:list-item>
          <text:p text:style-name="P4">Zombie Process</text:p>
        </text:list-item>
      </text:list>
      <text:p text:style-name="Text_20_body">All concepts follow <text:span text:style-name="Strong_20_Emphasis">POSIX standard (Linux/UNIX/QNX compatible)</text:span>.</text:p>
      <text:p text:style-name="Horizontal_20_Line"/>
      <text:h text:style-name="Heading_20_1" text:outline-level="1">1️⃣ <text:span text:style-name="Source_20_Text">fork()</text:span> System Call</text:h>
      <text:h text:style-name="Heading_20_2" text:outline-level="2">📌 Definition</text:h>
      <text:p text:style-name="Text_20_body"><text:span text:style-name="Source_20_Text">fork()</text:span> is a <text:span text:style-name="Strong_20_Emphasis">system call</text:span> used to create a <text:span text:style-name="Strong_20_Emphasis">new process</text:span> (child process).</text:p>
      <text:p text:style-name="Text_20_body">The new process is almost an exact copy of the calling process (parent).</text:p>
      <text:h text:style-name="Heading_20_2" text:outline-level="2">📌 Header File</text:h>
      <text:p text:style-name="P1"><text:span text:style-name="Source_20_Text">#include &lt;sys/types.h&gt;</text:span></text:p>
      <text:p text:style-name="P2"><text:span text:style-name="Source_20_Text">#include &lt;unistd.h&gt;</text:span></text:p>
      <text:h text:style-name="Heading_20_2" text:outline-level="2">📌 Syntax</text:h>
      <text:p text:style-name="P2"><text:span text:style-name="Source_20_Text">pid_t fork(void);</text:span></text:p>
      <text:h text:style-name="Heading_20_2" text:outline-level="2">📌 Return Valu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eturn Valu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&gt; 0</text:span></text:p>
          </table:table-cell>
          <table:table-cell table:style-name="Table1.A1" office:value-type="string">
            <text:p text:style-name="Table_20_Contents">Returned in parent (child PI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0</text:span></text:p>
          </table:table-cell>
          <table:table-cell table:style-name="Table1.A1" office:value-type="string">
            <text:p text:style-name="Table_20_Contents">Returned in child</text:p>
          </table:table-cell>
        </table:table-row>
        <table:table-row>
          <table:table-cell table:style-name="Table1.A1" office:value-type="string">
            <text:p text:style-name="Table_20_Contents"><text:span text:style-name="Source_20_Text">-1</text:span></text:p>
          </table:table-cell>
          <table:table-cell table:style-name="Table1.A1" office:value-type="string">
            <text:p text:style-name="Table_20_Contents">Error (child not created)</text:p>
          </table:table-cell>
        </table:table-row>
      </table:table>
      <text:p text:style-name="Horizontal_20_Line"/>
      <text:h text:style-name="Heading_20_2" text:outline-level="2">📌 What <text:span text:style-name="Source_20_Text">fork()</text:span> Copies?</text:h>
      <text:p text:style-name="Text_20_body">When fork happens:</text:p>
      <text:list xml:id="list3778220123" text:style-name="L2">
        <text:list-item>
          <text:p text:style-name="P5">Code segment ✅ (shared)</text:p>
        </text:list-item>
        <text:list-item>
          <text:p text:style-name="P5">Heap ✅ (copied)</text:p>
        </text:list-item>
        <text:list-item>
          <text:p text:style-name="P5">Stack ✅ (copied)</text:p>
        </text:list-item>
        <text:list-item>
          <text:p text:style-name="P5"><text:soft-page-break/>File descriptors ✅ (shared reference)</text:p>
        </text:list-item>
        <text:list-item>
          <text:p text:style-name="P5">Variables ✅ (copied)</text:p>
        </text:list-item>
      </text:list>
      <text:p text:style-name="Text_20_body">After fork:</text:p>
      <text:list xml:id="list1813235428" text:style-name="L3">
        <text:list-item>
          <text:p text:style-name="P6">Parent and child run <text:span text:style-name="Strong_20_Emphasis">independently</text:span></text:p>
        </text:list-item>
        <text:list-item>
          <text:p text:style-name="P6">They execute the next instruction after <text:span text:style-name="Source_20_Text">fork()</text:span></text:p>
        </text:list-item>
      </text:list>
      <text:p text:style-name="Horizontal_20_Line"/>
      <text:h text:style-name="Heading_20_2" text:outline-level="2">📌 Simple Example</text:h>
      <text:p text:style-name="P1"><text:span text:style-name="Source_20_Text">#include &lt;stdio.h&gt;</text:span></text:p>
      <text:p text:style-name="P1"><text:span text:style-name="Source_20_Text">#include &lt;unistd.h&gt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 = fork();</text:span></text:p>
      <text:p text:style-name="P1"/>
      <text:p text:style-name="P1"><text:span text:style-name="Source_20_Text"><text:s text:c="4"/>if (pid == 0) {</text:span></text:p>
      <text:p text:style-name="P1"><text:span text:style-name="Source_20_Text"><text:s text:c="8"/>printf("I am Child. PID = %d\n", getpid());</text:span></text:p>
      <text:p text:style-name="P1"><text:span text:style-name="Source_20_Text"><text:s text:c="4"/>} else {</text:span></text:p>
      <text:p text:style-name="P1"><text:span text:style-name="Source_20_Text"><text:s text:c="8"/>printf("I am Parent. PID = %d\n", getpid());</text:span></text:p>
      <text:p text:style-name="P1"><text:span text:style-name="Source_20_Text"><text:s text:c="4"/>}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2️⃣ Child Process</text:h>
      <text:h text:style-name="Heading_20_2" text:outline-level="2">📌 Definition</text:h>
      <text:p text:style-name="Text_20_body">A <text:span text:style-name="Strong_20_Emphasis">child process</text:span> is the new process created by <text:span text:style-name="Source_20_Text">fork()</text:span>.</text:p>
      <text:h text:style-name="Heading_20_2" text:outline-level="2">📌 Characteristics</text:h>
      <text:list xml:id="list3851697849" text:style-name="L4">
        <text:list-item>
          <text:p text:style-name="P7">Has its own PID</text:p>
        </text:list-item>
        <text:list-item>
          <text:p text:style-name="P7">Parent PID stored in <text:span text:style-name="Source_20_Text">getppid()</text:span></text:p>
        </text:list-item>
        <text:list-item>
          <text:p text:style-name="P7">Gets copy of parent memory</text:p>
        </text:list-item>
        <text:list-item>
          <text:p text:style-name="P7">Executes same code after fork</text:p>
        </text:list-item>
      </text:list>
      <text:h text:style-name="Heading_20_2" text:outline-level="2">📌 Example</text:h>
      <text:p text:style-name="P2"><text:span text:style-name="Source_20_Text">printf("PID = %d, PPID = %d\n", getpid(), getppid());</text:span></text:p>
      <text:p text:style-name="Horizontal_20_Line"/>
      <text:h text:style-name="Heading_20_1" text:outline-level="1"><text:soft-page-break/>3️⃣ <text:span text:style-name="Source_20_Text">exit()</text:span> System Call</text:h>
      <text:h text:style-name="Heading_20_2" text:outline-level="2">📌 Definition</text:h>
      <text:p text:style-name="Text_20_body"><text:span text:style-name="Source_20_Text">exit()</text:span> terminates a process and returns status to parent.</text:p>
      <text:h text:style-name="Heading_20_2" text:outline-level="2">📌 Header</text:h>
      <text:p text:style-name="P2"><text:span text:style-name="Source_20_Text">#include &lt;stdlib.h&gt;</text:span></text:p>
      <text:h text:style-name="Heading_20_2" text:outline-level="2">📌 Syntax</text:h>
      <text:p text:style-name="P2"><text:span text:style-name="Source_20_Text">void exit(int status);</text:span></text:p>
      <text:h text:style-name="Heading_20_2" text:outline-level="2">📌 Common Exit Cod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de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Success</text:p>
          </table:table-cell>
        </table:table-row>
        <table:table-row>
          <table:table-cell table:style-name="Table2.A1" office:value-type="string">
            <text:p text:style-name="Table_20_Contents">Non-zero</text:p>
          </table:table-cell>
          <table:table-cell table:style-name="Table2.A1" office:value-type="string">
            <text:p text:style-name="Table_20_Contents">Error</text:p>
          </table:table-cell>
        </table:table-row>
      </table:table>
      <text:p text:style-name="Horizontal_20_Line"/>
      <text:h text:style-name="Heading_20_2" text:outline-level="2">📌 Example</text:h>
      <text:p text:style-name="P1"><text:span text:style-name="Source_20_Text">if (pid == 0) {</text:span></text:p>
      <text:p text:style-name="P1"><text:span text:style-name="Source_20_Text"><text:s text:c="4"/>printf("Child exiting\n");</text:span></text:p>
      <text:p text:style-name="P1"><text:span text:style-name="Source_20_Text"><text:s text:c="4"/>exit(5);</text:span></text:p>
      <text:p text:style-name="P2"><text:span text:style-name="Source_20_Text">}</text:span></text:p>
      <text:p text:style-name="Text_20_body">Child returns status <text:span text:style-name="Source_20_Text">5</text:span> to parent.</text:p>
      <text:p text:style-name="Horizontal_20_Line"/>
      <text:h text:style-name="Heading_20_1" text:outline-level="1">4️⃣ <text:span text:style-name="Source_20_Text">wait()</text:span> System Call</text:h>
      <text:h text:style-name="Heading_20_2" text:outline-level="2">📌 Definition</text:h>
      <text:p text:style-name="Text_20_body"><text:span text:style-name="Source_20_Text">wait()</text:span> makes parent process wait until a child terminates.</text:p>
      <text:h text:style-name="Heading_20_2" text:outline-level="2">📌 Header</text:h>
      <text:p text:style-name="P2"><text:span text:style-name="Source_20_Text">#include &lt;sys/wait.h&gt;</text:span></text:p>
      <text:h text:style-name="Heading_20_2" text:outline-level="2">📌 Syntax</text:h>
      <text:p text:style-name="P2"><text:span text:style-name="Source_20_Text">pid_t wait(int *status);</text:span></text:p>
      <text:h text:style-name="Heading_20_2" text:outline-level="2"><text:soft-page-break/>📌 Why wait is needed?</text:h>
      <text:p text:style-name="Text_20_body">If parent does not wait:</text:p>
      <text:list xml:id="list1284573308" text:style-name="L5">
        <text:list-item>
          <text:p text:style-name="P8">Child becomes <text:span text:style-name="Strong_20_Emphasis">Zombie</text:span></text:p>
        </text:list-item>
      </text:list>
      <text:p text:style-name="Horizontal_20_Line"/>
      <text:h text:style-name="Heading_20_2" text:outline-level="2">📌 Example</text:h>
      <text:p text:style-name="P1"><text:span text:style-name="Source_20_Text">int status;</text:span></text:p>
      <text:p text:style-name="P1"><text:span text:style-name="Source_20_Text">wait(&amp;status);</text:span></text:p>
      <text:p text:style-name="P1"/>
      <text:p text:style-name="P1"><text:span text:style-name="Source_20_Text">if (WIFEXITED(status)) {</text:span></text:p>
      <text:p text:style-name="P1"><text:span text:style-name="Source_20_Text"><text:s text:c="4"/>printf("Child exited with %d\n", WEXITSTATUS(status));</text:span></text:p>
      <text:p text:style-name="P2"><text:span text:style-name="Source_20_Text">}</text:span></text:p>
      <text:p text:style-name="Horizontal_20_Line"/>
      <text:h text:style-name="Heading_20_1" text:outline-level="1">5️⃣ Zombie Process</text:h>
      <text:h text:style-name="Heading_20_2" text:outline-level="2">📌 Definition</text:h>
      <text:p text:style-name="Text_20_body">A <text:span text:style-name="Strong_20_Emphasis">Zombie process</text:span> is a child process that has terminated,<text:line-break/>but its parent has NOT called <text:span text:style-name="Source_20_Text">wait()</text:span> yet.</text:p>
      <text:h text:style-name="Heading_20_2" text:outline-level="2">📌 Why Zombie Occurs?</text:h>
      <text:list xml:id="list1548095757" text:style-name="L6">
        <text:list-item>
          <text:p text:style-name="P9">Child finishes</text:p>
        </text:list-item>
        <text:list-item>
          <text:p text:style-name="P9">Kernel stores exit status</text:p>
        </text:list-item>
        <text:list-item>
          <text:p text:style-name="P9">Parent does NOT call <text:span text:style-name="Source_20_Text">wait()</text:span></text:p>
        </text:list-item>
        <text:list-item>
          <text:p text:style-name="P9">Entry remains in process table</text:p>
        </text:list-item>
      </text:list>
      <text:p text:style-name="Horizontal_20_Line"/>
      <text:h text:style-name="Heading_20_2" text:outline-level="2">📌 Zombie State Diagram</text:h>
      <text:p text:style-name="P2"><text:span text:style-name="Source_20_Text">Child finishes → EXITED → (No wait) → ZOMBIE</text:span></text:p>
      <text:p text:style-name="Horizontal_20_Line"/>
      <text:h text:style-name="Heading_20_2" text:outline-level="2">📌 Example Creating Zombie</text:h>
      <text:p text:style-name="P1"><text:span text:style-name="Source_20_Text">if (fork() == 0) {</text:span></text:p>
      <text:p text:style-name="P1"><text:span text:style-name="Source_20_Text"><text:s text:c="4"/>printf("Child exiting\n");</text:span></text:p>
      <text:p text:style-name="P1"><text:span text:style-name="Source_20_Text"><text:s text:c="4"/>exit(0);</text:span></text:p>
      <text:p text:style-name="P1"><text:span text:style-name="Source_20_Text">} else {</text:span></text:p>
      <text:p text:style-name="P1"><text:span text:style-name="Source_20_Text"><text:s text:c="4"/>sleep(10); <text:s text:c="2"/>// Parent sleeping, not waiting</text:span></text:p>
      <text:p text:style-name="P2"><text:span text:style-name="Source_20_Text">}</text:span></text:p>
      <text:p text:style-name="Text_20_body">Check using:</text:p>
      <text:p text:style-name="P2"><text:soft-page-break/><text:span text:style-name="Source_20_Text">ps -l</text:span></text:p>
      <text:p text:style-name="Text_20_body">State shows: <text:span text:style-name="Source_20_Text">Z</text:span></text:p>
      <text:p text:style-name="Horizontal_20_Line"/>
      <text:h text:style-name="Heading_20_2" text:outline-level="2">📌 How to Prevent Zombie?</text:h>
      <text:p text:style-name="Text_20_body">✔ Use <text:span text:style-name="Source_20_Text">wait()</text:span><text:line-break/>✔ Use <text:span text:style-name="Source_20_Text">waitpid()</text:span><text:line-break/>✔ Handle SIGCHLD signal</text:p>
      <text:p text:style-name="Horizontal_20_Line"/>
      <text:h text:style-name="Heading_20_1" text:outline-level="1">6️⃣ Multiple <text:span text:style-name="Source_20_Text">fork()</text:span></text:h>
      <text:p text:style-name="Text_20_body">Each <text:span text:style-name="Source_20_Text">fork()</text:span> doubles the number of processes.</text:p>
      <text:p text:style-name="Horizontal_20_Line"/>
      <text:h text:style-name="Heading_20_2" text:outline-level="2">📌 Rule</text:h>
      <text:p text:style-name="Text_20_body">If there are <text:span text:style-name="Source_20_Text">n</text:span> forks:</text:p>
      <text:p text:style-name="P2"><text:span text:style-name="Source_20_Text">Total processes = 2^n</text:span></text:p>
      <text:p text:style-name="Horizontal_20_Line"/>
      <text:h text:style-name="Heading_20_2" text:outline-level="2">📌 Example 1</text:h>
      <text:p text:style-name="P1"><text:span text:style-name="Source_20_Text">fork();</text:span></text:p>
      <text:p text:style-name="P2"><text:span text:style-name="Source_20_Text">fork();</text:span></text:p>
      <text:h text:style-name="Heading_20_3" text:outline-level="3">Process Count</text:h>
      <text:p text:style-name="Text_20_body">2 forks →<text:line-break/>2² = 4 processes</text:p>
      <text:p text:style-name="Horizontal_20_Line"/>
      <text:h text:style-name="Heading_20_2" text:outline-level="2">📌 Example 2</text:h>
      <text:p text:style-name="P1"><text:span text:style-name="Source_20_Text">fork();</text:span></text:p>
      <text:p text:style-name="P1"><text:span text:style-name="Source_20_Text">fork();</text:span></text:p>
      <text:p text:style-name="P2"><text:span text:style-name="Source_20_Text">fork();</text:span></text:p>
      <text:p text:style-name="Text_20_body">3 forks →<text:line-break/>2³ = 8 processes</text:p>
      <text:p text:style-name="Horizontal_20_Line"/>
      <text:h text:style-name="Heading_20_2" text:outline-level="2"><text:soft-page-break/>📌 Process Creation Tab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ork Number</text:p>
            </table:table-cell>
            <table:table-cell table:style-name="Table3.A1" office:value-type="string">
              <text:p text:style-name="Table_20_Heading">Total Processes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8</text:p>
          </table:table-cell>
        </table:table-row>
        <table:table-row>
          <table:table-cell table:style-name="Table3.A1" office:value-type="string">
            <text:p text:style-name="Table_20_Contents">n</text:p>
          </table:table-cell>
          <table:table-cell table:style-name="Table3.A1" office:value-type="string">
            <text:p text:style-name="Table_20_Contents">2^n</text:p>
          </table:table-cell>
        </table:table-row>
      </table:table>
      <text:p text:style-name="Horizontal_20_Line"/>
      <text:h text:style-name="Heading_20_2" text:outline-level="2">📌 Important Concept</text:h>
      <text:p text:style-name="Text_20_body">Each process created continues executing remaining fork statements.</text:p>
      <text:p text:style-name="Text_20_body">That is why process count increases exponentially.</text:p>
      <text:p text:style-name="Horizontal_20_Line"/>
      <text:h text:style-name="Heading_20_1" text:outline-level="1">7️⃣ Process Tree</text:h>
      <text:h text:style-name="Heading_20_2" text:outline-level="2">📌 Definition</text:h>
      <text:p text:style-name="Text_20_body">A <text:span text:style-name="Strong_20_Emphasis">Process Tree</text:span> shows parent-child relationships between processes.</text:p>
      <text:p text:style-name="Horizontal_20_Line"/>
      <text:h text:style-name="Heading_20_2" text:outline-level="2">📌 Example Code</text:h>
      <text:p text:style-name="P1"><text:span text:style-name="Source_20_Text">fork();</text:span></text:p>
      <text:p text:style-name="P2"><text:span text:style-name="Source_20_Text">fork();</text:span></text:p>
      <text:h text:style-name="Heading_20_3" text:outline-level="3">Process Tree Structure</text:h>
      <text:p text:style-name="P1"><text:span text:style-name="Source_20_Text"><text:s text:c="8"/>P0</text:span></text:p>
      <text:p text:style-name="P1"><text:span text:style-name="Source_20_Text"><text:s text:c="7"/>/ <text:s/>\</text:span></text:p>
      <text:p text:style-name="P1"><text:span text:style-name="Source_20_Text"><text:s text:c="5"/>P1 <text:s text:c="3"/>P2</text:span></text:p>
      <text:p text:style-name="P1"><text:span text:style-name="Source_20_Text"><text:s text:c="6"/>\</text:span></text:p>
      <text:p text:style-name="P2"><text:span text:style-name="Source_20_Text"><text:s text:c="7"/>P3</text:span></text:p>
      <text:p text:style-name="Text_20_body">Total = 4 processes</text:p>
      <text:p text:style-name="Horizontal_20_Line"/>
      <text:h text:style-name="Heading_20_2" text:outline-level="2">📌 Real System Example</text:h>
      <text:p text:style-name="Text_20_body">On Linux, process tree starts from:</text:p>
      <text:p text:style-name="Text_20_body">👉 <text:span text:style-name="Strong_20_Emphasis"><text:span text:style-name="Source_20_Text">systemd</text:span></text:span><text:line-break/>systemd</text:p>
      <text:p text:style-name="Text_20_body">Older systems used:</text:p>
      <text:p text:style-name="Text_20_body"><text:soft-page-break/>👉 <text:span text:style-name="Strong_20_Emphasis"><text:span text:style-name="Source_20_Text">init</text:span></text:span><text:line-break/>init</text:p>
      <text:p text:style-name="Horizontal_20_Line"/>
      <text:h text:style-name="Heading_20_2" text:outline-level="2">📌 View Process Tree</text:h>
      <text:p text:style-name="P2"><text:span text:style-name="Source_20_Text">pstree</text:span></text:p>
      <text:p text:style-name="Horizontal_20_Line"/>
      <text:h text:style-name="Heading_20_1" text:outline-level="1">8️⃣ <text:span text:style-name="Source_20_Text">waitpid()</text:span> (Advanced Control)</text:h>
      <text:h text:style-name="Heading_20_2" text:outline-level="2">📌 Syntax</text:h>
      <text:p text:style-name="P2"><text:span text:style-name="Source_20_Text">pid_t waitpid(pid_t pid, int *status, int options);</text:span></text:p>
      <text:h text:style-name="Heading_20_2" text:outline-level="2">📌 Advantage</text:h>
      <text:list xml:id="list2245721070" text:style-name="L7">
        <text:list-item>
          <text:p text:style-name="P10">Wait for specific child</text:p>
        </text:list-item>
        <text:list-item>
          <text:p text:style-name="P10">Non-blocking wait possible</text:p>
        </text:list-item>
      </text:list>
      <text:p text:style-name="Text_20_body">Example:</text:p>
      <text:p text:style-name="P2"><text:span text:style-name="Source_20_Text">waitpid(pid, &amp;status, 0);</text:span></text:p>
      <text:p text:style-name="Horizontal_20_Line"/>
      <text:h text:style-name="Heading_20_1" text:outline-level="1">9️⃣ Orphan Process (Related Concept)</text:h>
      <text:h text:style-name="Heading_20_2" text:outline-level="2">📌 Definition</text:h>
      <text:p text:style-name="Text_20_body">If parent terminates before child:</text:p>
      <text:p text:style-name="Text_20_body">Child becomes <text:span text:style-name="Strong_20_Emphasis">Orphan</text:span>.</text:p>
      <text:p text:style-name="Text_20_body">It is adopted by:</text:p>
      <text:p text:style-name="Text_20_body">👉 <text:span text:style-name="Strong_20_Emphasis"><text:span text:style-name="Source_20_Text">systemd</text:span></text:span><text:line-break/>systemd</text:p>
      <text:p text:style-name="Horizontal_20_Line"/>
      <text:h text:style-name="Heading_20_1" text:outline-level="1">🔟 Full Example Program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sys/wait.h&gt;</text:span></text:p>
      <text:p text:style-name="P1"/>
      <text:p text:style-name="P1"><text:soft-page-break/><text:span text:style-name="Source_20_Text">int main() {</text:span></text:p>
      <text:p text:style-name="P1"><text:span text:style-name="Source_20_Text"><text:s text:c="4"/>pid_t pid = fork();</text:span></text:p>
      <text:p text:style-name="P1"/>
      <text:p text:style-name="P1"><text:span text:style-name="Source_20_Text"><text:s text:c="4"/>if (pid == 0) {</text:span></text:p>
      <text:p text:style-name="P1"><text:span text:style-name="Source_20_Text"><text:s text:c="8"/>printf("Child PID: %d\n", getpid());</text:span></text:p>
      <text:p text:style-name="P1"><text:span text:style-name="Source_20_Text"><text:s text:c="8"/>exit(10);</text:span></text:p>
      <text:p text:style-name="P1"><text:span text:style-name="Source_20_Text"><text:s text:c="4"/>} else {</text:span></text:p>
      <text:p text:style-name="P1"><text:span text:style-name="Source_20_Text"><text:s text:c="8"/>int status;</text:span></text:p>
      <text:p text:style-name="P1"><text:span text:style-name="Source_20_Text"><text:s text:c="8"/>wait(&amp;status);</text:span></text:p>
      <text:p text:style-name="P1"><text:span text:style-name="Source_20_Text"><text:s text:c="8"/>printf("Parent: Child exited with %d\n", WEXITSTATUS(status)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🔁 Complete Process Lifecycle</text:h>
      <text:p text:style-name="P1"><text:span text:style-name="Source_20_Text">Parent runs</text:span></text:p>
      <text:p text:style-name="P1"><text:span text:style-name="Source_20_Text"><text:s text:c="3"/>↓</text:span></text:p>
      <text:p text:style-name="P1"><text:span text:style-name="Source_20_Text">fork()</text:span></text:p>
      <text:p text:style-name="P1"><text:span text:style-name="Source_20_Text"><text:s text:c="3"/>↓</text:span></text:p>
      <text:p text:style-name="P1"><text:span text:style-name="Source_20_Text">Child created</text:span></text:p>
      <text:p text:style-name="P1"><text:span text:style-name="Source_20_Text"><text:s text:c="3"/>↓</text:span></text:p>
      <text:p text:style-name="P1"><text:span text:style-name="Source_20_Text">Child executes</text:span></text:p>
      <text:p text:style-name="P1"><text:span text:style-name="Source_20_Text"><text:s text:c="3"/>↓</text:span></text:p>
      <text:p text:style-name="P1"><text:span text:style-name="Source_20_Text">Child calls exit()</text:span></text:p>
      <text:p text:style-name="P1"><text:span text:style-name="Source_20_Text"><text:s text:c="3"/>↓</text:span></text:p>
      <text:p text:style-name="P1"><text:span text:style-name="Source_20_Text">Kernel stores status</text:span></text:p>
      <text:p text:style-name="P1"><text:span text:style-name="Source_20_Text"><text:s text:c="3"/>↓</text:span></text:p>
      <text:p text:style-name="P1"><text:span text:style-name="Source_20_Text">Parent calls wait()</text:span></text:p>
      <text:p text:style-name="P1"><text:span text:style-name="Source_20_Text"><text:s text:c="3"/>↓</text:span></text:p>
      <text:p text:style-name="P2"><text:span text:style-name="Source_20_Text">Zombie removed</text:span></text:p>
      <text:p text:style-name="Horizontal_20_Line"/>
      <text:h text:style-name="Heading_20_1" text:outline-level="1">🧠 Important Interview / Exam Points</text:h>
      <text:list xml:id="list627233645" text:style-name="L8">
        <text:list-item>
          <text:p text:style-name="P11"><text:span text:style-name="Source_20_Text">fork()</text:span> returns twice (once in parent, once in child)</text:p>
        </text:list-item>
        <text:list-item>
          <text:p text:style-name="P11"><text:span text:style-name="Source_20_Text">exit()</text:span> sends status to parent</text:p>
        </text:list-item>
        <text:list-item>
          <text:p text:style-name="P11"><text:span text:style-name="Source_20_Text">wait()</text:span> prevents zombie</text:p>
        </text:list-item>
        <text:list-item>
          <text:p text:style-name="P11">Multiple fork → exponential growth</text:p>
        </text:list-item>
        <text:list-item>
          <text:p text:style-name="P11">Zombie ≠ Running process</text:p>
        </text:list-item>
        <text:list-item>
          <text:p text:style-name="P11">Orphan adopted by system init process</text:p>
        </text:list-item>
      </text:list>
      <text:p text:style-name="Horizontal_20_Line"/>
      <text:h text:style-name="Heading_20_1" text:outline-level="1"><text:soft-page-break/>📊 Summary Table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oncept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fork()</text:p>
          </table:table-cell>
          <table:table-cell table:style-name="Table4.A1" office:value-type="string">
            <text:p text:style-name="Table_20_Contents">Create new process</text:p>
          </table:table-cell>
        </table:table-row>
        <table:table-row>
          <table:table-cell table:style-name="Table4.A1" office:value-type="string">
            <text:p text:style-name="Table_20_Contents">Child Process</text:p>
          </table:table-cell>
          <table:table-cell table:style-name="Table4.A1" office:value-type="string">
            <text:p text:style-name="Table_20_Contents">Newly created process</text:p>
          </table:table-cell>
        </table:table-row>
        <table:table-row>
          <table:table-cell table:style-name="Table4.A1" office:value-type="string">
            <text:p text:style-name="Table_20_Contents">exit()</text:p>
          </table:table-cell>
          <table:table-cell table:style-name="Table4.A1" office:value-type="string">
            <text:p text:style-name="Table_20_Contents">Terminate process</text:p>
          </table:table-cell>
        </table:table-row>
        <table:table-row>
          <table:table-cell table:style-name="Table4.A1" office:value-type="string">
            <text:p text:style-name="Table_20_Contents">wait()</text:p>
          </table:table-cell>
          <table:table-cell table:style-name="Table4.A1" office:value-type="string">
            <text:p text:style-name="Table_20_Contents">Parent waits for child</text:p>
          </table:table-cell>
        </table:table-row>
        <table:table-row>
          <table:table-cell table:style-name="Table4.A1" office:value-type="string">
            <text:p text:style-name="Table_20_Contents">Zombie</text:p>
          </table:table-cell>
          <table:table-cell table:style-name="Table4.A1" office:value-type="string">
            <text:p text:style-name="Table_20_Contents">Dead child, not waited</text:p>
          </table:table-cell>
        </table:table-row>
        <table:table-row>
          <table:table-cell table:style-name="Table4.A1" office:value-type="string">
            <text:p text:style-name="Table_20_Contents">Multiple fork</text:p>
          </table:table-cell>
          <table:table-cell table:style-name="Table4.A1" office:value-type="string">
            <text:p text:style-name="Table_20_Contents">Exponential process creation</text:p>
          </table:table-cell>
        </table:table-row>
        <table:table-row>
          <table:table-cell table:style-name="Table4.A1" office:value-type="string">
            <text:p text:style-name="Table_20_Contents">Process Tree</text:p>
          </table:table-cell>
          <table:table-cell table:style-name="Table4.A1" office:value-type="string">
            <text:p text:style-name="Table_20_Contents">Parent-child hierarchy</text:p>
          </table:table-cell>
        </table:table-row>
      </table:table>
      <text:p text:style-name="Standard"/>
      <text:p text:style-name="Standard"/>
      <text:p text:style-name="P25"><text:span text:style-name="Strong_20_Emphasis">important </text:span><text:span text:style-name="Strong_20_Emphasis"><text:span text:style-name="Source_20_Text">fork()</text:span></text:span><text:span text:style-name="Strong_20_Emphasis"> patterns using </text:span><text:span text:style-name="Strong_20_Emphasis"><text:span text:style-name="Source_20_Text">if</text:span></text:span><text:span text:style-name="Strong_20_Emphasis">, </text:span><text:span text:style-name="Strong_20_Emphasis"><text:span text:style-name="Source_20_Text">while</text:span></text:span><text:span text:style-name="Strong_20_Emphasis">, and logical operators (</text:span><text:span text:style-name="Strong_20_Emphasis"><text:span text:style-name="Source_20_Text">&amp;&amp;</text:span></text:span><text:span text:style-name="Strong_20_Emphasis">, </text:span><text:span text:style-name="Strong_20_Emphasis"><text:span text:style-name="Source_20_Text">||</text:span></text:span><text:span text:style-name="Strong_20_Emphasis">, </text:span><text:span text:style-name="Strong_20_Emphasis"><text:span text:style-name="Source_20_Text">!</text:span></text:span><text:span text:style-name="Strong_20_Emphasis">)</text:span> with <text:span text:style-name="Strong_20_Emphasis">step-by-step solutions and process count analysis</text:span>.</text:p>
      <text:p text:style-name="Text_20_body">These are common <text:span text:style-name="Strong_20_Emphasis">exam / interview problems</text:span> in OS.</text:p>
      <text:p text:style-name="Horizontal_20_Line"/>
      <text:h text:style-name="Heading_20_1" text:outline-level="1">1️⃣ <text:span text:style-name="Source_20_Text">fork()</text:span> inside <text:span text:style-name="Source_20_Text">if</text:span> statement</text:h>
      <text:p text:style-name="Horizontal_20_Line"/>
      <text:h text:style-name="Heading_20_2" text:outline-level="2">🔹 Case 1</text:h>
      <text:p text:style-name="P1"><text:span text:style-name="Source_20_Text">if (fork() == 0)</text:span></text:p>
      <text:p text:style-name="P2"><text:span text:style-name="Source_20_Text"><text:s text:c="4"/>printf("Hello\n");</text:span></text:p>
      <text:h text:style-name="Heading_20_3" text:outline-level="3">🔎 Analysis</text:h>
      <text:list xml:id="list893943951" text:style-name="L9">
        <text:list-item>
          <text:p text:style-name="P12"><text:span text:style-name="Source_20_Text">fork()</text:span> creates 2 processes.</text:p>
        </text:list-item>
        <text:list-item>
          <text:p text:style-name="P12">In child → <text:span text:style-name="Source_20_Text">fork()</text:span> returns <text:span text:style-name="Source_20_Text">0</text:span> → condition TRUE → prints.</text:p>
        </text:list-item>
        <text:list-item>
          <text:p text:style-name="P12">In parent → returns child PID (&gt;0) → condition FALSE → does not print.</text:p>
        </text:list-item>
      </text:list>
      <text:h text:style-name="Heading_20_3" text:outline-level="3">✅ Total Processes = 2</text:h>
      <text:h text:style-name="Heading_20_3" text:outline-level="3">✅ Output printed = 1 time</text:h>
      <text:p text:style-name="Horizontal_20_Line"/>
      <text:h text:style-name="Heading_20_2" text:outline-level="2">🔹 Case 2</text:h>
      <text:p text:style-name="P1"><text:span text:style-name="Source_20_Text">if (fork())</text:span></text:p>
      <text:p text:style-name="P2"><text:span text:style-name="Source_20_Text"><text:s text:c="4"/>printf("Hello\n");</text:span></text:p>
      <text:h text:style-name="Heading_20_3" text:outline-level="3">🔎 Analysis</text:h>
      <text:list xml:id="list338818412" text:style-name="L10">
        <text:list-item>
          <text:p text:style-name="P13">Parent → return &gt;0 → TRUE → prints.</text:p>
        </text:list-item>
        <text:list-item>
          <text:p text:style-name="P13">Child → return 0 → FALSE → no print.</text:p>
        </text:list-item>
      </text:list>
      <text:h text:style-name="Heading_20_3" text:outline-level="3">✅ Total Processes = 2</text:h>
      <text:h text:style-name="Heading_20_3" text:outline-level="3">✅ Output printed = 1 time</text:h>
      <text:p text:style-name="Horizontal_20_Line"/>
      <text:h text:style-name="Heading_20_2" text:outline-level="2">🔹 Case 3</text:h>
      <text:p text:style-name="P1"><text:span text:style-name="Source_20_Text">if (fork() &amp;&amp; fork())</text:span></text:p>
      <text:p text:style-name="P2"><text:span text:style-name="Source_20_Text"><text:s text:c="4"/>printf("Hello\n");</text:span></text:p>
      <text:h text:style-name="Heading_20_3" text:outline-level="3"><text:soft-page-break/>🔎 Step-by-Step</text:h>
      <text:p text:style-name="Text_20_body">Let first fork = F1<text:line-break/>Second fork = F2</text:p>
      <text:h text:style-name="Heading_20_3" text:outline-level="3">Step 1: F1 → 2 processes</text:h>
      <text:p text:style-name="Text_20_body">Now both processes evaluate <text:span text:style-name="Source_20_Text">&amp;&amp;</text:span>.</text:p>
      <text:h text:style-name="Heading_20_3" text:outline-level="3">Step 2:</text:h>
      <text:list xml:id="list2745572348" text:style-name="L11">
        <text:list-item>
          <text:p text:style-name="P14">Parent of F1 → F1 returns &gt;0 → TRUE → evaluates F2.</text:p>
        </text:list-item>
        <text:list-item>
          <text:p text:style-name="P14">Child of F1 → F1 returns 0 → FALSE → does NOT evaluate F2 (short-circuit).</text:p>
        </text:list-item>
      </text:list>
      <text:p text:style-name="Text_20_body">So second fork runs only in <text:span text:style-name="Strong_20_Emphasis">one process</text:span>.</text:p>
      <text:h text:style-name="Heading_20_3" text:outline-level="3">Step 3:</text:h>
      <text:p text:style-name="Text_20_body">F2 creates one more process.</text:p>
      <text:h text:style-name="Heading_20_3" text:outline-level="3">Total processes:</text:h>
      <text:list xml:id="list3616077925" text:style-name="L12">
        <text:list-item>
          <text:p text:style-name="P15">From F1 → 2</text:p>
        </text:list-item>
        <text:list-item>
          <text:p text:style-name="P15">From F2 → 1 more</text:p>
        </text:list-item>
      </text:list>
      <text:h text:style-name="Heading_20_3" text:outline-level="3">✅ Total = 3 processes</text:h>
      <text:h text:style-name="Heading_20_3" text:outline-level="3">Printing:</text:h>
      <text:p text:style-name="Text_20_body">Only the parent where both forks return &gt;0 prints.</text:p>
      <text:h text:style-name="Heading_20_3" text:outline-level="3">✅ Output printed = 1 time</text:h>
      <text:p text:style-name="Horizontal_20_Line"/>
      <text:h text:style-name="Heading_20_1" text:outline-level="1">2️⃣ <text:span text:style-name="Source_20_Text">fork()</text:span> with OR (<text:span text:style-name="Source_20_Text">||</text:span>)</text:h>
      <text:p text:style-name="Horizontal_20_Line"/>
      <text:h text:style-name="Heading_20_2" text:outline-level="2">🔹 Case</text:h>
      <text:p text:style-name="P1"><text:span text:style-name="Source_20_Text">if (fork() || fork())</text:span></text:p>
      <text:p text:style-name="P2"><text:span text:style-name="Source_20_Text"><text:s text:c="4"/>printf("Hello\n");</text:span></text:p>
      <text:h text:style-name="Heading_20_3" text:outline-level="3">🔎 Step-by-Step</text:h>
      <text:h text:style-name="Heading_20_3" text:outline-level="3">Step 1: F1 → 2 processes</text:h>
      <text:h text:style-name="Heading_20_4" text:outline-level="4">Parent:</text:h>
      <text:list xml:id="list3396804888" text:style-name="L13">
        <text:list-item>
          <text:p text:style-name="P16">F1 returns &gt;0 → TRUE</text:p>
        </text:list-item>
        <text:list-item>
          <text:p text:style-name="P16"><text:soft-page-break/>Because of <text:span text:style-name="Source_20_Text">||</text:span>, second fork NOT executed</text:p>
        </text:list-item>
        <text:list-item>
          <text:p text:style-name="P16">Condition TRUE → prints</text:p>
        </text:list-item>
      </text:list>
      <text:h text:style-name="Heading_20_4" text:outline-level="4">Child:</text:h>
      <text:list xml:id="list1629240478" text:style-name="L14">
        <text:list-item>
          <text:p text:style-name="P17">F1 returns 0 → FALSE</text:p>
        </text:list-item>
        <text:list-item>
          <text:p text:style-name="P17">Must evaluate second fork</text:p>
        </text:list-item>
      </text:list>
      <text:h text:style-name="Heading_20_3" text:outline-level="3">Step 2: F2 runs only in child</text:h>
      <text:p text:style-name="Text_20_body">Creates 1 more process.</text:p>
      <text:p text:style-name="Text_20_body">Now total processes:</text:p>
      <text:list xml:id="list846851780" text:style-name="L15">
        <text:list-item>
          <text:p text:style-name="P18">2 from F1</text:p>
        </text:list-item>
        <text:list-item>
          <text:p text:style-name="P18">+1 from F2</text:p>
        </text:list-item>
      </text:list>
      <text:h text:style-name="Heading_20_3" text:outline-level="3">✅ Total = 3 processes</text:h>
      <text:h text:style-name="Heading_20_3" text:outline-level="3">Printing:</text:h>
      <text:list xml:id="list2531240357" text:style-name="L16">
        <text:list-item>
          <text:p text:style-name="P19">Parent (from F1) → prints</text:p>
        </text:list-item>
        <text:list-item>
          <text:p text:style-name="P19">Parent of F2 → prints</text:p>
        </text:list-item>
        <text:list-item>
          <text:p text:style-name="P19">Child of F2 → does not print</text:p>
        </text:list-item>
      </text:list>
      <text:h text:style-name="Heading_20_3" text:outline-level="3">✅ Output printed = 2 times</text:h>
      <text:p text:style-name="Horizontal_20_Line"/>
      <text:h text:style-name="Heading_20_1" text:outline-level="1">3️⃣ <text:span text:style-name="Source_20_Text">fork()</text:span> in While Loop</text:h>
      <text:p text:style-name="Horizontal_20_Line"/>
      <text:h text:style-name="Heading_20_2" text:outline-level="2">🔹 Case 1</text:h>
      <text:p text:style-name="P1"><text:span text:style-name="Source_20_Text">int i = 0;</text:span></text:p>
      <text:p text:style-name="P1"><text:span text:style-name="Source_20_Text">while (i &lt; 2) {</text:span></text:p>
      <text:p text:style-name="P1"><text:span text:style-name="Source_20_Text"><text:s text:c="4"/>fork();</text:span></text:p>
      <text:p text:style-name="P1"><text:span text:style-name="Source_20_Text"><text:s text:c="4"/>i++;</text:span></text:p>
      <text:p text:style-name="P2"><text:span text:style-name="Source_20_Text">}</text:span></text:p>
      <text:h text:style-name="Heading_20_3" text:outline-level="3">🔎 Analysis</text:h>
      <text:p text:style-name="Text_20_body">Loop runs 2 times.</text:p>
      <text:p text:style-name="Text_20_body">Each iteration doubles processes.</text:p>
      <text:h text:style-name="Heading_20_3" text:outline-level="3">Iteration 1:</text:h>
      <text:p text:style-name="Text_20_body">1 → 2</text:p>
      <text:h text:style-name="Heading_20_3" text:outline-level="3"><text:soft-page-break/>Iteration 2:</text:h>
      <text:p text:style-name="Text_20_body">2 → 4</text:p>
      <text:h text:style-name="Heading_20_3" text:outline-level="3">✅ Total processes = 4</text:h>
      <text:p text:style-name="Text_20_body">Formula:</text:p>
      <text:p text:style-name="P2"><text:span text:style-name="Source_20_Text">Total = 2^n</text:span></text:p>
      <text:p text:style-name="Text_20_body">Where n = loop count</text:p>
      <text:p text:style-name="Horizontal_20_Line"/>
      <text:h text:style-name="Heading_20_2" text:outline-level="2">🔹 Case 2</text:h>
      <text:p text:style-name="P1"><text:span text:style-name="Source_20_Text">int i = 0;</text:span></text:p>
      <text:p text:style-name="P1"><text:span text:style-name="Source_20_Text">while (i &lt; 2 &amp;&amp; fork()) {</text:span></text:p>
      <text:p text:style-name="P1"><text:span text:style-name="Source_20_Text"><text:s text:c="4"/>i++;</text:span></text:p>
      <text:p text:style-name="P2"><text:span text:style-name="Source_20_Text">}</text:span></text:p>
      <text:h text:style-name="Heading_20_3" text:outline-level="3">🔎 Step-by-Step</text:h>
      <text:h text:style-name="Heading_20_3" text:outline-level="3">Iteration 1:</text:h>
      <text:p text:style-name="Text_20_body">F1 → 2 processes</text:p>
      <text:list xml:id="list3831451870" text:style-name="L17">
        <text:list-item>
          <text:p text:style-name="P20">Parent → fork() &gt;0 → TRUE → i++ (i=1)</text:p>
        </text:list-item>
        <text:list-item>
          <text:p text:style-name="P20">Child → fork()=0 → FALSE → exits loop</text:p>
        </text:list-item>
      </text:list>
      <text:h text:style-name="Heading_20_3" text:outline-level="3">Iteration 2:</text:h>
      <text:p text:style-name="Text_20_body">Only parent continues.</text:p>
      <text:p text:style-name="Text_20_body">F2 → creates 1 more process</text:p>
      <text:list xml:id="list1149201967" text:style-name="L18">
        <text:list-item>
          <text:p text:style-name="P21">Parent → TRUE → i=2</text:p>
        </text:list-item>
        <text:list-item>
          <text:p text:style-name="P21">Child → FALSE → exits</text:p>
        </text:list-item>
      </text:list>
      <text:p text:style-name="Text_20_body">Loop stops.</text:p>
      <text:h text:style-name="Heading_20_3" text:outline-level="3">✅ Total processes = 3</text:h>
      <text:p text:style-name="Horizontal_20_Line"/>
      <text:h text:style-name="Heading_20_1" text:outline-level="1">4️⃣ Multiple <text:span text:style-name="Source_20_Text">fork()</text:span> in One Line</text:h>
      <text:p text:style-name="Horizontal_20_Line"/>
      <text:h text:style-name="Heading_20_2" text:outline-level="2">🔹 Case</text:h>
      <text:p text:style-name="P1"><text:span text:style-name="Source_20_Text">fork();</text:span></text:p>
      <text:p text:style-name="P1"><text:span text:style-name="Source_20_Text">fork();</text:span></text:p>
      <text:p text:style-name="P2"><text:span text:style-name="Source_20_Text">fork();</text:span></text:p>
      <text:h text:style-name="Heading_20_3" text:outline-level="3"><text:soft-page-break/>Formula:</text:h>
      <text:p text:style-name="P2"><text:span text:style-name="Source_20_Text">Total processes = 2^n</text:span></text:p>
      <text:p text:style-name="Text_20_body">Here n = 3</text:p>
      <text:h text:style-name="Heading_20_3" text:outline-level="3">✅ Total = 8 processes</text:h>
      <text:p text:style-name="Horizontal_20_Line"/>
      <text:h text:style-name="Heading_20_1" text:outline-level="1">5️⃣ Complex Logical Example</text:h>
      <text:p text:style-name="Horizontal_20_Line"/>
      <text:h text:style-name="Heading_20_2" text:outline-level="2">🔹 Example</text:h>
      <text:p text:style-name="P2"><text:span text:style-name="Source_20_Text">fork() &amp;&amp; fork() || fork();</text:span></text:p>
      <text:p text:style-name="Text_20_body">Operator precedence:</text:p>
      <text:p text:style-name="P1"><text:span text:style-name="Source_20_Text">&amp;&amp; <text:s/>→ higher</text:span></text:p>
      <text:p text:style-name="P2"><text:span text:style-name="Source_20_Text">|| <text:s/>→ lower</text:span></text:p>
      <text:p text:style-name="Text_20_body">So it becomes:</text:p>
      <text:p text:style-name="P2"><text:span text:style-name="Source_20_Text">( fork() &amp;&amp; fork() ) || fork();</text:span></text:p>
      <text:p text:style-name="Horizontal_20_Line"/>
      <text:h text:style-name="Heading_20_3" text:outline-level="3">Step-by-step reasoning</text:h>
      <text:p text:style-name="Text_20_body">Let:</text:p>
      <text:list xml:id="list420848516" text:style-name="L19">
        <text:list-item>
          <text:p text:style-name="P22">F1 = first fork</text:p>
        </text:list-item>
        <text:list-item>
          <text:p text:style-name="P22">F2 = second fork</text:p>
        </text:list-item>
        <text:list-item>
          <text:p text:style-name="P22">F3 = third fork</text:p>
        </text:list-item>
      </text:list>
      <text:h text:style-name="Heading_20_3" text:outline-level="3">Step 1: F1 → 2 processes</text:h>
      <text:h text:style-name="Heading_20_3" text:outline-level="3">Step 2: In parent of F1:</text:h>
      <text:p text:style-name="Text_20_body">F1 TRUE → evaluate F2 → creates 1 more process</text:p>
      <text:p text:style-name="Text_20_body">Now we have 3 processes.</text:p>
      <text:h text:style-name="Heading_20_3" text:outline-level="3">Step 3:</text:h>
      <text:p text:style-name="Text_20_body">Evaluate <text:span text:style-name="Source_20_Text">(F1 &amp;&amp; F2)</text:span></text:p>
      <text:p text:style-name="Text_20_body">Only original parent has TRUE.</text:p>
      <text:p text:style-name="Text_20_body">For others → FALSE.</text:p>
      <text:h text:style-name="Heading_20_3" text:outline-level="3"><text:soft-page-break/>Step 4:</text:h>
      <text:p text:style-name="Text_20_body">For processes where left side FALSE → evaluate F3</text:p>
      <text:p text:style-name="Text_20_body">F3 runs in 2 processes → creates 2 more.</text:p>
      <text:p text:style-name="Horizontal_20_Line"/>
      <text:h text:style-name="Heading_20_3" text:outline-level="3">✅ Final Total = 5 processes</text:h>
      <text:p text:style-name="Horizontal_20_Line"/>
      <text:h text:style-name="Heading_20_1" text:outline-level="1">6️⃣ Negation Example</text:h>
      <text:p text:style-name="P1"><text:span text:style-name="Source_20_Text">if (!fork())</text:span></text:p>
      <text:p text:style-name="P2"><text:span text:style-name="Source_20_Text"><text:s text:c="4"/>fork();</text:span></text:p>
      <text:h text:style-name="Heading_20_3" text:outline-level="3">Step 1: F1 → 2 processes</text:h>
      <text:list xml:id="list3750929158" text:style-name="L20">
        <text:list-item>
          <text:p text:style-name="P23">Parent → fork() &gt;0 → !TRUE = FALSE → skip inner fork</text:p>
        </text:list-item>
        <text:list-item>
          <text:p text:style-name="P23">Child → fork()=0 → !0 = TRUE → executes second fork</text:p>
        </text:list-item>
      </text:list>
      <text:h text:style-name="Heading_20_3" text:outline-level="3">Step 2:</text:h>
      <text:p text:style-name="Text_20_body">Second fork runs only in child → creates 1 more</text:p>
      <text:h text:style-name="Heading_20_3" text:outline-level="3">✅ Total processes = 3</text:h>
      <text:p text:style-name="Horizontal_20_Line"/>
      <text:h text:style-name="Heading_20_1" text:outline-level="1">📊 Summary Table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ode</text:p>
            </table:table-cell>
            <table:table-cell table:style-name="Table5.A1" office:value-type="string">
              <text:p text:style-name="Table_20_Heading">Total Processes</text:p>
            </table:table-cell>
            <table:table-cell table:style-name="Table5.A1" office:value-type="string">
              <text:p text:style-name="Table_20_Heading">Print Count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if(fork()==0)</text:span>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</table:table-row>
        <table:table-row>
          <table:table-cell table:style-name="Table5.A1" office:value-type="string">
            <text:p text:style-name="Table_20_Contents"><text:span text:style-name="Source_20_Text">if(fork())</text:span>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</table:table-row>
        <table:table-row>
          <table:table-cell table:style-name="Table5.A1" office:value-type="string">
            <text:p text:style-name="Table_20_Contents"><text:span text:style-name="Source_20_Text">fork(); fork();</text:span>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depends</text:p>
          </table:table-cell>
        </table:table-row>
        <table:table-row>
          <table:table-cell table:style-name="Table5.A1" office:value-type="string">
            <text:p text:style-name="Table_20_Contents"><text:span text:style-name="Source_20_Text">fork() &amp;&amp; fork()</text:span></text:p>
          </table:table-cell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1</text:p>
          </table:table-cell>
        </table:table-row>
        <table:table-row>
          <table:table-cell table:style-name="Table5.A1" office:value-type="string">
            <text:p text:style-name="Table_20_Contents">`fork()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fork()`</text:p>
          </table:table-cell>
        </table:table-row>
        <table:table-row>
          <table:table-cell table:style-name="Table5.A1" office:value-type="string">
            <text:p text:style-name="Table_20_Contents"><text:span text:style-name="Source_20_Text">while(i&lt;2) fork();</text:span>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depends</text:p>
          </table:table-cell>
        </table:table-row>
        <table:table-row>
          <table:table-cell table:style-name="Table5.A1" office:value-type="string">
            <text:p text:style-name="Table_20_Contents"><text:span text:style-name="Source_20_Text">!fork()</text:span> case</text:p>
          </table:table-cell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depends</text:p>
          </table:table-cell>
        </table:table-row>
      </table:table>
      <text:p text:style-name="Horizontal_20_Line"/>
      <text:h text:style-name="Heading_20_1" text:outline-level="1">🎯 Important Rules for Solving</text:h>
      <text:list xml:id="list1420356386" text:style-name="L21">
        <text:list-item>
          <text:p text:style-name="P24">Each fork duplicates process.</text:p>
        </text:list-item>
        <text:list-item>
          <text:p text:style-name="P24">Logical operators follow short-circuit:</text:p>
          <text:list>
            <text:list-item>
              <text:p text:style-name="P24"><text:span text:style-name="Source_20_Text">&amp;&amp;</text:span> stops if FALSE.</text:p>
            </text:list-item>
            <text:list-item>
              <text:p text:style-name="P24"><text:soft-page-break/><text:span text:style-name="Source_20_Text">||</text:span> stops if TRUE.</text:p>
            </text:list-item>
          </text:list>
        </text:list-item>
        <text:list-item>
          <text:p text:style-name="P24">Count forks carefully.</text:p>
        </text:list-item>
        <text:list-item>
          <text:p text:style-name="P24">Draw process tree for complex problems.</text:p>
        </text:list-item>
      </text:list>
      <text:p text:style-name="Standard"/>
      <text:p text:style-name="P25"><text:span text:style-name="Strong_20_Emphasis">15 tricky </text:span><text:span text:style-name="Strong_20_Emphasis"><text:span text:style-name="Source_20_Text">fork()</text:span></text:span><text:span text:style-name="Strong_20_Emphasis"> problems with solved answers</text:span> (process count + print count).<text:line-break/>All follow <text:span text:style-name="Strong_20_Emphasis">POSIX behavior (Linux/QNX/UNIX compatible)</text:span>.</text:p>
      <text:p text:style-name="Horizontal_20_Line"/>
      <text:h text:style-name="Heading_20_1" text:outline-level="1">🔥 1️⃣ Basic Double Fork</text:h>
      <text:p text:style-name="P1"><text:span text:style-name="Source_20_Text">fork();</text:span></text:p>
      <text:p text:style-name="P1"><text:span text:style-name="Source_20_Text">fork();</text:span></text:p>
      <text:p text:style-name="P2"><text:span text:style-name="Source_20_Text">printf("Hi\n");</text:span></text:p>
      <text:h text:style-name="Heading_20_3" text:outline-level="3">✅ Total Processes</text:h>
      <text:p text:style-name="Text_20_body">2² = <text:span text:style-name="Strong_20_Emphasis">4</text:span></text:p>
      <text:h text:style-name="Heading_20_3" text:outline-level="3">✅ Output Count</text:h>
      <text:p text:style-name="Text_20_body">Each process prints once → <text:span text:style-name="Strong_20_Emphasis">4 times</text:span></text:p>
      <text:p text:style-name="Horizontal_20_Line"/>
      <text:h text:style-name="Heading_20_1" text:outline-level="1">🔥 2️⃣ Triple Fork</text:h>
      <text:p text:style-name="P1"><text:span text:style-name="Source_20_Text">fork();</text:span></text:p>
      <text:p text:style-name="P1"><text:span text:style-name="Source_20_Text">fork();</text:span></text:p>
      <text:p text:style-name="P1"><text:span text:style-name="Source_20_Text">fork();</text:span></text:p>
      <text:p text:style-name="P2"><text:span text:style-name="Source_20_Text">printf("Hi\n");</text:span></text:p>
      <text:h text:style-name="Heading_20_3" text:outline-level="3">✅ Total Processes</text:h>
      <text:p text:style-name="Text_20_body">2³ = <text:span text:style-name="Strong_20_Emphasis">8</text:span></text:p>
      <text:h text:style-name="Heading_20_3" text:outline-level="3">✅ Output Count</text:h>
      <text:p text:style-name="Text_20_body"><text:span text:style-name="Strong_20_Emphasis">8 prints</text:span></text:p>
      <text:p text:style-name="Horizontal_20_Line"/>
      <text:h text:style-name="Heading_20_1" text:outline-level="1">🔥 3️⃣ <text:span text:style-name="Source_20_Text">if(fork()==0)</text:span></text:h>
      <text:p text:style-name="P1"><text:span text:style-name="Source_20_Text">if (fork() == 0)</text:span></text:p>
      <text:p text:style-name="P2"><text:span text:style-name="Source_20_Text"><text:s text:c="4"/>printf("Hi\n");</text:span></text:p>
      <text:h text:style-name="Heading_20_3" text:outline-level="3">Process Creation</text:h>
      <text:p text:style-name="Text_20_body">1 fork → 2 processes</text:p>
      <text:h text:style-name="Heading_20_3" text:outline-level="3">Printing</text:h>
      <text:p text:style-name="Text_20_body">Only child prints.</text:p>
      <text:h text:style-name="Heading_20_3" text:outline-level="3"><text:soft-page-break/>✅ Total Processes = 2</text:h>
      <text:h text:style-name="Heading_20_3" text:outline-level="3">✅ Print Count = 1</text:h>
      <text:p text:style-name="Horizontal_20_Line"/>
      <text:h text:style-name="Heading_20_1" text:outline-level="1">🔥 4️⃣ <text:span text:style-name="Source_20_Text">if(fork())</text:span></text:h>
      <text:p text:style-name="P1"><text:span text:style-name="Source_20_Text">if (fork())</text:span></text:p>
      <text:p text:style-name="P2"><text:span text:style-name="Source_20_Text"><text:s text:c="4"/>printf("Hi\n");</text:span></text:p>
      <text:p text:style-name="Text_20_body">Only parent prints.</text:p>
      <text:h text:style-name="Heading_20_3" text:outline-level="3">✅ Processes = 2</text:h>
      <text:h text:style-name="Heading_20_3" text:outline-level="3">✅ Prints = 1</text:h>
      <text:p text:style-name="Horizontal_20_Line"/>
      <text:h text:style-name="Heading_20_1" text:outline-level="1">🔥 5️⃣ <text:span text:style-name="Source_20_Text">fork() &amp;&amp; fork()</text:span></text:h>
      <text:p text:style-name="P1"><text:span text:style-name="Source_20_Text">if (fork() &amp;&amp; fork())</text:span></text:p>
      <text:p text:style-name="P2"><text:span text:style-name="Source_20_Text"><text:s text:c="4"/>printf("Hi\n");</text:span></text:p>
      <text:h text:style-name="Heading_20_3" text:outline-level="3">Step</text:h>
      <text:list xml:id="list2145843273" text:style-name="L22">
        <text:list-item>
          <text:p text:style-name="P26">F1 → 2 processes</text:p>
        </text:list-item>
        <text:list-item>
          <text:p text:style-name="P26">F2 runs only in parent (short-circuit)</text:p>
        </text:list-item>
      </text:list>
      <text:p text:style-name="Text_20_body">Total = 3 processes</text:p>
      <text:p text:style-name="Text_20_body">Only original parent prints.</text:p>
      <text:h text:style-name="Heading_20_3" text:outline-level="3">✅ Processes = 3</text:h>
      <text:h text:style-name="Heading_20_3" text:outline-level="3">✅ Prints = 1</text:h>
      <text:p text:style-name="Horizontal_20_Line"/>
      <text:h text:style-name="Heading_20_1" text:outline-level="1">🔥 6️⃣ <text:span text:style-name="Source_20_Text">fork() || fork()</text:span></text:h>
      <text:p text:style-name="P1"><text:span text:style-name="Source_20_Text">if (fork() || fork())</text:span></text:p>
      <text:p text:style-name="P2"><text:span text:style-name="Source_20_Text"><text:s text:c="4"/>printf("Hi\n");</text:span></text:p>
      <text:h text:style-name="Heading_20_3" text:outline-level="3">Step</text:h>
      <text:list xml:id="list3605399613" text:style-name="L23">
        <text:list-item>
          <text:p text:style-name="P27">F1 → 2 processes</text:p>
        </text:list-item>
        <text:list-item>
          <text:p text:style-name="P27">F2 runs only in child of F1</text:p>
        </text:list-item>
      </text:list>
      <text:p text:style-name="Text_20_body">Total = 3 processes</text:p>
      <text:p text:style-name="Text_20_body"><text:soft-page-break/>Parent of F1 prints<text:line-break/>Parent of F2 prints</text:p>
      <text:h text:style-name="Heading_20_3" text:outline-level="3">✅ Processes = 3</text:h>
      <text:h text:style-name="Heading_20_3" text:outline-level="3">✅ Prints = 2</text:h>
      <text:p text:style-name="Horizontal_20_Line"/>
      <text:h text:style-name="Heading_20_1" text:outline-level="1">🔥 7️⃣ <text:span text:style-name="Source_20_Text">fork() &amp;&amp; fork() &amp;&amp; fork()</text:span></text:h>
      <text:p text:style-name="P1"><text:span text:style-name="Source_20_Text">if (fork() &amp;&amp; fork() &amp;&amp; fork())</text:span></text:p>
      <text:p text:style-name="P2"><text:span text:style-name="Source_20_Text"><text:s text:c="4"/>printf("Hi\n");</text:span></text:p>
      <text:h text:style-name="Heading_20_3" text:outline-level="3">Step</text:h>
      <text:list xml:id="list2095297555" text:style-name="L24">
        <text:list-item>
          <text:p text:style-name="P28">F1 → 2</text:p>
        </text:list-item>
        <text:list-item>
          <text:p text:style-name="P28">F2 runs only in parent → +1 = 3</text:p>
        </text:list-item>
        <text:list-item>
          <text:p text:style-name="P28">F3 runs only in original parent → +1</text:p>
        </text:list-item>
      </text:list>
      <text:h text:style-name="Heading_20_3" text:outline-level="3">✅ Total = 4 processes</text:h>
      <text:h text:style-name="Heading_20_3" text:outline-level="3">✅ Prints = 1</text:h>
      <text:p text:style-name="Horizontal_20_Line"/>
      <text:h text:style-name="Heading_20_1" text:outline-level="1">🔥 8️⃣ <text:span text:style-name="Source_20_Text">fork() || fork() || fork()</text:span></text:h>
      <text:p text:style-name="P1"><text:span text:style-name="Source_20_Text">if (fork() || fork() || fork())</text:span></text:p>
      <text:p text:style-name="P2"><text:span text:style-name="Source_20_Text"><text:s text:c="4"/>printf("Hi\n");</text:span></text:p>
      <text:h text:style-name="Heading_20_3" text:outline-level="3">Step Summary</text:h>
      <text:p text:style-name="Text_20_body">F1 → 2<text:line-break/>F2 runs only in F1-child → +1<text:line-break/>F3 runs only in last child → +1</text:p>
      <text:h text:style-name="Heading_20_3" text:outline-level="3">✅ Total Processes = 4</text:h>
      <text:h text:style-name="Heading_20_3" text:outline-level="3">✅ Prints = 3</text:h>
      <text:p text:style-name="Horizontal_20_Line"/>
      <text:h text:style-name="Heading_20_1" text:outline-level="1">🔥 9️⃣ Negation Case</text:h>
      <text:p text:style-name="P1"><text:span text:style-name="Source_20_Text">if (!fork())</text:span></text:p>
      <text:p text:style-name="P1"><text:span text:style-name="Source_20_Text"><text:s text:c="4"/>fork();</text:span></text:p>
      <text:p text:style-name="P2"><text:span text:style-name="Source_20_Text">printf("Hi\n");</text:span></text:p>
      <text:h text:style-name="Heading_20_3" text:outline-level="3"><text:soft-page-break/>Step</text:h>
      <text:p text:style-name="Text_20_body">F1 → 2<text:line-break/>Second fork runs only in child → +1</text:p>
      <text:p text:style-name="Text_20_body">Total = 3 processes</text:p>
      <text:p text:style-name="Text_20_body">All print.</text:p>
      <text:h text:style-name="Heading_20_3" text:outline-level="3">✅ Processes = 3</text:h>
      <text:h text:style-name="Heading_20_3" text:outline-level="3">✅ Prints = 3</text:h>
      <text:p text:style-name="Horizontal_20_Line"/>
      <text:h text:style-name="Heading_20_1" text:outline-level="1">🔥 🔟 Nested Fork</text:h>
      <text:p text:style-name="P1"><text:span text:style-name="Source_20_Text">fork();</text:span></text:p>
      <text:p text:style-name="P1"><text:span text:style-name="Source_20_Text">if (fork())</text:span></text:p>
      <text:p text:style-name="P1"><text:span text:style-name="Source_20_Text"><text:s text:c="4"/>fork();</text:span></text:p>
      <text:p text:style-name="P2"><text:span text:style-name="Source_20_Text">printf("Hi\n");</text:span></text:p>
      <text:h text:style-name="Heading_20_3" text:outline-level="3">Step-by-step</text:h>
      <text:p text:style-name="Text_20_body">F1 → 2<text:line-break/>F2 runs in both → +2 = 4<text:line-break/>Third fork runs in parents of F2 → +2</text:p>
      <text:h text:style-name="Heading_20_3" text:outline-level="3">✅ Total Processes = 6</text:h>
      <text:h text:style-name="Heading_20_3" text:outline-level="3">✅ Prints = 6</text:h>
      <text:p text:style-name="Horizontal_20_Line"/>
      <text:h text:style-name="Heading_20_1" text:outline-level="1">🔥 11️⃣ While Loop (2 iterations)</text:h>
      <text:p text:style-name="P1"><text:span text:style-name="Source_20_Text">int i = 0;</text:span></text:p>
      <text:p text:style-name="P1"><text:span text:style-name="Source_20_Text">while(i &lt; 2){</text:span></text:p>
      <text:p text:style-name="P1"><text:span text:style-name="Source_20_Text"><text:s text:c="4"/>fork();</text:span></text:p>
      <text:p text:style-name="P1"><text:span text:style-name="Source_20_Text"><text:s text:c="4"/>i++;</text:span></text:p>
      <text:p text:style-name="P1"><text:span text:style-name="Source_20_Text">}</text:span></text:p>
      <text:p text:style-name="P2"><text:span text:style-name="Source_20_Text">printf("Hi\n");</text:span></text:p>
      <text:p text:style-name="Text_20_body">Each iteration doubles processes.</text:p>
      <text:p text:style-name="Text_20_body">2 iterations → 2² = 4</text:p>
      <text:h text:style-name="Heading_20_3" text:outline-level="3">✅ Processes = 4</text:h>
      <text:h text:style-name="Heading_20_3" text:outline-level="3">✅ Prints = 4</text:h>
      <text:p text:style-name="Horizontal_20_Line"/>
      <text:h text:style-name="Heading_20_1" text:outline-level="1"><text:soft-page-break/>🔥 12️⃣ While with fork in condition</text:h>
      <text:p text:style-name="P1"><text:span text:style-name="Source_20_Text">int i = 0;</text:span></text:p>
      <text:p text:style-name="P1"><text:span text:style-name="Source_20_Text">while(i &lt; 2 &amp;&amp; fork()){</text:span></text:p>
      <text:p text:style-name="P1"><text:span text:style-name="Source_20_Text"><text:s text:c="4"/>i++;</text:span></text:p>
      <text:p text:style-name="P1"><text:span text:style-name="Source_20_Text">}</text:span></text:p>
      <text:p text:style-name="P2"><text:span text:style-name="Source_20_Text">printf("Hi\n");</text:span></text:p>
      <text:p text:style-name="Text_20_body">Step:</text:p>
      <text:p text:style-name="Text_20_body">Iteration 1 → 2 processes<text:line-break/>Iteration 2 → only parent continues → +1</text:p>
      <text:h text:style-name="Heading_20_3" text:outline-level="3">✅ Total = 3 processes</text:h>
      <text:h text:style-name="Heading_20_3" text:outline-level="3">✅ Prints = 3</text:h>
      <text:p text:style-name="Horizontal_20_Line"/>
      <text:h text:style-name="Heading_20_1" text:outline-level="1">🔥 13️⃣ Complex Expression</text:h>
      <text:p text:style-name="P1"><text:span text:style-name="Source_20_Text">fork() &amp;&amp; fork() || fork();</text:span></text:p>
      <text:p text:style-name="P2"><text:span text:style-name="Source_20_Text">printf("Hi\n");</text:span></text:p>
      <text:p text:style-name="Text_20_body">Equivalent to:</text:p>
      <text:p text:style-name="P2"><text:span text:style-name="Source_20_Text">(fork() &amp;&amp; fork()) || fork();</text:span></text:p>
      <text:p text:style-name="Text_20_body">Resulting processes = 5</text:p>
      <text:p text:style-name="Text_20_body">All print.</text:p>
      <text:h text:style-name="Heading_20_3" text:outline-level="3">✅ Processes = 5</text:h>
      <text:h text:style-name="Heading_20_3" text:outline-level="3">✅ Prints = 5</text:h>
      <text:p text:style-name="Horizontal_20_Line"/>
      <text:h text:style-name="Heading_20_1" text:outline-level="1">🔥 14️⃣ Fork inside If-Else</text:h>
      <text:p text:style-name="P1"><text:span text:style-name="Source_20_Text">if (fork()) {</text:span></text:p>
      <text:p text:style-name="P1"><text:span text:style-name="Source_20_Text"><text:s text:c="4"/>fork();</text:span></text:p>
      <text:p text:style-name="P1"><text:span text:style-name="Source_20_Text">} else {</text:span></text:p>
      <text:p text:style-name="P1"><text:span text:style-name="Source_20_Text"><text:s text:c="4"/>fork();</text:span></text:p>
      <text:p text:style-name="P1"><text:span text:style-name="Source_20_Text">}</text:span></text:p>
      <text:p text:style-name="P2"><text:span text:style-name="Source_20_Text">printf("Hi\n");</text:span></text:p>
      <text:p text:style-name="Text_20_body">Step:</text:p>
      <text:p text:style-name="Text_20_body">F1 → 2<text:line-break/>Parent branch → fork → +1<text:line-break/>Child branch → fork → +1</text:p>
      <text:h text:style-name="Heading_20_3" text:outline-level="3"><text:soft-page-break/>✅ Total = 4 processes</text:h>
      <text:h text:style-name="Heading_20_3" text:outline-level="3">✅ Prints = 4</text:h>
      <text:p text:style-name="Horizontal_20_Line"/>
      <text:h text:style-name="Heading_20_1" text:outline-level="1">🔥 15️⃣ Fork with Assignment</text:h>
      <text:p text:style-name="P1"><text:span text:style-name="Source_20_Text">int x = fork();</text:span></text:p>
      <text:p text:style-name="P1"/>
      <text:p text:style-name="P1"><text:span text:style-name="Source_20_Text">if (x == 0)</text:span></text:p>
      <text:p text:style-name="P1"><text:span text:style-name="Source_20_Text"><text:s text:c="4"/>fork();</text:span></text:p>
      <text:p text:style-name="P1"/>
      <text:p text:style-name="P2"><text:span text:style-name="Source_20_Text">printf("Hi\n");</text:span></text:p>
      <text:p text:style-name="Text_20_body">Step:</text:p>
      <text:p text:style-name="Text_20_body">F1 → 2<text:line-break/>Second fork runs only in child → +1</text:p>
      <text:h text:style-name="Heading_20_3" text:outline-level="3">✅ Total Processes = 3</text:h>
      <text:h text:style-name="Heading_20_3" text:outline-level="3">✅ Prints = 3</text:h>
      <text:p text:style-name="Horizontal_20_Line"/>
      <text:h text:style-name="Heading_20_1" text:outline-level="1">🧠 MASTER FORMULAS</text:h>
      <text:h text:style-name="Heading_20_3" text:outline-level="3">✔ Multiple independent forks</text:h>
      <text:p text:style-name="P2"><text:span text:style-name="Source_20_Text">Total processes = 2^n</text:span></text:p>
      <text:h text:style-name="Heading_20_3" text:outline-level="3">✔ <text:span text:style-name="Source_20_Text">&amp;&amp;</text:span></text:h>
      <text:p text:style-name="Text_20_body">Second fork runs only if first is TRUE.</text:p>
      <text:h text:style-name="Heading_20_3" text:outline-level="3">✔ <text:span text:style-name="Source_20_Text">||</text:span></text:h>
      <text:p text:style-name="Text_20_body">Second fork runs only if first is FALSE.</text:p>
      <text:h text:style-name="Heading_20_3" text:outline-level="3">✔ Short-Circuit Rule</text:h>
      <text:list xml:id="list4004013993" text:style-name="L25">
        <text:list-item>
          <text:p text:style-name="P29"><text:span text:style-name="Source_20_Text">&amp;&amp;</text:span> stops at FALSE</text:p>
        </text:list-item>
        <text:list-item>
          <text:p text:style-name="P29"><text:span text:style-name="Source_20_Text">||</text:span> stops at TRUE</text:p>
        </text:list-item>
      </text:list>
      <text:p text:style-name="Horizontal_20_Line"/>
      <text:h text:style-name="Heading_20_1" text:outline-level="1">📊 Quick Summary Table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Problem Type</text:p>
            </table:table-cell>
            <table:table-cell table:style-name="Table6.A1" office:value-type="string">
              <text:p text:style-name="Table_20_Heading">Processes</text:p>
            </table:table-cell>
          </table:table-row>
        </table:table-header-rows>
        <table:table-row>
          <table:table-cell table:style-name="Table6.A1" office:value-type="string">
            <text:p text:style-name="Table_20_Contents">fork(); fork();</text:p>
          </table:table-cell>
          <table:table-cell table:style-name="Table6.A1" office:value-type="string">
            <text:p text:style-name="Table_20_Contents">4</text:p>
          </table:table-cell>
        </table:table-row>
        <text:soft-page-break/>
        <table:table-row>
          <table:table-cell table:style-name="Table6.A1" office:value-type="string">
            <text:p text:style-name="Table_20_Contents">3 forks</text:p>
          </table:table-cell>
          <table:table-cell table:style-name="Table6.A1" office:value-type="string">
            <text:p text:style-name="Table_20_Contents">8</text:p>
          </table:table-cell>
        </table:table-row>
        <table:table-row>
          <table:table-cell table:style-name="Table6.A1" office:value-type="string">
            <text:p text:style-name="Table_20_Contents">fork() &amp;&amp; fork()</text:p>
          </table:table-cell>
          <table:table-cell table:style-name="Table6.A1" office:value-type="string">
            <text:p text:style-name="Table_20_Contents">3</text:p>
          </table:table-cell>
        </table:table-row>
        <table:table-row>
          <table:table-cell table:style-name="Table6.A1" office:value-type="string">
            <text:p text:style-name="Table_20_Contents">fork()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Table_20_Contents">fork() &amp;&amp; fork()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Table_20_Contents">2 loop forks</text:p>
          </table:table-cell>
          <table:table-cell table:style-name="Table6.A1" office:value-type="string">
            <text:p text:style-name="Table_20_Contents">4</text:p>
          </table:table-cell>
        </table:table-row>
      </table:table>
      <text:p text:style-name="Standard"/>
      <text:p text:style-name="P25"><text:span text:style-name="Strong_20_Emphasis">5 assignment problems based on real-time scenarios</text:span> using:</text:p>
      <text:list xml:id="list2647107670" text:style-name="L26">
        <text:list-item>
          <text:p text:style-name="P30"><text:span text:style-name="Source_20_Text">fork()</text:span></text:p>
        </text:list-item>
        <text:list-item>
          <text:p text:style-name="P30"><text:span text:style-name="Source_20_Text">wait()</text:span></text:p>
        </text:list-item>
        <text:list-item>
          <text:p text:style-name="P30"><text:span text:style-name="Source_20_Text">exit()</text:span></text:p>
        </text:list-item>
        <text:list-item>
          <text:p text:style-name="P30">Zombie process</text:p>
        </text:list-item>
        <text:list-item>
          <text:p text:style-name="P30">Orphan process</text:p>
        </text:list-item>
        <text:list-item>
          <text:p text:style-name="P30">Single &amp; multiple children</text:p>
        </text:list-item>
      </text:list>
      <text:p text:style-name="Text_20_body">All are <text:span text:style-name="Strong_20_Emphasis">POSIX-compliant (Linux/QNX/UNIX)</text:span> and suitable for OS lab assignments.</text:p>
      <text:p text:style-name="Horizontal_20_Line"/>
      <text:h text:style-name="Heading_20_1" text:outline-level="1">🧾 Assignment 1: Student Result Processing System</text:h>
      <text:h text:style-name="Heading_20_3" text:outline-level="3">(Single Child + <text:span text:style-name="Source_20_Text">fork()</text:span> + <text:span text:style-name="Source_20_Text">wait()</text:span> + <text:span text:style-name="Source_20_Text">exit()</text:span>)</text:h>
      <text:h text:style-name="Heading_20_2" text:outline-level="2">🎯 Real-Time Scenario</text:h>
      <text:p text:style-name="Text_20_body">A university system calculates student marks:</text:p>
      <text:list xml:id="list1819666153" text:style-name="L27">
        <text:list-item>
          <text:p text:style-name="P31">Parent process collects marks.</text:p>
        </text:list-item>
        <text:list-item>
          <text:p text:style-name="P31">Child process calculates total and average.</text:p>
        </text:list-item>
        <text:list-item>
          <text:p text:style-name="P31">Child returns success/failure using <text:span text:style-name="Source_20_Text">exit()</text:span> status.</text:p>
        </text:list-item>
      </text:list>
      <text:p text:style-name="Horizontal_20_Line"/>
      <text:h text:style-name="Heading_20_2" text:outline-level="2">🔧 Requirements</text:h>
      <text:list xml:id="list1452562394" text:style-name="L28">
        <text:list-item>
          <text:p text:style-name="P32">Parent reads 3 subject marks.</text:p>
        </text:list-item>
        <text:list-item>
          <text:p text:style-name="P32">Child calculates total &amp; average.</text:p>
        </text:list-item>
        <text:list-item>
          <text:p text:style-name="P32">Child exits with:</text:p>
          <text:list>
            <text:list-item>
              <text:p text:style-name="P32"><text:span text:style-name="Source_20_Text">0</text:span> → Pass</text:p>
            </text:list-item>
            <text:list-item>
              <text:p text:style-name="P32"><text:span text:style-name="Source_20_Text">1</text:span> → Fail (average &lt; 40)</text:p>
            </text:list-item>
          </text:list>
        </text:list-item>
        <text:list-item>
          <text:p text:style-name="P32">Parent uses <text:span text:style-name="Source_20_Text">wait()</text:span> to print result.</text:p>
        </text:list-item>
      </text:list>
      <text:p text:style-name="Horizontal_20_Line"/>
      <text:h text:style-name="Heading_20_2" text:outline-level="2">💻 Sample Implementation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oft-page-break/><text:span text:style-name="Source_20_Text">#include &lt;sys/wait.h&gt;</text:span></text:p>
      <text:p text:style-name="P1"/>
      <text:p text:style-name="P1"><text:span text:style-name="Source_20_Text">int main() {</text:span></text:p>
      <text:p text:style-name="P1"><text:span text:style-name="Source_20_Text"><text:s text:c="4"/>int m1 = 50, m2 = 60, m3 = 70;</text:span></text:p>
      <text:p text:style-name="P1"><text:span text:style-name="Source_20_Text"><text:s text:c="4"/>pid_t pid = fork();</text:span></text:p>
      <text:p text:style-name="P1"/>
      <text:p text:style-name="P1"><text:span text:style-name="Source_20_Text"><text:s text:c="4"/>if (pid == 0) {</text:span></text:p>
      <text:p text:style-name="P1"><text:span text:style-name="Source_20_Text"><text:s text:c="8"/>int total = m1 + m2 + m3;</text:span></text:p>
      <text:p text:style-name="P1"><text:span text:style-name="Source_20_Text"><text:s text:c="8"/>float avg = total / 3.0;</text:span></text:p>
      <text:p text:style-name="P1"><text:span text:style-name="Source_20_Text"><text:s text:c="8"/>printf("Child: Average = %.2f\n", avg);</text:span></text:p>
      <text:p text:style-name="P1"/>
      <text:p text:style-name="P1"><text:span text:style-name="Source_20_Text"><text:s text:c="8"/>if (avg &gt;= 40)</text:span></text:p>
      <text:p text:style-name="P1"><text:span text:style-name="Source_20_Text"><text:s text:c="12"/>exit(0);</text:span></text:p>
      <text:p text:style-name="P1"><text:span text:style-name="Source_20_Text"><text:s text:c="8"/>else</text:span></text:p>
      <text:p text:style-name="P1"><text:span text:style-name="Source_20_Text"><text:s text:c="12"/>exit(1);</text:span></text:p>
      <text:p text:style-name="P1"><text:span text:style-name="Source_20_Text"><text:s text:c="4"/>} else {</text:span></text:p>
      <text:p text:style-name="P1"><text:span text:style-name="Source_20_Text"><text:s text:c="8"/>int status;</text:span></text:p>
      <text:p text:style-name="P1"><text:span text:style-name="Source_20_Text"><text:s text:c="8"/>wait(&amp;status);</text:span></text:p>
      <text:p text:style-name="P1"/>
      <text:p text:style-name="P1"><text:span text:style-name="Source_20_Text"><text:s text:c="8"/>if (WEXITSTATUS(status) == 0)</text:span></text:p>
      <text:p text:style-name="P1"><text:span text:style-name="Source_20_Text"><text:s text:c="12"/>printf("Parent: Student Passed\n");</text:span></text:p>
      <text:p text:style-name="P1"><text:span text:style-name="Source_20_Text"><text:s text:c="8"/>else</text:span></text:p>
      <text:p text:style-name="P1"><text:span text:style-name="Source_20_Text"><text:s text:c="12"/>printf("Parent: Student Failed\n");</text:span></text:p>
      <text:p text:style-name="P1"><text:span text:style-name="Source_20_Text"><text:s text:c="4"/>}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🧾 Assignment 2: Parallel File Processing</text:h>
      <text:h text:style-name="Heading_20_3" text:outline-level="3">(Multiple Children + <text:span text:style-name="Source_20_Text">wait()</text:span>)</text:h>
      <text:h text:style-name="Heading_20_2" text:outline-level="2">🎯 Real-Time Scenario</text:h>
      <text:p text:style-name="Text_20_body">A company processes 3 log files in parallel:</text:p>
      <text:list xml:id="list2527171702" text:style-name="L29">
        <text:list-item>
          <text:p text:style-name="P33">Parent spawns 3 children.</text:p>
        </text:list-item>
        <text:list-item>
          <text:p text:style-name="P33">Each child simulates processing.</text:p>
        </text:list-item>
        <text:list-item>
          <text:p text:style-name="P33">Parent waits for all children.</text:p>
        </text:list-item>
      </text:list>
      <text:p text:style-name="Horizontal_20_Line"/>
      <text:h text:style-name="Heading_20_2" text:outline-level="2">🔧 Requirements</text:h>
      <text:list xml:id="list427780339" text:style-name="L30">
        <text:list-item>
          <text:p text:style-name="P34">Create 3 children using loop.</text:p>
        </text:list-item>
        <text:list-item>
          <text:p text:style-name="P34">Each prints its PID.</text:p>
        </text:list-item>
        <text:list-item>
          <text:p text:style-name="P34">Parent waits for all using <text:span text:style-name="Source_20_Text">wait()</text:span>.</text:p>
        </text:list-item>
      </text:list>
      <text:p text:style-name="Horizontal_20_Line"/>
      <text:h text:style-name="Heading_20_2" text:outline-level="2"><text:soft-page-break/>💻 Implementation</text:h>
      <text:p text:style-name="P1"><text:span text:style-name="Source_20_Text">#include &lt;stdio.h&gt;</text:span></text:p>
      <text:p text:style-name="P1"><text:span text:style-name="Source_20_Text">#include &lt;unistd.h&gt;</text:span></text:p>
      <text:p text:style-name="P1"><text:span text:style-name="Source_20_Text">#include &lt;sys/wait.h&gt;</text:span></text:p>
      <text:p text:style-name="P1"/>
      <text:p text:style-name="P1"><text:span text:style-name="Source_20_Text">int main() {</text:span></text:p>
      <text:p text:style-name="P1"><text:span text:style-name="Source_20_Text"><text:s text:c="4"/>for (int i = 0; i &lt; 3; i++) {</text:span></text:p>
      <text:p text:style-name="P1"><text:span text:style-name="Source_20_Text"><text:s text:c="8"/>if (fork() == 0) {</text:span></text:p>
      <text:p text:style-name="P1"><text:span text:style-name="Source_20_Text"><text:s text:c="12"/>printf("Child %d PID: %d\n", i+1, getpid());</text:span></text:p>
      <text:p text:style-name="P1"><text:span text:style-name="Source_20_Text"><text:s text:c="12"/>sleep(2);</text:span></text:p>
      <text:p text:style-name="P1"><text:span text:style-name="Source_20_Text"><text:s text:c="12"/>return 0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for (int i = 0; i &lt; 3; i++)</text:span></text:p>
      <text:p text:style-name="P1"><text:span text:style-name="Source_20_Text"><text:s text:c="8"/>wait(NULL);</text:span></text:p>
      <text:p text:style-name="P1"/>
      <text:p text:style-name="P1"><text:span text:style-name="Source_20_Text"><text:s text:c="4"/>printf("Parent: All files processed.\n");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🧾 Assignment 3: Zombie Process Demonstration</text:h>
      <text:h text:style-name="Heading_20_3" text:outline-level="3">(Zombie Creation &amp; Prevention)</text:h>
      <text:h text:style-name="Heading_20_2" text:outline-level="2">🎯 Real-Time Scenario</text:h>
      <text:p text:style-name="Text_20_body">A background task finishes quickly but parent delays collecting status.</text:p>
      <text:p text:style-name="Horizontal_20_Line"/>
      <text:h text:style-name="Heading_20_2" text:outline-level="2">🔧 Requirements</text:h>
      <text:list xml:id="list3921713533" text:style-name="L31">
        <text:list-item>
          <text:p text:style-name="P35">Child exits immediately.</text:p>
        </text:list-item>
        <text:list-item>
          <text:p text:style-name="P35">Parent sleeps for 10 seconds without calling <text:span text:style-name="Source_20_Text">wait()</text:span>.</text:p>
        </text:list-item>
        <text:list-item>
          <text:p text:style-name="P35">Observe zombie using <text:span text:style-name="Source_20_Text">ps -l</text:span>.</text:p>
        </text:list-item>
      </text:list>
      <text:p text:style-name="Horizontal_20_Line"/>
      <text:h text:style-name="Heading_20_2" text:outline-level="2">💻 Zombie Creation Code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/>
      <text:p text:style-name="P1"><text:span text:style-name="Source_20_Text">int main() {</text:span></text:p>
      <text:p text:style-name="P1"><text:span text:style-name="Source_20_Text"><text:s text:c="4"/>if (fork() == 0) {</text:span></text:p>
      <text:p text:style-name="P1"><text:span text:style-name="Source_20_Text"><text:s text:c="8"/>printf("Child exiting...\n");</text:span></text:p>
      <text:p text:style-name="P1"><text:span text:style-name="Source_20_Text"><text:s text:c="8"/>exit(0);</text:span></text:p>
      <text:p text:style-name="P1"><text:span text:style-name="Source_20_Text"><text:s text:c="4"/>} else {</text:span></text:p>
      <text:p text:style-name="P1"><text:soft-page-break/><text:span text:style-name="Source_20_Text"><text:s text:c="8"/>sleep(10); <text:s/>// No wait()</text:span></text:p>
      <text:p text:style-name="P1"><text:span text:style-name="Source_20_Text"><text:s text:c="4"/>}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Text_20_body">Run:</text:p>
      <text:p text:style-name="P2"><text:span text:style-name="Source_20_Text">ps -l</text:span></text:p>
      <text:p text:style-name="Text_20_body">Look for <text:span text:style-name="Source_20_Text">Z</text:span> state.</text:p>
      <text:p text:style-name="Horizontal_20_Line"/>
      <text:h text:style-name="Heading_20_2" text:outline-level="2">✅ Modification (Prevent Zombie)</text:h>
      <text:p text:style-name="Text_20_body">Add:</text:p>
      <text:p text:style-name="P2"><text:span text:style-name="Source_20_Text">wait(NULL);</text:span></text:p>
      <text:p text:style-name="Horizontal_20_Line"/>
      <text:h text:style-name="Heading_20_1" text:outline-level="1">🧾 Assignment 4: Orphan Process Simulation</text:h>
      <text:h text:style-name="Heading_20_3" text:outline-level="3">(Orphan + Adoption)</text:h>
      <text:h text:style-name="Heading_20_2" text:outline-level="2">🎯 Real-Time Scenario</text:h>
      <text:p text:style-name="Text_20_body">Parent process crashes before child finishes work.</text:p>
      <text:p text:style-name="Text_20_body">Child becomes orphan and is adopted by:</text:p>
      <text:p text:style-name="Text_20_body">👉 systemd</text:p>
      <text:p text:style-name="Text_20_body">(or <text:span text:style-name="Source_20_Text">init</text:span> in older UNIX systems)</text:p>
      <text:p text:style-name="Horizontal_20_Line"/>
      <text:h text:style-name="Heading_20_2" text:outline-level="2">🔧 Requirements</text:h>
      <text:list xml:id="list1328769382" text:style-name="L32">
        <text:list-item>
          <text:p text:style-name="P36">Parent exits immediately.</text:p>
        </text:list-item>
        <text:list-item>
          <text:p text:style-name="P36">Child sleeps for 5 seconds.</text:p>
        </text:list-item>
        <text:list-item>
          <text:p text:style-name="P36">Print child’s PPID before and after sleep.</text:p>
        </text:list-item>
      </text:list>
      <text:p text:style-name="Horizontal_20_Line"/>
      <text:h text:style-name="Heading_20_2" text:outline-level="2">💻 Code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 = fork();</text:span></text:p>
      <text:p text:style-name="P1"/>
      <text:p text:style-name="P1"><text:soft-page-break/><text:span text:style-name="Source_20_Text"><text:s text:c="4"/>if (pid == 0) {</text:span></text:p>
      <text:p text:style-name="P1"><text:span text:style-name="Source_20_Text"><text:s text:c="8"/>sleep(2);</text:span></text:p>
      <text:p text:style-name="P1"><text:span text:style-name="Source_20_Text"><text:s text:c="8"/>printf("Child PID: %d, New PPID: %d\n", getpid(), getppid());</text:span></text:p>
      <text:p text:style-name="P1"><text:span text:style-name="Source_20_Text"><text:s text:c="4"/>} else {</text:span></text:p>
      <text:p text:style-name="P1"><text:span text:style-name="Source_20_Text"><text:s text:c="8"/>printf("Parent exiting...\n"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Text_20_body">You will see:</text:p>
      <text:list xml:id="list1320978176" text:style-name="L33">
        <text:list-item>
          <text:p text:style-name="P37">PPID changes to 1 (or systemd PID).</text:p>
        </text:list-item>
      </text:list>
      <text:p text:style-name="Horizontal_20_Line"/>
      <text:h text:style-name="Heading_20_1" text:outline-level="1">🧾 Assignment 5: Mini Job Scheduler</text:h>
      <text:h text:style-name="Heading_20_3" text:outline-level="3">(Multiple Children + <text:span text:style-name="Source_20_Text">waitpid()</text:span> + Exit Status Handling)</text:h>
      <text:h text:style-name="Heading_20_2" text:outline-level="2">🎯 Real-Time Scenario</text:h>
      <text:p text:style-name="Text_20_body">A server runs multiple jobs and tracks their success.</text:p>
      <text:p text:style-name="Horizontal_20_Line"/>
      <text:h text:style-name="Heading_20_2" text:outline-level="2">🔧 Requirements</text:h>
      <text:list xml:id="list2169163932" text:style-name="L34">
        <text:list-item>
          <text:p text:style-name="P38">Create 3 children.</text:p>
        </text:list-item>
        <text:list-item>
          <text:p text:style-name="P38">Each child exits with different status.</text:p>
        </text:list-item>
        <text:list-item>
          <text:p text:style-name="P38">Parent uses <text:span text:style-name="Source_20_Text">waitpid()</text:span> to collect results individually.</text:p>
        </text:list-item>
      </text:list>
      <text:p text:style-name="Horizontal_20_Line"/>
      <text:h text:style-name="Heading_20_2" text:outline-level="2">💻 Code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sys/wait.h&gt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s[3];</text:span></text:p>
      <text:p text:style-name="P1"/>
      <text:p text:style-name="P1"><text:span text:style-name="Source_20_Text"><text:s text:c="4"/>for (int i = 0; i &lt; 3; i++) {</text:span></text:p>
      <text:p text:style-name="P1"><text:span text:style-name="Source_20_Text"><text:s text:c="8"/>if ((pids[i] = fork()) == 0) {</text:span></text:p>
      <text:p text:style-name="P1"><text:span text:style-name="Source_20_Text"><text:s text:c="12"/>printf("Child %d running\n", i+1);</text:span></text:p>
      <text:p text:style-name="P1"><text:span text:style-name="Source_20_Text"><text:s text:c="12"/>exit(i+1); <text:s text:c="2"/>// Return job ID as status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for (int i = 0; i &lt; 3; i++) {</text:span></text:p>
      <text:p text:style-name="P1"><text:span text:style-name="Source_20_Text"><text:s text:c="8"/>int status;</text:span></text:p>
      <text:p text:style-name="P1"><text:span text:style-name="Source_20_Text"><text:s text:c="8"/>waitpid(pids[i], &amp;status, 0);</text:span></text:p>
      <text:p text:style-name="P1"><text:span text:style-name="Source_20_Text"><text:s text:c="8"/>printf("Parent: Child exited with status %d\n",</text:span></text:p>
      <text:p text:style-name="P1"><text:soft-page-break/><text:span text:style-name="Source_20_Text"><text:s text:c="15"/>WEXITSTATUS(status)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1:41:56.285383975</meta:creation-date>
    <dc:date>2026-02-18T11:50:37.983369789</dc:date>
    <meta:editing-duration>PT8M43S</meta:editing-duration>
    <meta:editing-cycles>2</meta:editing-cycles>
    <meta:generator>LibreOffice/7.3.7.2$Linux_X86_64 LibreOffice_project/30$Build-2</meta:generator>
    <meta:document-statistic meta:table-count="6" meta:image-count="0" meta:object-count="0" meta:page-count="29" meta:paragraph-count="730" meta:word-count="2732" meta:character-count="14831" meta:non-whitespace-character-count="12247"/>
  </office:meta>
</office:document-meta>
</file>