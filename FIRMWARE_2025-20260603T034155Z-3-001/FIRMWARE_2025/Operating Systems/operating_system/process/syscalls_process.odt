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5cm" table:align="left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4.72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481cm" table:align="left"/>
    </style:style>
    <style:style style:name="Table2.A" style:family="table-column">
      <style:table-column-properties style:column-width="2.35cm"/>
    </style:style>
    <style:style style:name="Table2.B" style:family="table-column">
      <style:table-column-properties style:column-width="4.13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996cm" table:align="left"/>
    </style:style>
    <style:style style:name="Table3.A" style:family="table-column">
      <style:table-column-properties style:column-width="1.565cm"/>
    </style:style>
    <style:style style:name="Table3.B" style:family="table-column">
      <style:table-column-properties style:column-width="9.43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978cm" table:align="left"/>
    </style:style>
    <style:style style:name="Table4.A" style:family="table-column">
      <style:table-column-properties style:column-width="5.082cm"/>
    </style:style>
    <style:style style:name="Table4.B" style:family="table-column">
      <style:table-column-properties style:column-width="3.89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516cm" table:align="left"/>
    </style:style>
    <style:style style:name="Table5.A" style:family="table-column">
      <style:table-column-properties style:column-width="3.87cm"/>
    </style:style>
    <style:style style:name="Table5.B" style:family="table-column">
      <style:table-column-properties style:column-width="2.64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951cm" table:align="left"/>
    </style:style>
    <style:style style:name="Table6.A" style:family="table-column">
      <style:table-column-properties style:column-width="3.593cm"/>
    </style:style>
    <style:style style:name="Table6.B" style:family="table-column">
      <style:table-column-properties style:column-width="2.35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274cm" table:align="left"/>
    </style:style>
    <style:style style:name="Table7.A" style:family="table-column">
      <style:table-column-properties style:column-width="3.452cm"/>
    </style:style>
    <style:style style:name="Table7.B" style:family="table-column">
      <style:table-column-properties style:column-width="1.57cm"/>
    </style:style>
    <style:style style:name="Table7.C" style:family="table-column">
      <style:table-column-properties style:column-width="2.252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Source_20_Text">fork()</text:span> System Call</text:h>
      <text:h text:style-name="Heading_20_3" text:outline-level="3">📌 Description</text:h>
      <text:p text:style-name="Text_20_body"><text:span text:style-name="Source_20_Text">fork()</text:span> is used to <text:span text:style-name="Strong_20_Emphasis">create a new process</text:span>.<text:line-break/>The new process is called the <text:span text:style-name="Strong_20_Emphasis">child process</text:span>, and it is an <text:span text:style-name="Strong_20_Emphasis">exact copy</text:span> of the parent process (except PID).</text:p>
      <text:p text:style-name="P2"><text:span text:style-name="Source_20_Text">pid_t fork(void);</text:span></text:p>
      <text:p text:style-name="Horizontal_20_Line"/>
      <text:h text:style-name="Heading_20_3" text:outline-level="3">⚙️ Working of <text:span text:style-name="Source_20_Text">fork()</text:span></text:h>
      <text:p text:style-name="Text_20_body">When <text:span text:style-name="Source_20_Text">fork()</text:span> is called:</text:p>
      <text:list xml:id="list3894555676" text:style-name="L1">
        <text:list-item>
          <text:p text:style-name="P3">A <text:span text:style-name="Strong_20_Emphasis">child process</text:span> is created.</text:p>
        </text:list-item>
        <text:list-item>
          <text:p text:style-name="P3">Parent and child execute <text:span text:style-name="Strong_20_Emphasis">the same code</text:span> after <text:span text:style-name="Source_20_Text">fork()</text:span>.</text:p>
        </text:list-item>
        <text:list-item>
          <text:p text:style-name="P3">Return values distinguish them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turn Valu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0</text:span></text:p>
          </table:table-cell>
          <table:table-cell table:style-name="Table1.A1" office:value-type="string">
            <text:p text:style-name="Table_20_Contents">Child process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 0</text:span></text:p>
          </table:table-cell>
          <table:table-cell table:style-name="Table1.A1" office:value-type="string">
            <text:p text:style-name="Table_20_Contents">Parent process (child P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-1</text:span></text:p>
          </table:table-cell>
          <table:table-cell table:style-name="Table1.A1" office:value-type="string">
            <text:p text:style-name="Table_20_Contents">Fork failed</text:p>
          </table:table-cell>
        </table:table-row>
      </table:table>
      <text:p text:style-name="Horizontal_20_Line"/>
      <text:h text:style-name="Heading_20_3" text:outline-level="3">🧠 Key Points</text:h>
      <text:list xml:id="list4267131584" text:style-name="L2">
        <text:list-item>
          <text:p text:style-name="P4">Separate address space (copy-on-write)</text:p>
        </text:list-item>
        <text:list-item>
          <text:p text:style-name="P4">Child gets a <text:span text:style-name="Strong_20_Emphasis">new PID</text:span></text:p>
        </text:list-item>
        <text:list-item>
          <text:p text:style-name="P4">File descriptors are inherited</text:p>
        </text:list-item>
      </text:list>
      <text:p text:style-name="Horizontal_20_Line"/>
      <text:h text:style-name="Heading_20_3" text:outline-level="3">🧪 Exampl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</text:span></text:p>
      <text:p text:style-name="P1"><text:span text:style-name="Source_20_Text"><text:s text:c="8"/>printf("Child Process\n");</text:span></text:p>
      <text:p text:style-name="P1"><text:span text:style-name="Source_20_Text"><text:s text:c="4"/>else</text:span></text:p>
      <text:p text:style-name="P1"><text:span text:style-name="Source_20_Text"><text:s text:c="8"/>printf("Parent Process\n");</text:span></text:p>
      <text:p text:style-name="P1"/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<text:soft-page-break/>2. <text:span text:style-name="Source_20_Text">exec()</text:span> System Call</text:h>
      <text:h text:style-name="Heading_20_3" text:outline-level="3">📌 Description</text:h>
      <text:p text:style-name="Text_20_body"><text:span text:style-name="Source_20_Text">exec()</text:span> is used to <text:span text:style-name="Strong_20_Emphasis">replace the current process image</text:span> with a <text:span text:style-name="Strong_20_Emphasis">new program</text:span>.</text:p>
      <text:p text:style-name="Text_20_body">👉 <text:span text:style-name="Strong_20_Emphasis">No new process is created</text:span></text:p>
      <text:p text:style-name="Text_20_body">Common variants:</text:p>
      <text:list xml:id="list3398533984" text:style-name="L3">
        <text:list-item>
          <text:p text:style-name="P5"><text:span text:style-name="Source_20_Text">execl()</text:span></text:p>
        </text:list-item>
        <text:list-item>
          <text:p text:style-name="P5"><text:span text:style-name="Source_20_Text">execv()</text:span></text:p>
        </text:list-item>
        <text:list-item>
          <text:p text:style-name="P5"><text:span text:style-name="Source_20_Text">execvp()</text:span></text:p>
        </text:list-item>
      </text:list>
      <text:p text:style-name="Horizontal_20_Line"/>
      <text:h text:style-name="Heading_20_3" text:outline-level="3">⚙️ Working of <text:span text:style-name="Source_20_Text">exec()</text:span></text:h>
      <text:list xml:id="list203695098" text:style-name="L4">
        <text:list-item>
          <text:p text:style-name="P6">The calling process is <text:span text:style-name="Strong_20_Emphasis">overwritten</text:span></text:p>
        </text:list-item>
        <text:list-item>
          <text:p text:style-name="P6">New program starts execution from <text:span text:style-name="Source_20_Text">main()</text:span></text:p>
        </text:list-item>
        <text:list-item>
          <text:p text:style-name="P6">PID <text:span text:style-name="Strong_20_Emphasis">remains the same</text:span></text:p>
        </text:list-item>
        <text:list-item>
          <text:p text:style-name="P6">On success → <text:span text:style-name="Strong_20_Emphasis">does not return</text:span></text:p>
        </text:list-item>
        <text:list-item>
          <text:p text:style-name="P6">On failure → returns <text:span text:style-name="Source_20_Text">-1</text:span></text:p>
        </text:list-item>
      </text:list>
      <text:p text:style-name="Horizontal_20_Line"/>
      <text:h text:style-name="Heading_20_3" text:outline-level="3">🧠 Key Points</text:h>
      <text:list xml:id="list3648293268" text:style-name="L5">
        <text:list-item>
          <text:p text:style-name="P7">Used after <text:span text:style-name="Source_20_Text">fork()</text:span> (parent → child → exec)</text:p>
        </text:list-item>
        <text:list-item>
          <text:p text:style-name="P7">Memory, stack, code are replaced</text:p>
        </text:list-item>
        <text:list-item>
          <text:p text:style-name="P7">File descriptors remain open (unless marked close-on-exec)</text:p>
        </text:list-item>
      </text:list>
      <text:p text:style-name="Horizontal_20_Line"/>
      <text:h text:style-name="Heading_20_3" text:outline-level="3">🧪 Exampl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/>
      <text:p text:style-name="P1"><text:span text:style-name="Source_20_Text">int main() {</text:span></text:p>
      <text:p text:style-name="P1"><text:span text:style-name="Source_20_Text"><text:s text:c="4"/>printf("Before exec\n");</text:span></text:p>
      <text:p text:style-name="P1"><text:span text:style-name="Source_20_Text"><text:s text:c="4"/>execl("/bin/ls", "ls", NULL);</text:span></text:p>
      <text:p text:style-name="P1"><text:span text:style-name="Source_20_Text"><text:s text:c="4"/>printf("This will not execute\n"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<text:soft-page-break/>3. <text:span text:style-name="Source_20_Text">wait()</text:span> System Call</text:h>
      <text:h text:style-name="Heading_20_3" text:outline-level="3">📌 Description</text:h>
      <text:p text:style-name="Text_20_body"><text:span text:style-name="Source_20_Text">wait()</text:span> makes the <text:span text:style-name="Strong_20_Emphasis">parent process wait</text:span> until <text:span text:style-name="Strong_20_Emphasis">child process terminates</text:span>.</text:p>
      <text:p text:style-name="P2"><text:span text:style-name="Source_20_Text">pid_t wait(int *status);</text:span></text:p>
      <text:p text:style-name="Horizontal_20_Line"/>
      <text:h text:style-name="Heading_20_3" text:outline-level="3">⚙️ Working of <text:span text:style-name="Source_20_Text">wait()</text:span></text:h>
      <text:list xml:id="list1506783699" text:style-name="L6">
        <text:list-item>
          <text:p text:style-name="P8">Parent is <text:span text:style-name="Strong_20_Emphasis">blocked</text:span></text:p>
        </text:list-item>
        <text:list-item>
          <text:p text:style-name="P8">Child finishes execution</text:p>
        </text:list-item>
        <text:list-item>
          <text:p text:style-name="P8">Parent resumes</text:p>
        </text:list-item>
        <text:list-item>
          <text:p text:style-name="P8">Child exit status is collected</text:p>
        </text:list-item>
        <text:list-item>
          <text:p text:style-name="P8">Prevents <text:span text:style-name="Strong_20_Emphasis">zombie process</text:span></text:p>
        </text:list-item>
      </text:list>
      <text:p text:style-name="Horizontal_20_Line"/>
      <text:h text:style-name="Heading_20_3" text:outline-level="3">🧠 Key Points</text:h>
      <text:list xml:id="list2319386483" text:style-name="L7">
        <text:list-item>
          <text:p text:style-name="P9">Synchronization between parent &amp; child</text:p>
        </text:list-item>
        <text:list-item>
          <text:p text:style-name="P9">Parent gets child’s termination status</text:p>
        </text:list-item>
        <text:list-item>
          <text:p text:style-name="P9">Returns child PID</text:p>
        </text:list-item>
      </text:list>
      <text:p text:style-name="Horizontal_20_Line"/>
      <text:h text:style-name="Heading_20_3" text:outline-level="3">🧪 Exampl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/>
      <text:p text:style-name="P1"><text:span text:style-name="Source_20_Text">int main() {</text:span></text:p>
      <text:p text:style-name="P1"><text:span text:style-name="Source_20_Text"><text:s text:c="4"/>if (fork() == 0) {</text:span></text:p>
      <text:p text:style-name="P1"><text:span text:style-name="Source_20_Text"><text:s text:c="8"/>printf("Child running\n");</text:span></text:p>
      <text:p text:style-name="P1"><text:span text:style-name="Source_20_Text"><text:s text:c="4"/>} else {</text:span></text:p>
      <text:p text:style-name="P1"><text:span text:style-name="Source_20_Text"><text:s text:c="8"/>wait(NULL);</text:span></text:p>
      <text:p text:style-name="P1"><text:span text:style-name="Source_20_Text"><text:s text:c="8"/>printf("Parent resumes\n");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4. <text:span text:style-name="Source_20_Text">exit()</text:span> System Call</text:h>
      <text:h text:style-name="Heading_20_3" text:outline-level="3">📌 Description</text:h>
      <text:p text:style-name="Text_20_body"><text:span text:style-name="Source_20_Text">exit()</text:span> terminates the <text:span text:style-name="Strong_20_Emphasis">calling process</text:span> and returns a <text:span text:style-name="Strong_20_Emphasis">status code</text:span> to the parent.</text:p>
      <text:p text:style-name="P2"><text:span text:style-name="Source_20_Text">void exit(int status);</text:span></text:p>
      <text:p text:style-name="Horizontal_20_Line"><text:soft-page-break/></text:p>
      <text:h text:style-name="Heading_20_3" text:outline-level="3">⚙️ Working of <text:span text:style-name="Source_20_Text">exit()</text:span></text:h>
      <text:list xml:id="list37942652" text:style-name="L8">
        <text:list-item>
          <text:p text:style-name="P10">Process terminates</text:p>
        </text:list-item>
        <text:list-item>
          <text:p text:style-name="P10">Open files are closed</text:p>
        </text:list-item>
        <text:list-item>
          <text:p text:style-name="P10">Memory is released</text:p>
        </text:list-item>
        <text:list-item>
          <text:p text:style-name="P10">Exit status is sent to parent</text:p>
        </text:list-item>
        <text:list-item>
          <text:p text:style-name="P10">Parent collects it using <text:span text:style-name="Source_20_Text">wait()</text:span></text:p>
        </text:list-item>
      </text:list>
      <text:p text:style-name="Horizontal_20_Line"/>
      <text:h text:style-name="Heading_20_3" text:outline-level="3">🧠 Key Points</text:h>
      <text:list xml:id="list2364222799" text:style-name="L9">
        <text:list-item>
          <text:p text:style-name="P11">Normal termination</text:p>
        </text:list-item>
        <text:list-item>
          <text:p text:style-name="P11">Status value (0 → success)</text:p>
        </text:list-item>
        <text:list-item>
          <text:p text:style-name="P11">Triggers cleanup handlers</text:p>
        </text:list-item>
      </text:list>
      <text:p text:style-name="Horizontal_20_Line"/>
      <text:h text:style-name="Heading_20_3" text:outline-level="3">🧪 Example</text:h>
      <text:p text:style-name="P1"><text:span text:style-name="Source_20_Text">#include &lt;stdio.h&gt;</text:span></text:p>
      <text:p text:style-name="P1"><text:span text:style-name="Source_20_Text">#include &lt;stdlib.h&gt;</text:span></text:p>
      <text:p text:style-name="P1"/>
      <text:p text:style-name="P1"><text:span text:style-name="Source_20_Text">int main() {</text:span></text:p>
      <text:p text:style-name="P1"><text:span text:style-name="Source_20_Text"><text:s text:c="4"/>printf("Process exiting\n");</text:span></text:p>
      <text:p text:style-name="P1"><text:span text:style-name="Source_20_Text"><text:s text:c="4"/>exit(0);</text:span></text:p>
      <text:p text:style-name="P2"><text:span text:style-name="Source_20_Text">}</text:span></text:p>
      <text:p text:style-name="Horizontal_20_Line"/>
      <text:h text:style-name="Heading_20_2" text:outline-level="2">🔁 Combined Flow (Very Important for Exams)</text:h>
      <text:p text:style-name="P1"><text:span text:style-name="Source_20_Text">Parent Process</text:span></text:p>
      <text:p text:style-name="P1"><text:span text:style-name="Source_20_Text"><text:s text:c="5"/>|</text:span></text:p>
      <text:p text:style-name="P1"><text:span text:style-name="Source_20_Text"><text:s text:c="3"/>fork()</text:span></text:p>
      <text:p text:style-name="P1"><text:span text:style-name="Source_20_Text"><text:s text:c="5"/>|</text:span></text:p>
      <text:p text:style-name="P1"><text:span text:style-name="Source_20_Text"><text:s/>Child Process</text:span></text:p>
      <text:p text:style-name="P1"><text:span text:style-name="Source_20_Text"><text:s text:c="5"/>|</text:span></text:p>
      <text:p text:style-name="P1"><text:span text:style-name="Source_20_Text"><text:s text:c="3"/>exec()</text:span></text:p>
      <text:p text:style-name="P1"><text:span text:style-name="Source_20_Text"><text:s text:c="5"/>|</text:span></text:p>
      <text:p text:style-name="P1"><text:span text:style-name="Source_20_Text"><text:s/>New Program Runs</text:span></text:p>
      <text:p text:style-name="P1"><text:span text:style-name="Source_20_Text"><text:s text:c="5"/>|</text:span></text:p>
      <text:p text:style-name="P1"><text:span text:style-name="Source_20_Text"><text:s text:c="3"/>exit()</text:span></text:p>
      <text:p text:style-name="P1"><text:span text:style-name="Source_20_Text"><text:s text:c="5"/>|</text:span></text:p>
      <text:p text:style-name="P2"><text:span text:style-name="Source_20_Text"><text:s/>Parent waits → wait()</text:span></text:p>
      <text:p text:style-name="Horizontal_20_Line"/>
      <text:h text:style-name="Heading_20_2" text:outline-level="2"><text:soft-page-break/>📊 Quick Comparison Tab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ystem Call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fork()</text:span></text:p>
          </table:table-cell>
          <table:table-cell table:style-name="Table2.A1" office:value-type="string">
            <text:p text:style-name="Table_20_Contents">Create new process</text:p>
          </table:table-cell>
        </table:table-row>
        <table:table-row>
          <table:table-cell table:style-name="Table2.A1" office:value-type="string">
            <text:p text:style-name="Table_20_Contents"><text:span text:style-name="Source_20_Text">exec()</text:span></text:p>
          </table:table-cell>
          <table:table-cell table:style-name="Table2.A1" office:value-type="string">
            <text:p text:style-name="Table_20_Contents">Replace process image</text:p>
          </table:table-cell>
        </table:table-row>
        <table:table-row>
          <table:table-cell table:style-name="Table2.A1" office:value-type="string">
            <text:p text:style-name="Table_20_Contents"><text:span text:style-name="Source_20_Text">wait()</text:span></text:p>
          </table:table-cell>
          <table:table-cell table:style-name="Table2.A1" office:value-type="string">
            <text:p text:style-name="Table_20_Contents">Parent waits for child</text:p>
          </table:table-cell>
        </table:table-row>
        <table:table-row>
          <table:table-cell table:style-name="Table2.A1" office:value-type="string">
            <text:p text:style-name="Table_20_Contents"><text:span text:style-name="Source_20_Text">exit()</text:span></text:p>
          </table:table-cell>
          <table:table-cell table:style-name="Table2.A1" office:value-type="string">
            <text:p text:style-name="Table_20_Contents">Terminate process</text:p>
          </table:table-cell>
        </table:table-row>
      </table:table>
      <text:p text:style-name="Horizontal_20_Line"/>
      <text:p text:style-name="Text_20_body">If you want, I can also provide:<text:line-break/>✔ <text:span text:style-name="Strong_20_Emphasis">Real-time embedded use case</text:span><text:line-break/>✔ <text:span text:style-name="Strong_20_Emphasis">fork + exec + wait full program</text:span><text:line-break/>✔ <text:span text:style-name="Strong_20_Emphasis">Process state diagram</text:span><text:line-break/>✔ <text:span text:style-name="Strong_20_Emphasis">Interview MCQs</text:span></text:p>
      <text:p text:style-name="Text_20_body">Just tell me 👍</text:p>
      <text:p text:style-name="Text_20_body">can you povide an real time example to have these apis with complete code</text:p>
      <text:p text:style-name="Text_20_body">Absolutely 👍<text:line-break/>Here’s a <text:span text:style-name="Strong_20_Emphasis">real-time, industry-style example</text:span> that clearly shows <text:span text:style-name="Strong_20_Emphasis"><text:span text:style-name="Source_20_Text">fork()</text:span></text:span><text:span text:style-name="Strong_20_Emphasis"> + </text:span><text:span text:style-name="Strong_20_Emphasis"><text:span text:style-name="Source_20_Text">exec()</text:span></text:span><text:span text:style-name="Strong_20_Emphasis"> + </text:span><text:span text:style-name="Strong_20_Emphasis"><text:span text:style-name="Source_20_Text">wait()</text:span></text:span><text:span text:style-name="Strong_20_Emphasis"> + </text:span><text:span text:style-name="Strong_20_Emphasis"><text:span text:style-name="Source_20_Text">exit()</text:span></text:span><text:span text:style-name="Strong_20_Emphasis"> working together</text:span>, with <text:span text:style-name="Strong_20_Emphasis">complete, compilable code</text:span> and <text:span text:style-name="Strong_20_Emphasis">clear explanation</text:span>.</text:p>
      <text:p text:style-name="Horizontal_20_Line"/>
      <text:h text:style-name="Heading_20_1" text:outline-level="1">✅ Real-Time Example</text:h>
      <text:h text:style-name="Heading_20_2" text:outline-level="2"><text:span text:style-name="Strong_20_Emphasis">Embedded Linux Device Health Monitor</text:span></text:h>
      <text:h text:style-name="Heading_20_3" text:outline-level="3">📌 Scenario (Very Realistic)</text:h>
      <text:p text:style-name="Text_20_body">In an <text:span text:style-name="Strong_20_Emphasis">embedded Linux system</text:span> (router, gateway, industrial controller):</text:p>
      <text:list xml:id="list1017023673" text:style-name="L10">
        <text:list-item>
          <text:p text:style-name="P12"><text:span text:style-name="Strong_20_Emphasis">Parent process</text:span> = <text:span text:style-name="Emphasis">System Manager</text:span></text:p>
        </text:list-item>
        <text:list-item>
          <text:p text:style-name="P12"><text:span text:style-name="Strong_20_Emphasis">Child process</text:span> = <text:span text:style-name="Emphasis">Health Diagnostic Tool</text:span></text:p>
        </text:list-item>
        <text:list-item>
          <text:p text:style-name="P12">Parent creates a child</text:p>
        </text:list-item>
        <text:list-item>
          <text:p text:style-name="P12">Child runs an external diagnostic program using <text:span text:style-name="Source_20_Text">exec()</text:span></text:p>
        </text:list-item>
        <text:list-item>
          <text:p text:style-name="P12">Parent waits for result using <text:span text:style-name="Source_20_Text">wait()</text:span></text:p>
        </text:list-item>
        <text:list-item>
          <text:p text:style-name="P12">Child exits with status</text:p>
        </text:list-item>
      </text:list>
      <text:p text:style-name="Text_20_body">This pattern is <text:span text:style-name="Strong_20_Emphasis">extremely common</text:span> in:</text:p>
      <text:list xml:id="list884093057" text:style-name="L11">
        <text:list-item>
          <text:p text:style-name="P13">Embedded Linux</text:p>
        </text:list-item>
        <text:list-item>
          <text:p text:style-name="P13">Automotive ECUs</text:p>
        </text:list-item>
        <text:list-item>
          <text:p text:style-name="P13">Network appliances</text:p>
        </text:list-item>
        <text:list-item>
          <text:p text:style-name="P13">System daemons</text:p>
        </text:list-item>
      </text:list>
      <text:p text:style-name="Horizontal_20_Line"><text:soft-page-break/></text:p>
      <text:h text:style-name="Heading_20_2" text:outline-level="2">🧩 Program Design</text:h>
      <text:h text:style-name="Heading_20_3" text:outline-level="3">Rol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rocess</text:p>
            </table:table-cell>
            <table:table-cell table:style-name="Table3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3.A1" office:value-type="string">
            <text:p text:style-name="Table_20_Contents">Parent</text:p>
          </table:table-cell>
          <table:table-cell table:style-name="Table3.A1" office:value-type="string">
            <text:p text:style-name="Table_20_Contents">Launch diagnostics and wait</text:p>
          </table:table-cell>
        </table:table-row>
        <table:table-row>
          <table:table-cell table:style-name="Table3.A1" office:value-type="string">
            <text:p text:style-name="Table_20_Contents">Child</text:p>
          </table:table-cell>
          <table:table-cell table:style-name="Table3.A1" office:value-type="string">
            <text:p text:style-name="Table_20_Contents">Execute system command (<text:span text:style-name="Source_20_Text">ls</text:span>, <text:span text:style-name="Source_20_Text">ping</text:span>, or custom tool)</text:p>
          </table:table-cell>
        </table:table-row>
      </table:table>
      <text:p text:style-name="Horizontal_20_Line"/>
      <text:h text:style-name="Heading_20_2" text:outline-level="2">🧪 Complete Working Code (Single File)</text:h>
      <text:h text:style-name="Heading_20_3" text:outline-level="3">📁 File: <text:span text:style-name="Source_20_Text">system_monitor.c</text:span>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><text:span text:style-name="Source_20_Text">#include &lt;sys/wait.h&gt;</text:span></text:p>
      <text:p text:style-name="P1"><text:span text:style-name="Source_20_Text">#include &lt;stdlib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;</text:span></text:p>
      <text:p text:style-name="P1"><text:span text:style-name="Source_20_Text"><text:s text:c="4"/>int status;</text:span></text:p>
      <text:p text:style-name="P1"/>
      <text:p text:style-name="P1"><text:span text:style-name="Source_20_Text"><text:s text:c="4"/>printf("System Manager: Starting system health check...\n");</text:span></text:p>
      <text:p text:style-name="P1"/>
      <text:p text:style-name="P1"><text:span text:style-name="Source_20_Text"><text:s text:c="4"/>/* Create a child process */</text:span></text:p>
      <text:p text:style-name="P1"><text:span text:style-name="Source_20_Text"><text:s text:c="4"/>pid = fork();</text:span></text:p>
      <text:p text:style-name="P1"/>
      <text:p text:style-name="P1"><text:span text:style-name="Source_20_Text"><text:s text:c="4"/>if (pid &lt; 0) {</text:span></text:p>
      <text:p text:style-name="P1"><text:span text:style-name="Source_20_Text"><text:s text:c="8"/>/* Fork failed */</text:span></text:p>
      <text:p text:style-name="P1"><text:span text:style-name="Source_20_Text"><text:s text:c="8"/>perror("fork failed");</text:span></text:p>
      <text:p text:style-name="P1"><text:span text:style-name="Source_20_Text"><text:s text:c="8"/>exit(1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if (pid == 0) {</text:span></text:p>
      <text:p text:style-name="P1"><text:span text:style-name="Source_20_Text"><text:s text:c="8"/>/* Child Process */</text:span></text:p>
      <text:p text:style-name="P1"><text:span text:style-name="Source_20_Text"><text:s text:c="8"/>printf("Diagnostic Tool (Child): Running diagnostics...\n");</text:span></text:p>
      <text:p text:style-name="P1"/>
      <text:p text:style-name="P1"><text:span text:style-name="Source_20_Text"><text:s text:c="8"/>/* Replace child with external program */</text:span></text:p>
      <text:p text:style-name="P1"><text:span text:style-name="Source_20_Text"><text:s text:c="8"/>execl("/bin/ls", "ls", "-l", "/", NULL);</text:span></text:p>
      <text:p text:style-name="P1"/>
      <text:p text:style-name="P1"><text:span text:style-name="Source_20_Text"><text:s text:c="8"/>/* If exec fails */</text:span></text:p>
      <text:p text:style-name="P1"><text:span text:style-name="Source_20_Text"><text:s text:c="8"/>perror("exec failed");</text:span></text:p>
      <text:p text:style-name="P1"><text:span text:style-name="Source_20_Text"><text:s text:c="8"/>exit(2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else {</text:span></text:p>
      <text:p text:style-name="P1"><text:span text:style-name="Source_20_Text"><text:s text:c="8"/>/* Parent Process */</text:span></text:p>
      <text:p text:style-name="P1"><text:span text:style-name="Source_20_Text"><text:s text:c="8"/>printf("System Manager (Parent): Waiting for diagnostic tool...\n");</text:span></text:p>
      <text:p text:style-name="P1"/>
      <text:p text:style-name="P1"><text:span text:style-name="Source_20_Text"><text:s text:c="8"/>wait(&amp;status);</text:span></text:p>
      <text:p text:style-name="P1"/>
      <text:p text:style-name="P1"><text:span text:style-name="Source_20_Text"><text:s text:c="8"/>if (WIFEXITED(status)) {</text:span></text:p>
      <text:p text:style-name="P1"><text:span text:style-name="Source_20_Text"><text:s text:c="12"/>printf("System Manager: Diagnostic completed successfully\n");</text:span></text:p>
      <text:p text:style-name="P1"><text:span text:style-name="Source_20_Text"><text:s text:c="12"/>printf("Exit Status: %d\n", WEXITSTATUS(status));</text:span></text:p>
      <text:p text:style-name="P1"><text:span text:style-name="Source_20_Text"><text:s text:c="8"/>} else {</text:span></text:p>
      <text:p text:style-name="P1"><text:span text:style-name="Source_20_Text"><text:s text:c="12"/>printf("System Manager: Diagnostic terminated abnormally\n");</text:span></text:p>
      <text:p text:style-name="P1"><text:span text:style-name="Source_20_Text"><text:s text:c="8"/>}</text:span></text:p>
      <text:p text:style-name="P1"><text:soft-page-break/><text:span text:style-name="Source_20_Text"><text:s text:c="4"/>}</text:span></text:p>
      <text:p text:style-name="P1"/>
      <text:p text:style-name="P1"><text:span text:style-name="Source_20_Text"><text:s text:c="4"/>printf("System Manager: Health check finished.\n"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2" text:outline-level="2">▶️ How to Compile &amp; Run</text:h>
      <text:p text:style-name="P1"><text:span text:style-name="Source_20_Text">gcc system_monitor.c -o system_monitor</text:span></text:p>
      <text:p text:style-name="P2"><text:span text:style-name="Source_20_Text">./system_monitor</text:span></text:p>
      <text:p text:style-name="Horizontal_20_Line"/>
      <text:h text:style-name="Heading_20_2" text:outline-level="2">🔍 What Happens Internally (Step-by-Step)</text:h>
      <text:h text:style-name="Heading_20_3" text:outline-level="3">🧠 Execution Flow</text:h>
      <text:p text:style-name="P1"><text:span text:style-name="Source_20_Text">Parent Process starts</text:span></text:p>
      <text:p text:style-name="P1"><text:span text:style-name="Source_20_Text"><text:s text:c="7"/>|</text:span></text:p>
      <text:p text:style-name="P1"><text:span text:style-name="Source_20_Text"><text:s text:c="5"/>fork()</text:span></text:p>
      <text:p text:style-name="P1"><text:span text:style-name="Source_20_Text"><text:s text:c="7"/>|</text:span></text:p>
      <text:p text:style-name="P1"><text:span text:style-name="Source_20_Text"><text:s text:c="3"/>----------------</text:span></text:p>
      <text:p text:style-name="P1"><text:span text:style-name="Source_20_Text"><text:s text:c="3"/>| <text:s text:c="13"/>|</text:span></text:p>
      <text:p text:style-name="P1"><text:span text:style-name="Source_20_Text"><text:s/>Parent <text:s text:c="7"/>Child</text:span></text:p>
      <text:p text:style-name="P1"><text:span text:style-name="Source_20_Text"><text:s text:c="3"/>| <text:s text:c="13"/>|</text:span></text:p>
      <text:p text:style-name="P1"><text:span text:style-name="Source_20_Text"><text:s/>wait() <text:s text:c="7"/>exec("/bin/ls")</text:span></text:p>
      <text:p text:style-name="P1"><text:span text:style-name="Source_20_Text"><text:s text:c="3"/>| <text:s text:c="13"/>|</text:span></text:p>
      <text:p text:style-name="P1"><text:span text:style-name="Source_20_Text"><text:s/>resumes <text:s text:c="7"/>ls runs</text:span></text:p>
      <text:p text:style-name="P1"><text:span text:style-name="Source_20_Text"><text:s text:c="3"/>| <text:s text:c="13"/>|</text:span></text:p>
      <text:p text:style-name="P2"><text:span text:style-name="Source_20_Text"><text:s/>reads status <text:s text:c="2"/>exit()</text:span></text:p>
      <text:p text:style-name="Horizontal_20_Line"/>
      <text:h text:style-name="Heading_20_3" text:outline-level="3">🧩 API Usage Breakdown</text:h>
      <text:h text:style-name="Heading_20_3" text:outline-level="3">1️⃣ <text:span text:style-name="Source_20_Text">fork()</text:span></text:h>
      <text:list xml:id="list628484805" text:style-name="L12">
        <text:list-item>
          <text:p text:style-name="P14">Creates child process</text:p>
        </text:list-item>
        <text:list-item>
          <text:p text:style-name="P14">Parent and child run same code</text:p>
        </text:list-item>
        <text:list-item>
          <text:p text:style-name="P14">Differentiated using return value</text:p>
        </text:list-item>
      </text:list>
      <text:p text:style-name="Horizontal_20_Line"/>
      <text:h text:style-name="Heading_20_3" text:outline-level="3">2️⃣ <text:span text:style-name="Source_20_Text">exec()</text:span></text:h>
      <text:list xml:id="list3379964362" text:style-name="L13">
        <text:list-item>
          <text:p text:style-name="P15">Child replaces itself with <text:span text:style-name="Source_20_Text">/bin/ls</text:span></text:p>
        </text:list-item>
        <text:list-item>
          <text:p text:style-name="P15">No new process created</text:p>
        </text:list-item>
        <text:list-item>
          <text:p text:style-name="P15">PID remains same</text:p>
        </text:list-item>
        <text:list-item>
          <text:p text:style-name="P15">On success → never returns</text:p>
        </text:list-item>
      </text:list>
      <text:p text:style-name="Horizontal_20_Line"/>
      <text:h text:style-name="Heading_20_3" text:outline-level="3"><text:soft-page-break/>3️⃣ <text:span text:style-name="Source_20_Text">wait()</text:span></text:h>
      <text:list xml:id="list94065357" text:style-name="L14">
        <text:list-item>
          <text:p text:style-name="P16">Parent blocks</text:p>
        </text:list-item>
        <text:list-item>
          <text:p text:style-name="P16">Prevents zombie process</text:p>
        </text:list-item>
        <text:list-item>
          <text:p text:style-name="P16">Collects child exit status</text:p>
        </text:list-item>
      </text:list>
      <text:p text:style-name="Horizontal_20_Line"/>
      <text:h text:style-name="Heading_20_3" text:outline-level="3">4️⃣ <text:span text:style-name="Source_20_Text">exit()</text:span></text:h>
      <text:list xml:id="list2920817822" text:style-name="L15">
        <text:list-item>
          <text:p text:style-name="P17">Child sends status to parent</text:p>
        </text:list-item>
        <text:list-item>
          <text:p text:style-name="P17">Parent reads using <text:span text:style-name="Source_20_Text">WEXITSTATUS</text:span></text:p>
        </text:list-item>
      </text:list>
      <text:p text:style-name="Horizontal_20_Line"/>
      <text:h text:style-name="Heading_20_2" text:outline-level="2">📊 Sample Output</text:h>
      <text:p text:style-name="P1"><text:span text:style-name="Source_20_Text">System Manager: Starting system health check...</text:span></text:p>
      <text:p text:style-name="P1"><text:span text:style-name="Source_20_Text">Diagnostic Tool (Child): Running diagnostics...</text:span></text:p>
      <text:p text:style-name="P1"><text:span text:style-name="Source_20_Text">(total directory listing)</text:span></text:p>
      <text:p text:style-name="P1"><text:span text:style-name="Source_20_Text">System Manager (Parent): Waiting for diagnostic tool...</text:span></text:p>
      <text:p text:style-name="P1"><text:span text:style-name="Source_20_Text">System Manager: Diagnostic completed successfully</text:span></text:p>
      <text:p text:style-name="P1"><text:span text:style-name="Source_20_Text">Exit Status: 0</text:span></text:p>
      <text:p text:style-name="P2"><text:span text:style-name="Source_20_Text">System Manager: Health check finished.</text:span></text:p>
      <text:p text:style-name="Horizontal_20_Line"/>
      <text:h text:style-name="Heading_20_2" text:outline-level="2">🎯 Why This Example Is IMPORTANT</text:h>
      <text:p text:style-name="Text_20_body">✔ Matches <text:span text:style-name="Strong_20_Emphasis">real embedded systems</text:span><text:line-break/>✔ Demonstrates <text:span text:style-name="Strong_20_Emphasis">all 4 syscalls together</text:span><text:line-break/>✔ Frequently asked in <text:span text:style-name="Strong_20_Emphasis">interviews &amp; exams</text:span><text:line-break/>✔ Shows <text:span text:style-name="Strong_20_Emphasis">process replacement + synchronization</text:span></text:p>
      <text:p text:style-name="Horizontal_20_Line"/>
      <text:h text:style-name="Heading_20_2" text:outline-level="2">🔥 Variations I Can Also Provide</text:h>
      <text:list xml:id="list2710080771" text:style-name="L16">
        <text:list-item>
          <text:p text:style-name="P18">Same example using <text:span text:style-name="Strong_20_Emphasis"><text:span text:style-name="Source_20_Text">execvp()</text:span></text:span></text:p>
        </text:list-item>
        <text:list-item>
          <text:p text:style-name="P18"><text:span text:style-name="Strong_20_Emphasis">Ping-based network health check</text:span></text:p>
        </text:list-item>
        <text:list-item>
          <text:p text:style-name="P18"><text:span text:style-name="Strong_20_Emphasis">Sensor reader → controller process</text:span></text:p>
        </text:list-item>
        <text:list-item>
          <text:p text:style-name="P18"><text:span text:style-name="Strong_20_Emphasis">fork() &amp;&amp; fork() output explanation</text:span></text:p>
        </text:list-item>
        <text:list-item>
          <text:p text:style-name="P18"><text:span text:style-name="Strong_20_Emphasis">Zombie vs Orphan demo</text:span></text:p>
        </text:list-item>
        <text:list-item>
          <text:p text:style-name="P18"><text:span text:style-name="Strong_20_Emphasis">QNX-compatible version</text:span></text:p>
        </text:list-item>
      </text:list>
      <text:p text:style-name="Text_20_body">Just tell me what you want next 😊</text:p>
      <text:p text:style-name="Text_20_body">WIFEXITED, WEXITSTATUS what is the purpose and explain</text:p>
      <text:p text:style-name="Text_20_body"><text:soft-page-break/>Great question 👍<text:line-break/>These two macros are <text:span text:style-name="Strong_20_Emphasis">very important</text:span> whenever you use <text:span text:style-name="Source_20_Text">wait()</text:span> / <text:span text:style-name="Source_20_Text">waitpid()</text:span> in Linux or embedded systems.</text:p>
      <text:p text:style-name="Horizontal_20_Line"/>
      <text:h text:style-name="Heading_20_1" text:outline-level="1">🔹 <text:span text:style-name="Source_20_Text">WIFEXITED</text:span> and <text:span text:style-name="Source_20_Text">WEXITSTATUS</text:span></text:h>
      <text:p text:style-name="Text_20_body">They are <text:span text:style-name="Strong_20_Emphasis">macros</text:span> defined in:</text:p>
      <text:p text:style-name="P2"><text:span text:style-name="Source_20_Text">#include &lt;sys/wait.h&gt;</text:span></text:p>
      <text:p text:style-name="Text_20_body">They are used to <text:span text:style-name="Strong_20_Emphasis">analyze how a child process terminated</text:span>.</text:p>
      <text:p text:style-name="Horizontal_20_Line"/>
      <text:h text:style-name="Heading_20_2" text:outline-level="2">1️⃣ <text:span text:style-name="Source_20_Text">WIFEXITED(status)</text:span></text:h>
      <text:h text:style-name="Heading_20_3" text:outline-level="3">📌 Purpose</text:h>
      <text:p text:style-name="Text_20_body">Checks <text:span text:style-name="Strong_20_Emphasis">whether the child process terminated normally</text:span> (i.e., by calling <text:span text:style-name="Source_20_Text">exit()</text:span> or returning from <text:span text:style-name="Source_20_Text">main()</text:span>).</text:p>
      <text:p text:style-name="Horizontal_20_Line"/>
      <text:h text:style-name="Heading_20_3" text:outline-level="3">🔍 What it Returns</text:h>
      <text:list xml:id="list2559069787" text:style-name="L17">
        <text:list-item>
          <text:p text:style-name="P19"><text:span text:style-name="Strong_20_Emphasis">Non-zero (true)</text:span> → child exited normally</text:p>
        </text:list-item>
        <text:list-item>
          <text:p text:style-name="P19"><text:span text:style-name="Strong_20_Emphasis">0 (false)</text:span> → child did NOT exit normally<text:line-break/>(may have crashed or was killed by a signal)</text:p>
        </text:list-item>
      </text:list>
      <text:p text:style-name="Horizontal_20_Line"/>
      <text:h text:style-name="Heading_20_3" text:outline-level="3">🧠 Why it is Needed</text:h>
      <text:p text:style-name="Text_20_body">Before reading the exit code, the parent must <text:span text:style-name="Strong_20_Emphasis">ensure normal termination</text:span>.<text:line-break/>Otherwise, reading exit status is <text:span text:style-name="Strong_20_Emphasis">invalid</text:span>.</text:p>
      <text:p text:style-name="Horizontal_20_Line"/>
      <text:h text:style-name="Heading_20_3" text:outline-level="3">🧪 Example</text:h>
      <text:p text:style-name="P1"><text:span text:style-name="Source_20_Text">if (WIFEXITED(status)) {</text:span></text:p>
      <text:p text:style-name="P1"><text:span text:style-name="Source_20_Text"><text:s text:c="4"/>printf("Child exited normally\n");</text:span></text:p>
      <text:p text:style-name="P2"><text:span text:style-name="Source_20_Text">}</text:span></text:p>
      <text:p text:style-name="Horizontal_20_Line"/>
      <text:h text:style-name="Heading_20_2" text:outline-level="2">2️⃣ <text:span text:style-name="Source_20_Text">WEXITSTATUS(status)</text:span></text:h>
      <text:h text:style-name="Heading_20_3" text:outline-level="3">📌 Purpose</text:h>
      <text:p text:style-name="Text_20_body">Extracts the <text:span text:style-name="Strong_20_Emphasis">exit code</text:span> that the child process passed to <text:span text:style-name="Source_20_Text">exit()</text:span>.</text:p>
      <text:p text:style-name="Horizontal_20_Line"><text:soft-page-break/></text:p>
      <text:h text:style-name="Heading_20_3" text:outline-level="3">🔍 What it Returns</text:h>
      <text:list xml:id="list118800019" text:style-name="L18">
        <text:list-item>
          <text:p text:style-name="P20">An integer value <text:span text:style-name="Strong_20_Emphasis">0–255</text:span></text:p>
        </text:list-item>
        <text:list-item>
          <text:p text:style-name="P20">Valid <text:span text:style-name="Strong_20_Emphasis">ONLY if</text:span> <text:span text:style-name="Source_20_Text">WIFEXITED(status)</text:span> is true</text:p>
        </text:list-item>
      </text:list>
      <text:p text:style-name="Horizontal_20_Line"/>
      <text:h text:style-name="Heading_20_3" text:outline-level="3">🧠 Why it is Needed</text:h>
      <text:p text:style-name="Text_20_body"><text:span text:style-name="Source_20_Text">wait()</text:span> stores <text:span text:style-name="Strong_20_Emphasis">encoded information</text:span> in <text:span text:style-name="Source_20_Text">status</text:span>.<text:line-break/>You <text:span text:style-name="Strong_20_Emphasis">cannot read it directly</text:span>—this macro decodes it safely.</text:p>
      <text:p text:style-name="Horizontal_20_Line"/>
      <text:h text:style-name="Heading_20_3" text:outline-level="3">🧪 Example</text:h>
      <text:p text:style-name="P1"><text:span text:style-name="Source_20_Text">int exit_code = WEXITSTATUS(status);</text:span></text:p>
      <text:p text:style-name="P2"><text:span text:style-name="Source_20_Text">printf("Child exit code: %d\n", exit_code);</text:span></text:p>
      <text:p text:style-name="Horizontal_20_Line"/>
      <text:h text:style-name="Heading_20_2" text:outline-level="2">🧩 Combined Usage (Correct Way)</text:h>
      <text:p text:style-name="P1"><text:span text:style-name="Source_20_Text">int status;</text:span></text:p>
      <text:p text:style-name="P1"><text:span text:style-name="Source_20_Text">wait(&amp;status);</text:span></text:p>
      <text:p text:style-name="P1"/>
      <text:p text:style-name="P1"><text:span text:style-name="Source_20_Text">if (WIFEXITED(status)) {</text:span></text:p>
      <text:p text:style-name="P1"><text:span text:style-name="Source_20_Text"><text:s text:c="4"/>printf("Normal termination\n");</text:span></text:p>
      <text:p text:style-name="P1"><text:span text:style-name="Source_20_Text"><text:s text:c="4"/>printf("Exit status = %d\n", WEXITSTATUS(status));</text:span></text:p>
      <text:p text:style-name="P1"><text:span text:style-name="Source_20_Text">} else {</text:span></text:p>
      <text:p text:style-name="P1"><text:span text:style-name="Source_20_Text"><text:s text:c="4"/>printf("Abnormal termination\n");</text:span></text:p>
      <text:p text:style-name="P2"><text:span text:style-name="Source_20_Text">}</text:span></text:p>
      <text:p text:style-name="Horizontal_20_Line"/>
      <text:h text:style-name="Heading_20_2" text:outline-level="2">🔬 What Happens Internally (Conceptual)</text:h>
      <text:p text:style-name="Text_20_body">When a child terminates, the kernel stores:</text:p>
      <text:list xml:id="list726977814" text:style-name="L19">
        <text:list-item>
          <text:p text:style-name="P21">Exit code</text:p>
        </text:list-item>
        <text:list-item>
          <text:p text:style-name="P21">Signal info (if any)</text:p>
        </text:list-item>
        <text:list-item>
          <text:p text:style-name="P21">Termination reason</text:p>
        </text:list-item>
      </text:list>
      <text:p text:style-name="Text_20_body">All of this is <text:span text:style-name="Strong_20_Emphasis">packed into </text:span><text:span text:style-name="Strong_20_Emphasis"><text:span text:style-name="Source_20_Text">status</text:span></text:span>.</text:p>
      <text:h text:style-name="Heading_20_3" text:outline-level="3">Example:</text:h>
      <text:p text:style-name="P2"><text:span text:style-name="Source_20_Text">exit(5);</text:span></text:p>
      <text:p text:style-name="Text_20_body">Kernel encodes:</text:p>
      <text:p text:style-name="P2"><text:span text:style-name="Source_20_Text">status = 5 &lt;&lt; 8</text:span></text:p>
      <text:p text:style-name="Text_20_body"><text:soft-page-break/>👉 That’s why macros are required.</text:p>
      <text:p text:style-name="Horizontal_20_Line"/>
      <text:h text:style-name="Heading_20_2" text:outline-level="2">📊 Related Macros (Good to Know for Exams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acro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WIFEXITED(status)</text:span></text:p>
          </table:table-cell>
          <table:table-cell table:style-name="Table4.A1" office:value-type="string">
            <text:p text:style-name="Table_20_Contents">Normal termination?</text:p>
          </table:table-cell>
        </table:table-row>
        <table:table-row>
          <table:table-cell table:style-name="Table4.A1" office:value-type="string">
            <text:p text:style-name="Table_20_Contents"><text:span text:style-name="Source_20_Text">WEXITSTATUS(status)</text:span></text:p>
          </table:table-cell>
          <table:table-cell table:style-name="Table4.A1" office:value-type="string">
            <text:p text:style-name="Table_20_Contents">Exit code</text:p>
          </table:table-cell>
        </table:table-row>
        <table:table-row>
          <table:table-cell table:style-name="Table4.A1" office:value-type="string">
            <text:p text:style-name="Table_20_Contents"><text:span text:style-name="Source_20_Text">WIFSIGNALED(status)</text:span></text:p>
          </table:table-cell>
          <table:table-cell table:style-name="Table4.A1" office:value-type="string">
            <text:p text:style-name="Table_20_Contents">Killed by signal?</text:p>
          </table:table-cell>
        </table:table-row>
        <table:table-row>
          <table:table-cell table:style-name="Table4.A1" office:value-type="string">
            <text:p text:style-name="Table_20_Contents"><text:span text:style-name="Source_20_Text">WTERMSIG(status)</text:span></text:p>
          </table:table-cell>
          <table:table-cell table:style-name="Table4.A1" office:value-type="string">
            <text:p text:style-name="Table_20_Contents">Which signal killed it</text:p>
          </table:table-cell>
        </table:table-row>
        <table:table-row>
          <table:table-cell table:style-name="Table4.A1" office:value-type="string">
            <text:p text:style-name="Table_20_Contents"><text:span text:style-name="Source_20_Text">WIFSTOPPED(status)</text:span></text:p>
          </table:table-cell>
          <table:table-cell table:style-name="Table4.A1" office:value-type="string">
            <text:p text:style-name="Table_20_Contents">Child stopped?</text:p>
          </table:table-cell>
        </table:table-row>
        <table:table-row>
          <table:table-cell table:style-name="Table4.A1" office:value-type="string">
            <text:p text:style-name="Table_20_Contents"><text:span text:style-name="Source_20_Text">WSTOPSIG(status)</text:span></text:p>
          </table:table-cell>
          <table:table-cell table:style-name="Table4.A1" office:value-type="string">
            <text:p text:style-name="Table_20_Contents">Stop signal</text:p>
          </table:table-cell>
        </table:table-row>
      </table:table>
      <text:p text:style-name="Horizontal_20_Line"/>
      <text:h text:style-name="Heading_20_2" text:outline-level="2">🧪 Real-Time Embedded Use Case</text:h>
      <text:p text:style-name="Text_20_body"><text:span text:style-name="Strong_20_Emphasis">Watchdog / Supervisor Process</text:span></text:p>
      <text:list xml:id="list4289723381" text:style-name="L20">
        <text:list-item>
          <text:p text:style-name="P22">Child performs hardware task</text:p>
        </text:list-item>
        <text:list-item>
          <text:p text:style-name="P22">Parent waits</text:p>
        </text:list-item>
        <text:list-item>
          <text:p text:style-name="P22">If:</text:p>
          <text:list>
            <text:list-item>
              <text:p text:style-name="P22"><text:span text:style-name="Source_20_Text">exit(0)</text:span> → OK</text:p>
            </text:list-item>
            <text:list-item>
              <text:p text:style-name="P22"><text:span text:style-name="Source_20_Text">exit(1)</text:span> → Sensor failure</text:p>
            </text:list-item>
            <text:list-item>
              <text:p text:style-name="P22">signal termination → Hardware crash</text:p>
            </text:list-item>
          </text:list>
        </text:list-item>
      </text:list>
      <text:p text:style-name="P1"><text:span text:style-name="Source_20_Text">if (WIFEXITED(status)) {</text:span></text:p>
      <text:p text:style-name="P1"><text:span text:style-name="Source_20_Text"><text:s text:c="4"/>if (WEXITSTATUS(status) != 0)</text:span></text:p>
      <text:p text:style-name="P1"><text:span text:style-name="Source_20_Text"><text:s text:c="8"/>restart_child();</text:span></text:p>
      <text:p text:style-name="P2"><text:span text:style-name="Source_20_Text">}</text:span></text:p>
      <text:p text:style-name="Horizontal_20_Line"/>
      <text:h text:style-name="Heading_20_2" text:outline-level="2">📝 One-Line Exam Answers</text:h>
      <text:list xml:id="list2908388564" text:style-name="L21">
        <text:list-item>
          <text:p text:style-name="P23"><text:span text:style-name="Strong_20_Emphasis"><text:span text:style-name="Source_20_Text">WIFEXITED</text:span></text:span>: Checks if child terminated normally</text:p>
        </text:list-item>
        <text:list-item>
          <text:p text:style-name="P23"><text:span text:style-name="Strong_20_Emphasis"><text:span text:style-name="Source_20_Text">WEXITSTATUS</text:span></text:span>: Retrieves child’s exit code</text:p>
        </text:list-item>
      </text:list>
      <text:p text:style-name="Horizontal_20_Line"/>
      <text:p text:style-name="Text_20_body">If you want, I can also:<text:line-break/>✔ Explain <text:span text:style-name="Strong_20_Emphasis">zombie vs orphan</text:span> using these macros<text:line-break/>✔ Show <text:span text:style-name="Strong_20_Emphasis">waitpid() with timeout</text:span><text:line-break/>✔ Give <text:span text:style-name="Strong_20_Emphasis">MCQs / viva questions</text:span></text:p>
      <text:p text:style-name="Text_20_body">Just say the word 👌</text:p>
      <text:p text:style-name="Text_20_body">Explain zombie vs orphan using these macros</text:p>
      <text:p text:style-name="Text_20_body"><text:soft-page-break/>Perfect follow-up 👌<text:line-break/>This is a <text:span text:style-name="Strong_20_Emphasis">classic OS viva + exam topic</text:span>, and using <text:span text:style-name="Strong_20_Emphasis"><text:span text:style-name="Source_20_Text">WIFEXITED</text:span></text:span><text:span text:style-name="Strong_20_Emphasis"> / </text:span><text:span text:style-name="Strong_20_Emphasis"><text:span text:style-name="Source_20_Text">WEXITSTATUS</text:span></text:span> makes the explanation very clear.</text:p>
      <text:p text:style-name="Horizontal_20_Line"/>
      <text:h text:style-name="Heading_20_1" text:outline-level="1">🧟 Zombie Process vs 👶 Orphan Process</text:h>
      <text:h text:style-name="Heading_20_3" text:outline-level="3">(Explained using <text:span text:style-name="Source_20_Text">wait()</text:span>, <text:span text:style-name="Source_20_Text">WIFEXITED</text:span>, <text:span text:style-name="Source_20_Text">WEXITSTATUS</text:span>)</text:h>
      <text:p text:style-name="Horizontal_20_Line"/>
      <text:h text:style-name="Heading_20_2" text:outline-level="2">🧟 1. Zombie Process</text:h>
      <text:h text:style-name="Heading_20_3" text:outline-level="3">📌 What is a Zombie?</text:h>
      <text:p text:style-name="Text_20_body">A <text:span text:style-name="Strong_20_Emphasis">zombie process</text:span> is a process that:</text:p>
      <text:list xml:id="list946607999" text:style-name="L22">
        <text:list-item>
          <text:p text:style-name="P24"><text:span text:style-name="Strong_20_Emphasis">Has finished execution</text:span></text:p>
        </text:list-item>
        <text:list-item>
          <text:p text:style-name="P24"><text:span text:style-name="Strong_20_Emphasis">Has called </text:span><text:span text:style-name="Strong_20_Emphasis"><text:span text:style-name="Source_20_Text">exit()</text:span></text:span></text:p>
        </text:list-item>
        <text:list-item>
          <text:p text:style-name="P24">But <text:span text:style-name="Strong_20_Emphasis">its parent has NOT called </text:span><text:span text:style-name="Strong_20_Emphasis"><text:span text:style-name="Source_20_Text">wait()</text:span></text:span></text:p>
        </text:list-item>
      </text:list>
      <text:p text:style-name="Text_20_body">👉 The child is dead, but its <text:span text:style-name="Strong_20_Emphasis">exit status is still waiting to be collected</text:span>.</text:p>
      <text:p text:style-name="Horizontal_20_Line"/>
      <text:h text:style-name="Heading_20_3" text:outline-level="3">🧠 Why Zombie Exists</text:h>
      <text:p text:style-name="Text_20_body">The OS keeps minimal info:</text:p>
      <text:list xml:id="list245886141" text:style-name="L23">
        <text:list-item>
          <text:p text:style-name="P25">PID</text:p>
        </text:list-item>
        <text:list-item>
          <text:p text:style-name="P25">Exit status</text:p>
        </text:list-item>
      </text:list>
      <text:p text:style-name="Text_20_body">So the parent can later read it using:</text:p>
      <text:p text:style-name="P1"><text:span text:style-name="Source_20_Text">wait()</text:span></text:p>
      <text:p text:style-name="P1"><text:span text:style-name="Source_20_Text">WIFEXITED()</text:span></text:p>
      <text:p text:style-name="P2"><text:span text:style-name="Source_20_Text">WEXITSTATUS()</text:span></text:p>
      <text:p text:style-name="Horizontal_20_Line"/>
      <text:h text:style-name="Heading_20_3" text:outline-level="3">⚙️ Role of Macros</text:h>
      <text:p text:style-name="Text_20_body">The child <text:span text:style-name="Strong_20_Emphasis">already exited normally</text:span>, so:</text:p>
      <text:p text:style-name="P1"><text:span text:style-name="Source_20_Text">WIFEXITED(status) <text:s/>→ TRUE</text:span></text:p>
      <text:p text:style-name="P2"><text:span text:style-name="Source_20_Text">WEXITSTATUS(status) → available</text:span></text:p>
      <text:p text:style-name="Text_20_body">But until parent calls <text:span text:style-name="Source_20_Text">wait()</text:span>, the child remains a <text:span text:style-name="Strong_20_Emphasis">zombie</text:span>.</text:p>
      <text:p text:style-name="Horizontal_20_Line"/>
      <text:h text:style-name="Heading_20_3" text:outline-level="3"><text:soft-page-break/>🧪 Zombie Demonstration Cod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><text:span text:style-name="Source_20_Text">#include &lt;stdlib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 {</text:span></text:p>
      <text:p text:style-name="P1"><text:span text:style-name="Source_20_Text"><text:s text:c="8"/>/* Child */</text:span></text:p>
      <text:p text:style-name="P1"><text:span text:style-name="Source_20_Text"><text:s text:c="8"/>printf("Child exiting...\n");</text:span></text:p>
      <text:p text:style-name="P1"><text:span text:style-name="Source_20_Text"><text:s text:c="8"/>exit(5);</text:span></text:p>
      <text:p text:style-name="P1"><text:span text:style-name="Source_20_Text"><text:s text:c="4"/>} else {</text:span></text:p>
      <text:p text:style-name="P1"><text:span text:style-name="Source_20_Text"><text:s text:c="8"/>/* Parent does NOT call wait() */</text:span></text:p>
      <text:p text:style-name="P1"><text:span text:style-name="Source_20_Text"><text:s text:c="8"/>printf("Parent sleeping... Child becomes zombie\n");</text:span></text:p>
      <text:p text:style-name="P1"><text:span text:style-name="Source_20_Text"><text:s text:c="8"/>sleep(30);</text:span></text:p>
      <text:p text:style-name="P1"><text:span text:style-name="Source_20_Text"><text:s text:c="4"/>}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Text_20_body">👉 Run and check:</text:p>
      <text:p text:style-name="P2"><text:span text:style-name="Source_20_Text">ps -elf | grep Z</text:span></text:p>
      <text:p text:style-name="Horizontal_20_Line"/>
      <text:h text:style-name="Heading_20_3" text:outline-level="3">📝 Zombie Summar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Point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Child state</text:p>
          </table:table-cell>
          <table:table-cell table:style-name="Table5.A1" office:value-type="string">
            <text:p text:style-name="Table_20_Contents">Terminated</text:p>
          </table:table-cell>
        </table:table-row>
        <table:table-row>
          <table:table-cell table:style-name="Table5.A1" office:value-type="string">
            <text:p text:style-name="Table_20_Contents">Parent</text:p>
          </table:table-cell>
          <table:table-cell table:style-name="Table5.A1" office:value-type="string">
            <text:p text:style-name="Table_20_Contents">Alive</text:p>
          </table:table-cell>
        </table:table-row>
        <table:table-row>
          <table:table-cell table:style-name="Table5.A1" office:value-type="string">
            <text:p text:style-name="Table_20_Contents">wait()</text:p>
          </table:table-cell>
          <table:table-cell table:style-name="Table5.A1" office:value-type="string">
            <text:p text:style-name="Table_20_Contents">NOT called</text:p>
          </table:table-cell>
        </table:table-row>
        <table:table-row>
          <table:table-cell table:style-name="Table5.A1" office:value-type="string">
            <text:p text:style-name="Table_20_Contents">Entry in process table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WIFEXITED</text:p>
          </table:table-cell>
          <table:table-cell table:style-name="Table5.A1" office:value-type="string">
            <text:p text:style-name="Table_20_Contents">TRUE</text:p>
          </table:table-cell>
        </table:table-row>
        <table:table-row>
          <table:table-cell table:style-name="Table5.A1" office:value-type="string">
            <text:p text:style-name="Table_20_Contents">Problem</text:p>
          </table:table-cell>
          <table:table-cell table:style-name="Table5.A1" office:value-type="string">
            <text:p text:style-name="Table_20_Contents">Resource leak</text:p>
          </table:table-cell>
        </table:table-row>
      </table:table>
      <text:p text:style-name="Horizontal_20_Line"/>
      <text:h text:style-name="Heading_20_2" text:outline-level="2">👶 2. Orphan Process</text:h>
      <text:h text:style-name="Heading_20_3" text:outline-level="3">📌 What is an Orphan?</text:h>
      <text:p text:style-name="Text_20_body">An <text:span text:style-name="Strong_20_Emphasis">orphan process</text:span> is a process whose:</text:p>
      <text:list xml:id="list1020950615" text:style-name="L24">
        <text:list-item>
          <text:p text:style-name="P26"><text:span text:style-name="Strong_20_Emphasis">Parent has terminated</text:span></text:p>
        </text:list-item>
        <text:list-item>
          <text:p text:style-name="P26">Child is <text:span text:style-name="Strong_20_Emphasis">still running</text:span></text:p>
        </text:list-item>
      </text:list>
      <text:p text:style-name="Text_20_body">👉 Child is adopted by <text:span text:style-name="Strong_20_Emphasis"><text:span text:style-name="Source_20_Text">init</text:span></text:span><text:span text:style-name="Strong_20_Emphasis"> (PID 1)</text:span> or <text:span text:style-name="Source_20_Text">systemd</text:span>.</text:p>
      <text:p text:style-name="Horizontal_20_Line"/>
      <text:h text:style-name="Heading_20_3" text:outline-level="3">🧠 Why Orphan is NOT a Problem</text:h>
      <text:list xml:id="list21464661" text:style-name="L25">
        <text:list-item>
          <text:p text:style-name="P27">New parent (<text:span text:style-name="Source_20_Text">init</text:span>) <text:span text:style-name="Strong_20_Emphasis">always calls </text:span><text:span text:style-name="Strong_20_Emphasis"><text:span text:style-name="Source_20_Text">wait()</text:span></text:span></text:p>
        </text:list-item>
        <text:list-item>
          <text:p text:style-name="P27">Child exit status is collected</text:p>
        </text:list-item>
        <text:list-item>
          <text:p text:style-name="P27"><text:soft-page-break/>No zombie remains</text:p>
        </text:list-item>
      </text:list>
      <text:p text:style-name="Horizontal_20_Line"/>
      <text:h text:style-name="Heading_20_3" text:outline-level="3">⚙️ Role of Macros</text:h>
      <text:p text:style-name="Text_20_body">When orphan finally exits:</text:p>
      <text:list xml:id="list1743903189" text:style-name="L26">
        <text:list-item>
          <text:p text:style-name="P28"><text:span text:style-name="Source_20_Text">init</text:span> calls <text:span text:style-name="Source_20_Text">wait()</text:span></text:p>
        </text:list-item>
        <text:list-item>
          <text:p text:style-name="P28">Uses:</text:p>
        </text:list-item>
      </text:list>
      <text:p text:style-name="P1"><text:span text:style-name="Source_20_Text">WIFEXITED(status)</text:span></text:p>
      <text:p text:style-name="P2"><text:span text:style-name="Source_20_Text">WEXITSTATUS(status)</text:span></text:p>
      <text:p text:style-name="Horizontal_20_Line"/>
      <text:h text:style-name="Heading_20_3" text:outline-level="3">🧪 Orphan Demonstration Code</text:h>
      <text:p text:style-name="P1"><text:span text:style-name="Source_20_Text">#include &lt;stdio.h&gt;</text:span></text:p>
      <text:p text:style-name="P1"><text:span text:style-name="Source_20_Text">#include &lt;unistd.h&gt;</text:span></text:p>
      <text:p text:style-name="P1"><text:span text:style-name="Source_20_Text">#include &lt;stdlib.h&gt;</text:span></text:p>
      <text:p text:style-name="P1"/>
      <text:p text:style-name="P1"><text:span text:style-name="Source_20_Text">int main() {</text:span></text:p>
      <text:p text:style-name="P1"><text:span text:style-name="Source_20_Text"><text:s text:c="4"/>pid_t pid = fork();</text:span></text:p>
      <text:p text:style-name="P1"/>
      <text:p text:style-name="P1"><text:span text:style-name="Source_20_Text"><text:s text:c="4"/>if (pid == 0) {</text:span></text:p>
      <text:p text:style-name="P1"><text:span text:style-name="Source_20_Text"><text:s text:c="8"/>/* Child */</text:span></text:p>
      <text:p text:style-name="P1"><text:span text:style-name="Source_20_Text"><text:s text:c="8"/>sleep(10);</text:span></text:p>
      <text:p text:style-name="P1"><text:span text:style-name="Source_20_Text"><text:s text:c="8"/>printf("Child running after parent exit\n");</text:span></text:p>
      <text:p text:style-name="P1"><text:span text:style-name="Source_20_Text"><text:s text:c="8"/>exit(0);</text:span></text:p>
      <text:p text:style-name="P1"><text:span text:style-name="Source_20_Text"><text:s text:c="4"/>} else {</text:span></text:p>
      <text:p text:style-name="P1"><text:span text:style-name="Source_20_Text"><text:s text:c="8"/>/* Parent exits immediately */</text:span></text:p>
      <text:p text:style-name="P1"><text:span text:style-name="Source_20_Text"><text:s text:c="8"/>printf("Parent exiting\n");</text:span></text:p>
      <text:p text:style-name="P1"><text:span text:style-name="Source_20_Text"><text:s text:c="8"/>exit(0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👉 After parent exits:</text:p>
      <text:p text:style-name="P2"><text:span text:style-name="Source_20_Text">ps -elf | grep &lt;child_pid&gt;</text:span></text:p>
      <text:p text:style-name="Text_20_body">Parent PID becomes <text:span text:style-name="Strong_20_Emphasis">1</text:span>.</text:p>
      <text:p text:style-name="Horizontal_20_Line"/>
      <text:h text:style-name="Heading_20_3" text:outline-level="3">📝 Orphan Summary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oint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Child state</text:p>
          </table:table-cell>
          <table:table-cell table:style-name="Table6.A1" office:value-type="string">
            <text:p text:style-name="Table_20_Contents">Running</text:p>
          </table:table-cell>
        </table:table-row>
        <table:table-row>
          <table:table-cell table:style-name="Table6.A1" office:value-type="string">
            <text:p text:style-name="Table_20_Contents">Parent</text:p>
          </table:table-cell>
          <table:table-cell table:style-name="Table6.A1" office:value-type="string">
            <text:p text:style-name="Table_20_Contents">Terminated</text:p>
          </table:table-cell>
        </table:table-row>
        <table:table-row>
          <table:table-cell table:style-name="Table6.A1" office:value-type="string">
            <text:p text:style-name="Table_20_Contents">Adopted by</text:p>
          </table:table-cell>
          <table:table-cell table:style-name="Table6.A1" office:value-type="string">
            <text:p text:style-name="Table_20_Contents">init/systemd</text:p>
          </table:table-cell>
        </table:table-row>
        <table:table-row>
          <table:table-cell table:style-name="Table6.A1" office:value-type="string">
            <text:p text:style-name="Table_20_Contents">Zombie created?</text:p>
          </table:table-cell>
          <table:table-cell table:style-name="Table6.A1" office:value-type="string">
            <text:p text:style-name="Table_20_Contents">NO</text:p>
          </table:table-cell>
        </table:table-row>
        <table:table-row>
          <table:table-cell table:style-name="Table6.A1" office:value-type="string">
            <text:p text:style-name="Table_20_Contents">WIFEXITED usage</text:p>
          </table:table-cell>
          <table:table-cell table:style-name="Table6.A1" office:value-type="string">
            <text:p text:style-name="Table_20_Contents">By init</text:p>
          </table:table-cell>
        </table:table-row>
      </table:table>
      <text:p text:style-name="Horizontal_20_Line"/>
      <text:h text:style-name="Heading_20_2" text:outline-level="2"><text:soft-page-break/>🔄 Key Difference Table (Exam Gold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eature</text:p>
            </table:table-cell>
            <table:table-cell table:style-name="Table7.A1" office:value-type="string">
              <text:p text:style-name="Table_20_Heading">Zombie</text:p>
            </table:table-cell>
            <table:table-cell table:style-name="Table7.A1" office:value-type="string">
              <text:p text:style-name="Table_20_Heading">Orphan</text:p>
            </table:table-cell>
          </table:table-row>
        </table:table-header-rows>
        <table:table-row>
          <table:table-cell table:style-name="Table7.A1" office:value-type="string">
            <text:p text:style-name="Table_20_Contents">Child running?</text:p>
          </table:table-cell>
          <table:table-cell table:style-name="Table7.A1" office:value-type="string">
            <text:p text:style-name="Table_20_Contents">❌ No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Parent running?</text:p>
          </table:table-cell>
          <table:table-cell table:style-name="Table7.A1" office:value-type="string">
            <text:p text:style-name="Table_20_Contents">✅ Y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wait() called?</text:p>
          </table:table-cell>
          <table:table-cell table:style-name="Table7.A1" office:value-type="string">
            <text:p text:style-name="Table_20_Contents">❌ No</text:p>
          </table:table-cell>
          <table:table-cell table:style-name="Table7.A1" office:value-type="string">
            <text:p text:style-name="Table_20_Contents">✅ (by init)</text:p>
          </table:table-cell>
        </table:table-row>
        <table:table-row>
          <table:table-cell table:style-name="Table7.A1" office:value-type="string">
            <text:p text:style-name="Table_20_Contents">Process table entry</text:p>
          </table:table-cell>
          <table:table-cell table:style-name="Table7.A1" office:value-type="string">
            <text:p text:style-name="Table_20_Contents">✅ Y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Resource leak</text:p>
          </table:table-cell>
          <table:table-cell table:style-name="Table7.A1" office:value-type="string">
            <text:p text:style-name="Table_20_Contents">❌ Y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Uses WIFEXITED</text:p>
          </table:table-cell>
          <table:table-cell table:style-name="Table7.A1" office:value-type="string">
            <text:p text:style-name="Table_20_Contents">Parent</text:p>
          </table:table-cell>
          <table:table-cell table:style-name="Table7.A1" office:value-type="string">
            <text:p text:style-name="Table_20_Contents">init</text:p>
          </table:table-cell>
        </table:table-row>
      </table:table>
      <text:p text:style-name="Horizontal_20_Line"/>
      <text:h text:style-name="Heading_20_2" text:outline-level="2">🧠 One-Line Exam Answers</text:h>
      <text:list xml:id="list2488963343" text:style-name="L27">
        <text:list-item>
          <text:p text:style-name="P29"><text:span text:style-name="Strong_20_Emphasis">Zombie process</text:span>: Child has exited but parent hasn’t collected exit status using <text:span text:style-name="Source_20_Text">wait()</text:span></text:p>
        </text:list-item>
        <text:list-item>
          <text:p text:style-name="P29"><text:span text:style-name="Strong_20_Emphasis">Orphan process</text:span>: Parent exited before child; child is adopted by <text:span text:style-name="Source_20_Text">init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1:11:25.137216978</meta:creation-date>
    <dc:date>2026-02-03T11:12:54.938345011</dc:date>
    <meta:editing-duration>PT1M31S</meta:editing-duration>
    <meta:editing-cycles>1</meta:editing-cycles>
    <meta:document-statistic meta:table-count="7" meta:image-count="0" meta:object-count="0" meta:page-count="15" meta:paragraph-count="465" meta:word-count="1817" meta:character-count="11367" meta:non-whitespace-character-count="9471"/>
    <meta:generator>LibreOffice/7.3.7.2$Linux_X86_64 LibreOffice_project/30$Build-2</meta:generator>
  </office:meta>
</office:document-meta>
</file>