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Standard">
      <style:paragraph-properties fo:margin-top="0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reate two processes: Read Process: Reads the thermostat sensor value and performs temperature calculation. Control Process: Turns the compressor motor ON/OFF based on temperature and set value. Use pipes for communication between the read process and control process.</text:p>
      <text:p text:style-name="Text_20_body">Below is a clean <text:span text:style-name="Strong_20_Emphasis">POSIX-compliant C program</text:span> that creates:</text:p>
      <text:list xml:id="list1760755731" text:style-name="L1">
        <text:list-item>
          <text:p text:style-name="P4"><text:span text:style-name="Strong_20_Emphasis">Read Process (Child)</text:span> → Reads thermostat value (simulated sensor) and calculates temperature</text:p>
        </text:list-item>
        <text:list-item>
          <text:p text:style-name="P4"><text:span text:style-name="Strong_20_Emphasis">Control Process (Parent)</text:span> → Turns compressor <text:span text:style-name="Strong_20_Emphasis">ON/OFF</text:span> based on temperature and set value</text:p>
        </text:list-item>
        <text:list-item>
          <text:p text:style-name="P4">Communication is done using <text:span text:style-name="Strong_20_Emphasis">pipe (IPC)</text:span></text:p>
        </text:list-item>
      </text:list>
      <text:p text:style-name="Horizontal_20_Line"/>
      <text:h text:style-name="Heading_20_2" text:outline-level="2">🔹 Concept Flow</text:h>
      <text:p text:style-name="P2"><text:span text:style-name="Source_20_Text">Sensor → Read Process → pipe → Control Process → Compressor ON/OFF</text:span></text:p>
      <text:list xml:id="list268876628" text:style-name="L2">
        <text:list-item>
          <text:p text:style-name="P5"><text:span text:style-name="Source_20_Text">pipe()</text:span> → Creates IPC channel</text:p>
        </text:list-item>
        <text:list-item>
          <text:p text:style-name="P5"><text:span text:style-name="Source_20_Text">fork()</text:span> → Creates two processes</text:p>
        </text:list-item>
        <text:list-item>
          <text:p text:style-name="P5">Child → writes temperature to pipe</text:p>
        </text:list-item>
        <text:list-item>
          <text:p text:style-name="P5">Parent → reads temperature and controls motor</text:p>
        </text:list-item>
      </text:list>
      <text:p text:style-name="Horizontal_20_Line"/>
      <text:h text:style-name="Heading_20_1" text:outline-level="1">✅ C Program: Thermostat Control Using Pipe</text:h>
      <text:p text:style-name="P1"><text:span text:style-name="Source_20_Text">/*</text:span></text:p>
      <text:p text:style-name="P1"><text:span text:style-name="Source_20_Text"><text:s/>* thermostat_control.c</text:span></text:p>
      <text:p text:style-name="P1"><text:span text:style-name="Source_20_Text"><text:s/>* Demonstration of IPC using pipe()</text:span></text:p>
      <text:p text:style-name="P1"><text:span text:style-name="Source_20_Text"><text:s/>* Read Process -&gt; Control Process</text:span></text:p>
      <text:p text:style-name="P1"><text:span text:style-name="Source_20_Text"><text:s/>*/</text:span></text:p>
      <text:p text:style-name="P1"/>
      <text:p text:style-name="P1"><text:span text:style-name="Source_20_Text">#include &lt;stdio.h&gt;</text:span></text:p>
      <text:p text:style-name="P1"><text:span text:style-name="Source_20_Text">#include &lt;stdlib.h&gt;</text:span></text:p>
      <text:p text:style-name="P1"><text:span text:style-name="Source_20_Text">#include &lt;unistd.h&gt;</text:span></text:p>
      <text:p text:style-name="P1"><text:span text:style-name="Source_20_Text">#include &lt;sys/types.h&gt;</text:span></text:p>
      <text:p text:style-name="P1"><text:span text:style-name="Source_20_Text">#include &lt;sys/wait.h&gt;</text:span></text:p>
      <text:p text:style-name="P1"/>
      <text:p text:style-name="P1"><text:span text:style-name="Source_20_Text">#define SET_TEMPERATURE 25.0 <text:s text:c="2"/>// Desired temperature</text:span></text:p>
      <text:p text:style-name="P1"/>
      <text:p text:style-name="P1"><text:span text:style-name="Source_20_Text">int main() {</text:span></text:p>
      <text:p text:style-name="P1"><text:span text:style-name="Source_20_Text"><text:s text:c="4"/>int pipefd[2];</text:span></text:p>
      <text:p text:style-name="P1"><text:span text:style-name="Source_20_Text"><text:s text:c="4"/>pid_t pid;</text:span></text:p>
      <text:p text:style-name="P1"><text:span text:style-name="Source_20_Text"><text:s text:c="4"/>float sensor_value;</text:span></text:p>
      <text:p text:style-name="P1"><text:span text:style-name="Source_20_Text"><text:s text:c="4"/>float temperature;</text:span></text:p>
      <text:p text:style-name="P1"/>
      <text:p text:style-name="P1"><text:span text:style-name="Source_20_Text"><text:s text:c="4"/>// Create pipe</text:span></text:p>
      <text:p text:style-name="P1"><text:span text:style-name="Source_20_Text"><text:s text:c="4"/>if (pipe(pipefd) == -1) {</text:span></text:p>
      <text:p text:style-name="P1"><text:span text:style-name="Source_20_Text"><text:s text:c="8"/>perror("Pipe failed");</text:span></text:p>
      <text:p text:style-name="P1"><text:span text:style-name="Source_20_Text"><text:s text:c="8"/>exit(EXIT_FAILURE);</text:span></text:p>
      <text:p text:style-name="P1"><text:soft-page-break/><text:span text:style-name="Source_20_Text"><text:s text:c="4"/>}</text:span></text:p>
      <text:p text:style-name="P1"/>
      <text:p text:style-name="P1"><text:span text:style-name="Source_20_Text"><text:s text:c="4"/>pid = fork();</text:span></text:p>
      <text:p text:style-name="P1"/>
      <text:p text:style-name="P1"><text:span text:style-name="Source_20_Text"><text:s text:c="4"/>if (pid &lt; 0) {</text:span></text:p>
      <text:p text:style-name="P1"><text:span text:style-name="Source_20_Text"><text:s text:c="8"/>perror("Fork failed");</text:span></text:p>
      <text:p text:style-name="P1"><text:span text:style-name="Source_20_Text"><text:s text:c="8"/>exit(EXIT_FAILURE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// 🔹 CHILD PROCESS → Read Process</text:span></text:p>
      <text:p text:style-name="P1"><text:span text:style-name="Source_20_Text"><text:s text:c="4"/>else if (pid == 0) {</text:span></text:p>
      <text:p text:style-name="P1"><text:span text:style-name="Source_20_Text"><text:s text:c="8"/>close(pipefd[0]); <text:s/>// Close unused read end</text:span></text:p>
      <text:p text:style-name="P1"/>
      <text:p text:style-name="P1"><text:span text:style-name="Source_20_Text"><text:s text:c="8"/>printf("Enter thermostat sensor value (in volts): ");</text:span></text:p>
      <text:p text:style-name="P1"><text:span text:style-name="Source_20_Text"><text:s text:c="8"/>scanf("%f", &amp;sensor_value);</text:span></text:p>
      <text:p text:style-name="P1"/>
      <text:p text:style-name="P1"><text:span text:style-name="Source_20_Text"><text:s text:c="8"/>// Example conversion formula</text:span></text:p>
      <text:p text:style-name="P1"><text:span text:style-name="Source_20_Text"><text:s text:c="8"/>temperature = sensor_value * 10; <text:s/></text:span></text:p>
      <text:p text:style-name="P1"/>
      <text:p text:style-name="P1"><text:span text:style-name="Source_20_Text"><text:s text:c="8"/>printf("Read Process: Calculated Temperature = %.2f°C\n", temperature);</text:span></text:p>
      <text:p text:style-name="P1"/>
      <text:p text:style-name="P1"><text:span text:style-name="Source_20_Text"><text:s text:c="8"/>write(pipefd[1], &amp;temperature, sizeof(temperature));</text:span></text:p>
      <text:p text:style-name="P1"/>
      <text:p text:style-name="P1"><text:span text:style-name="Source_20_Text"><text:s text:c="8"/>close(pipefd[1]);</text:span></text:p>
      <text:p text:style-name="P1"><text:span text:style-name="Source_20_Text"><text:s text:c="8"/>exit(0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// 🔹 PARENT PROCESS → Control Process</text:span></text:p>
      <text:p text:style-name="P1"><text:span text:style-name="Source_20_Text"><text:s text:c="4"/>else {</text:span></text:p>
      <text:p text:style-name="P1"><text:span text:style-name="Source_20_Text"><text:s text:c="8"/>close(pipefd[1]); <text:s/>// Close unused write end</text:span></text:p>
      <text:p text:style-name="P1"/>
      <text:p text:style-name="P1"><text:span text:style-name="Source_20_Text"><text:s text:c="8"/>read(pipefd[0], &amp;temperature, sizeof(temperature));</text:span></text:p>
      <text:p text:style-name="P1"/>
      <text:p text:style-name="P1"><text:span text:style-name="Source_20_Text"><text:s text:c="8"/>printf("Control Process: Received Temperature = %.2f°C\n", temperature);</text:span></text:p>
      <text:p text:style-name="P1"/>
      <text:p text:style-name="P1"><text:span text:style-name="Source_20_Text"><text:s text:c="8"/>if (temperature &gt; SET_TEMPERATURE) {</text:span></text:p>
      <text:p text:style-name="P1"><text:span text:style-name="Source_20_Text"><text:s text:c="12"/>printf("Control Process: Compressor ON\n");</text:span></text:p>
      <text:p text:style-name="P1"><text:span text:style-name="Source_20_Text"><text:s text:c="8"/>} else {</text:span></text:p>
      <text:p text:style-name="P1"><text:span text:style-name="Source_20_Text"><text:s text:c="12"/>printf("Control Process: Compressor OFF\n");</text:span></text:p>
      <text:p text:style-name="P1"><text:span text:style-name="Source_20_Text"><text:s text:c="8"/>}</text:span></text:p>
      <text:p text:style-name="P1"/>
      <text:p text:style-name="P1"><text:span text:style-name="Source_20_Text"><text:s text:c="8"/>close(pipefd[0]);</text:span></text:p>
      <text:p text:style-name="P1"><text:span text:style-name="Source_20_Text"><text:s text:c="8"/>wait(NULL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return 0;</text:span></text:p>
      <text:p text:style-name="P2"><text:span text:style-name="Source_20_Text">}</text:span></text:p>
      <text:p text:style-name="Horizontal_20_Line"/>
      <text:h text:style-name="Heading_20_1" text:outline-level="1">🔹 Compilation</text:h>
      <text:p text:style-name="P1"><text:span text:style-name="Source_20_Text">gcc thermostat_control.c -o thermostat</text:span></text:p>
      <text:p text:style-name="P2"><text:span text:style-name="Source_20_Text">./thermostat</text:span></text:p>
      <text:p text:style-name="Horizontal_20_Line"/>
      <text:h text:style-name="Heading_20_1" text:outline-level="1"><text:soft-page-break/>🔹 Sample Output</text:h>
      <text:p text:style-name="P1"><text:span text:style-name="Source_20_Text">Enter thermostat sensor value (in volts): 3</text:span></text:p>
      <text:p text:style-name="P1"><text:span text:style-name="Source_20_Text">Read Process: Calculated Temperature = 30.00°C</text:span></text:p>
      <text:p text:style-name="P1"><text:span text:style-name="Source_20_Text">Control Process: Received Temperature = 30.00°C</text:span></text:p>
      <text:p text:style-name="P2"><text:span text:style-name="Source_20_Text">Control Process: Compressor ON</text:span></text:p>
      <text:p text:style-name="Horizontal_20_Line"/>
      <text:h text:style-name="Heading_20_1" text:outline-level="1">🔹 Implementation Logic</text:h>
      <text:h text:style-name="Heading_20_3" text:outline-level="3">1️⃣ pipe()</text:h>
      <text:p text:style-name="Text_20_body">Creates two file descriptors:</text:p>
      <text:list xml:id="list2373654784" text:style-name="L3">
        <text:list-item>
          <text:p text:style-name="P6"><text:span text:style-name="Source_20_Text">pipefd[0]</text:span> → Read end</text:p>
        </text:list-item>
        <text:list-item>
          <text:p text:style-name="P6"><text:span text:style-name="Source_20_Text">pipefd[1]</text:span> → Write end</text:p>
        </text:list-item>
      </text:list>
      <text:h text:style-name="Heading_20_3" text:outline-level="3">2️⃣ fork()</text:h>
      <text:p text:style-name="Text_20_body">Creates:</text:p>
      <text:list xml:id="list35100062" text:style-name="L4">
        <text:list-item>
          <text:p text:style-name="P7">Child → Sensor reading + calculation</text:p>
        </text:list-item>
        <text:list-item>
          <text:p text:style-name="P7">Parent → Decision making</text:p>
        </text:list-item>
      </text:list>
      <text:h text:style-name="Heading_20_3" text:outline-level="3">3️⃣ Communication</text:h>
      <text:p text:style-name="Text_20_body">Child:</text:p>
      <text:p text:style-name="P2"><text:span text:style-name="Source_20_Text">write(pipefd[1], &amp;temperature, sizeof(temperature));</text:span></text:p>
      <text:p text:style-name="Text_20_body">Parent:</text:p>
      <text:p text:style-name="P2"><text:span text:style-name="Source_20_Text">read(pipefd[0], &amp;temperature, sizeof(temperature));</text:span></text:p>
      <text:p text:style-name="Horizontal_20_Line"/>
      <text:h text:style-name="Heading_20_1" text:outline-level="1">🔹 Real Embedded System Perspective</text:h>
      <text:p text:style-name="Text_20_body">In real systems (like STM32 or Linux-based controllers):</text:p>
      <text:list xml:id="list639042525" text:style-name="L5">
        <text:list-item>
          <text:p text:style-name="P8">Read Process → Reads ADC value from sensor</text:p>
        </text:list-item>
        <text:list-item>
          <text:p text:style-name="P8">Control Process → Drives GPIO pin to control relay/compressor</text:p>
        </text:list-item>
        <text:list-item>
          <text:p text:style-name="P8">Pipe → Used when both tasks are separate processes in Linux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11:13:52.481017358</meta:creation-date>
    <dc:date>2026-02-18T11:14:11.865465274</dc:date>
    <meta:editing-duration>PT20S</meta:editing-duration>
    <meta:editing-cycles>1</meta:editing-cycles>
    <meta:document-statistic meta:table-count="0" meta:image-count="0" meta:object-count="0" meta:page-count="3" meta:paragraph-count="92" meta:word-count="416" meta:character-count="3116" meta:non-whitespace-character-count="2536"/>
    <meta:generator>LibreOffice/7.3.7.2$Linux_X86_64 LibreOffice_project/30$Build-2</meta:generator>
  </office:meta>
</office:document-meta>
</file>