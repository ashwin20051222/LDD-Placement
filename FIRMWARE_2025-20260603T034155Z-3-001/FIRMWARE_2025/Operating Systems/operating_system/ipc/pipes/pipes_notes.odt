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96cm" table:align="left"/>
    </style:style>
    <style:style style:name="Table1.A" style:family="table-column">
      <style:table-column-properties style:column-width="2.013cm"/>
    </style:style>
    <style:style style:name="Table1.B" style:family="table-column">
      <style:table-column-properties style:column-width="3.68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7.392cm" table:align="left"/>
    </style:style>
    <style:style style:name="Table2.A" style:family="table-column">
      <style:table-column-properties style:column-width="3.249cm"/>
    </style:style>
    <style:style style:name="Table2.B" style:family="table-column">
      <style:table-column-properties style:column-width="1.732cm"/>
    </style:style>
    <style:style style:name="Table2.C" style:family="table-column">
      <style:table-column-properties style:column-width="2.41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7.528cm" table:align="left"/>
    </style:style>
    <style:style style:name="Table3.A" style:family="table-column">
      <style:table-column-properties style:column-width="2.013cm"/>
    </style:style>
    <style:style style:name="Table3.B" style:family="table-column">
      <style:table-column-properties style:column-width="5.51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701cm" table:align="left"/>
    </style:style>
    <style:style style:name="Table4.A" style:family="table-column">
      <style:table-column-properties style:column-width="2.136cm"/>
    </style:style>
    <style:style style:name="Table4.B" style:family="table-column">
      <style:table-column-properties style:column-width="4.56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6.911cm" table:align="left"/>
    </style:style>
    <style:style style:name="Table5.A" style:family="table-column">
      <style:table-column-properties style:column-width="2.136cm"/>
    </style:style>
    <style:style style:name="Table5.B" style:family="table-column">
      <style:table-column-properties style:column-width="4.77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5.738cm" table:align="left"/>
    </style:style>
    <style:style style:name="Table6.A" style:family="table-column">
      <style:table-column-properties style:column-width="2.138cm"/>
    </style:style>
    <style:style style:name="Table6.B" style:family="table-column">
      <style:table-column-properties style:column-width="3.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8.641cm" table:align="left"/>
    </style:style>
    <style:style style:name="Table7.A" style:family="table-column">
      <style:table-column-properties style:column-width="4.778cm"/>
    </style:style>
    <style:style style:name="Table7.B" style:family="table-column">
      <style:table-column-properties style:column-width="3.86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6.888cm" table:align="left"/>
    </style:style>
    <style:style style:name="Table8.A" style:family="table-column">
      <style:table-column-properties style:column-width="1.808cm"/>
    </style:style>
    <style:style style:name="Table8.B" style:family="table-column">
      <style:table-column-properties style:column-width="2.342cm"/>
    </style:style>
    <style:style style:name="Table8.C" style:family="table-column">
      <style:table-column-properties style:column-width="2.73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0.093cm" table:align="left"/>
    </style:style>
    <style:style style:name="Table9.A" style:family="table-column">
      <style:table-column-properties style:column-width="4.849cm"/>
    </style:style>
    <style:style style:name="Table9.B" style:family="table-column">
      <style:table-column-properties style:column-width="5.244cm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>
      <style:paragraph-properties fo:break-before="pag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ipes in IPC (Inter-Process Communication) – POSIX Notes</text:h>
      <text:h text:style-name="Heading_20_3" text:outline-level="3">1️⃣ What is a Pipe?</text:h>
      <text:p text:style-name="Text_20_body">A <text:span text:style-name="Strong_20_Emphasis">pipe</text:span> is a unidirectional IPC mechanism used for communication between related processes (usually parent and child).</text:p>
      <text:list xml:id="list1729248184" text:style-name="L1">
        <text:list-item>
          <text:p text:style-name="P3">Data flows in <text:span text:style-name="Strong_20_Emphasis">FIFO (First In First Out)</text:span> order.</text:p>
        </text:list-item>
        <text:list-item>
          <text:p text:style-name="P3">Implemented in POSIX using the <text:span text:style-name="Source_20_Text">pipe()</text:span> system call.</text:p>
        </text:list-item>
        <text:list-item>
          <text:p text:style-name="P3">Works only between processes on the <text:span text:style-name="Strong_20_Emphasis">same machine</text:span>.</text:p>
        </text:list-item>
        <text:list-item>
          <text:p text:style-name="P3">Default pipe is <text:span text:style-name="Strong_20_Emphasis">half-duplex</text:span> (one-way communication).</text:p>
        </text:list-item>
      </text:list>
      <text:p text:style-name="Horizontal_20_Line"/>
      <text:h text:style-name="Heading_20_3" text:outline-level="3">2️⃣ POSIX Pipe System Call</text:h>
      <text:p text:style-name="P1"><text:span text:style-name="Source_20_Text">#include &lt;unistd.h&gt;</text:span></text:p>
      <text:p text:style-name="P1"/>
      <text:p text:style-name="P2"><text:span text:style-name="Source_20_Text">int pipe(int fd[2]);</text:span></text:p>
      <text:list xml:id="list2830940225" text:style-name="L2">
        <text:list-item>
          <text:p text:style-name="P4"><text:span text:style-name="Source_20_Text">fd[0]</text:span> → Read end</text:p>
        </text:list-item>
        <text:list-item>
          <text:p text:style-name="P4"><text:span text:style-name="Source_20_Text">fd[1]</text:span> → Write end</text:p>
        </text:list-item>
        <text:list-item>
          <text:p text:style-name="P4">Returns <text:span text:style-name="Source_20_Text">0</text:span> on success, <text:span text:style-name="Source_20_Text">-1</text:span> on error.</text:p>
        </text:list-item>
      </text:list>
      <text:p text:style-name="Horizontal_20_Line"/>
      <text:h text:style-name="Heading_20_3" text:outline-level="3">3️⃣ How Pipe Works with <text:span text:style-name="Source_20_Text">fork()</text:span></text:h>
      <text:list xml:id="list2656376174" text:style-name="L3">
        <text:list-item>
          <text:p text:style-name="P5">Create pipe.</text:p>
        </text:list-item>
        <text:list-item>
          <text:p text:style-name="P5">Call <text:span text:style-name="Source_20_Text">fork()</text:span>.</text:p>
        </text:list-item>
        <text:list-item>
          <text:p text:style-name="P5">Close unused ends:</text:p>
          <text:list>
            <text:list-item>
              <text:p text:style-name="P5">Parent closes read end.</text:p>
            </text:list-item>
            <text:list-item>
              <text:p text:style-name="P5">Child closes write end.</text:p>
            </text:list-item>
          </text:list>
        </text:list-item>
        <text:list-item>
          <text:p text:style-name="P5">Use:</text:p>
          <text:list>
            <text:list-item>
              <text:p text:style-name="P5"><text:span text:style-name="Source_20_Text">write(fd[1], ...)</text:span></text:p>
            </text:list-item>
            <text:list-item>
              <text:p text:style-name="P5"><text:span text:style-name="Source_20_Text">read(fd[0], ...)</text:span></text:p>
            </text:list-item>
          </text:list>
        </text:list-item>
      </text:list>
      <text:p text:style-name="Horizontal_20_Line"/>
      <text:h text:style-name="Heading_20_3" text:outline-level="3">4️⃣ Important POSIX Functions Used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unction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pipe()</text:span></text:p>
          </table:table-cell>
          <table:table-cell table:style-name="Table1.A1" office:value-type="string">
            <text:p text:style-name="Table_20_Contents">Create pipe</text:p>
          </table:table-cell>
        </table:table-row>
        <table:table-row>
          <table:table-cell table:style-name="Table1.A1" office:value-type="string">
            <text:p text:style-name="Table_20_Contents"><text:span text:style-name="Source_20_Text">fork()</text:span></text:p>
          </table:table-cell>
          <table:table-cell table:style-name="Table1.A1" office:value-type="string">
            <text:p text:style-name="Table_20_Contents">Create child process</text:p>
          </table:table-cell>
        </table:table-row>
        <table:table-row>
          <table:table-cell table:style-name="Table1.A1" office:value-type="string">
            <text:p text:style-name="Table_20_Contents"><text:span text:style-name="Source_20_Text">read()</text:span></text:p>
          </table:table-cell>
          <table:table-cell table:style-name="Table1.A1" office:value-type="string">
            <text:p text:style-name="Table_20_Contents">Read from pipe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write()</text:span></text:p>
          </table:table-cell>
          <table:table-cell table:style-name="Table1.A1" office:value-type="string">
            <text:p text:style-name="Table_20_Contents">Write to pipe</text:p>
          </table:table-cell>
        </table:table-row>
        <table:table-row>
          <table:table-cell table:style-name="Table1.A1" office:value-type="string">
            <text:p text:style-name="Table_20_Contents"><text:span text:style-name="Source_20_Text">close()</text:span></text:p>
          </table:table-cell>
          <table:table-cell table:style-name="Table1.A1" office:value-type="string">
            <text:p text:style-name="Table_20_Contents">Close file descriptor</text:p>
          </table:table-cell>
        </table:table-row>
        <table:table-row>
          <table:table-cell table:style-name="Table1.A1" office:value-type="string">
            <text:p text:style-name="Table_20_Contents"><text:span text:style-name="Source_20_Text">wait()</text:span></text:p>
          </table:table-cell>
          <table:table-cell table:style-name="Table1.A1" office:value-type="string">
            <text:p text:style-name="Table_20_Contents">Wait for child</text:p>
          </table:table-cell>
        </table:table-row>
      </table:table>
      <text:p text:style-name="Horizontal_20_Line"/>
      <text:h text:style-name="Heading_20_3" text:outline-level="3">5️⃣ Key Points</text:h>
      <text:list xml:id="list200343544" text:style-name="L4">
        <text:list-item>
          <text:p text:style-name="P6">If <text:span text:style-name="Strong_20_Emphasis">all writers close</text:span>, <text:span text:style-name="Source_20_Text">read()</text:span> returns <text:span text:style-name="Source_20_Text">0</text:span> (EOF).</text:p>
        </text:list-item>
        <text:list-item>
          <text:p text:style-name="P6">If <text:span text:style-name="Strong_20_Emphasis">all readers close</text:span>, <text:span text:style-name="Source_20_Text">write()</text:span> causes <text:span text:style-name="Source_20_Text">SIGPIPE</text:span>.</text:p>
        </text:list-item>
        <text:list-item>
          <text:p text:style-name="P6">Pipe buffer size is system dependent (commonly 64KB in Linux).</text:p>
        </text:list-item>
        <text:list-item>
          <text:p text:style-name="P6">Pipes are represented as <text:span text:style-name="Strong_20_Emphasis">file descriptors</text:span>.</text:p>
        </text:list-item>
      </text:list>
      <text:p text:style-name="Horizontal_20_Line"/>
      <text:h text:style-name="Heading_20_1" text:outline-level="1">Small POSIX C Program – Parent to Child Communication</text:h>
      <text:h text:style-name="Heading_20_3" text:outline-level="3">🔹 Example: Parent sends message to child</text:h>
      <text:p text:style-name="P1"><text:span text:style-name="Source_20_Text">/*</text:span></text:p>
      <text:p text:style-name="P1"><text:span text:style-name="Source_20_Text"><text:s text:c="3"/>pipe_example.c</text:span></text:p>
      <text:p text:style-name="P1"><text:span text:style-name="Source_20_Text"><text:s text:c="3"/>Demonstrates POSIX Pipe (Parent → Child)</text:span></text:p>
      <text:p text:style-name="P1"><text:span text:style-name="Source_20_Text">*/</text:span></text:p>
      <text:p text:style-name="P1"/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unistd.h&gt;</text:span></text:p>
      <text:p text:style-name="P1"><text:span text:style-name="Source_20_Text">#include &lt;string.h&gt;</text:span></text:p>
      <text:p text:style-name="P1"><text:span text:style-name="Source_20_Text">#include &lt;sys/types.h&gt;</text:span></text:p>
      <text:p text:style-name="P1"><text:span text:style-name="Source_20_Text">#include &lt;sys/wait.h&gt;</text:span></text:p>
      <text:p text:style-name="P1"/>
      <text:p text:style-name="P1"><text:span text:style-name="Source_20_Text">int main() {</text:span></text:p>
      <text:p text:style-name="P1"><text:span text:style-name="Source_20_Text"><text:s text:c="4"/>int fd[2];</text:span></text:p>
      <text:p text:style-name="P1"><text:span text:style-name="Source_20_Text"><text:s text:c="4"/>pid_t pid;</text:span></text:p>
      <text:p text:style-name="P1"><text:span text:style-name="Source_20_Text"><text:s text:c="4"/>char write_msg[] = "Hello from Parent";</text:span></text:p>
      <text:p text:style-name="P1"><text:span text:style-name="Source_20_Text"><text:s text:c="4"/>char read_msg[100];</text:span></text:p>
      <text:p text:style-name="P1"/>
      <text:p text:style-name="P1"><text:span text:style-name="Source_20_Text"><text:s text:c="4"/>// Create pipe</text:span></text:p>
      <text:p text:style-name="P1"><text:span text:style-name="Source_20_Text"><text:s text:c="4"/>if (pipe(fd) == -1) {</text:span></text:p>
      <text:p text:style-name="P1"><text:span text:style-name="Source_20_Text"><text:s text:c="8"/>perror("pipe");</text:span></text:p>
      <text:p text:style-name="P1"><text:span text:style-name="Source_20_Text"><text:s text:c="8"/>exit(EXIT_FAILURE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id = fork();</text:span></text:p>
      <text:p text:style-name="P1"/>
      <text:p text:style-name="P1"><text:span text:style-name="Source_20_Text"><text:s text:c="4"/>if (pid &lt; 0) {</text:span></text:p>
      <text:p text:style-name="P1"><text:span text:style-name="Source_20_Text"><text:s text:c="8"/>perror("fork");</text:span></text:p>
      <text:p text:style-name="P1"><text:span text:style-name="Source_20_Text"><text:s text:c="8"/>exit(EXIT_FAILURE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else if (pid == 0) { <text:s/>// Child</text:span></text:p>
      <text:p text:style-name="P1"><text:span text:style-name="Source_20_Text"><text:s text:c="8"/>close(fd[1]); <text:s/>// Close unused write end</text:span></text:p>
      <text:p text:style-name="P1"/>
      <text:p text:style-name="P1"><text:soft-page-break/><text:span text:style-name="Source_20_Text"><text:s text:c="8"/>read(fd[0], read_msg, sizeof(read_msg));</text:span></text:p>
      <text:p text:style-name="P1"><text:span text:style-name="Source_20_Text"><text:s text:c="8"/>printf("Child received: %s\n", read_msg);</text:span></text:p>
      <text:p text:style-name="P1"/>
      <text:p text:style-name="P1"><text:span text:style-name="Source_20_Text"><text:s text:c="8"/>close(fd[0]);</text:span></text:p>
      <text:p text:style-name="P1"><text:span text:style-name="Source_20_Text"><text:s text:c="8"/>exit(EXIT_SUCCESS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else { <text:s/>// Parent</text:span></text:p>
      <text:p text:style-name="P1"><text:span text:style-name="Source_20_Text"><text:s text:c="8"/>close(fd[0]); <text:s/>// Close unused read end</text:span></text:p>
      <text:p text:style-name="P1"/>
      <text:p text:style-name="P1"><text:span text:style-name="Source_20_Text"><text:s text:c="8"/>write(fd[1], write_msg, strlen(write_msg) + 1);</text:span></text:p>
      <text:p text:style-name="P1"><text:span text:style-name="Source_20_Text"><text:s text:c="8"/>close(fd[1]);</text:span></text:p>
      <text:p text:style-name="P1"/>
      <text:p text:style-name="P1"><text:span text:style-name="Source_20_Text"><text:s text:c="8"/>wait(NULL); <text:s/>// Wait for child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3" text:outline-level="3">🔹 Compilation &amp; Execution</text:h>
      <text:p text:style-name="P1"><text:span text:style-name="Source_20_Text">gcc pipe_example.c -o pipe_example</text:span></text:p>
      <text:p text:style-name="P2"><text:span text:style-name="Source_20_Text">./pipe_example</text:span></text:p>
      <text:p text:style-name="Text_20_body">Output:</text:p>
      <text:p text:style-name="P2"><text:span text:style-name="Source_20_Text">Child received: Hello from Parent</text:span></text:p>
      <text:p text:style-name="Horizontal_20_Line"/>
      <text:h text:style-name="Heading_20_1" text:outline-level="1">Two-Way Communication (Using Two Pipes)</text:h>
      <text:p text:style-name="Text_20_body">For full-duplex communication:</text:p>
      <text:p text:style-name="P1"><text:span text:style-name="Source_20_Text">int pipe1[2], pipe2[2];</text:span></text:p>
      <text:p text:style-name="P1"><text:span text:style-name="Source_20_Text">pipe(pipe1); <text:s/>// Parent → Child</text:span></text:p>
      <text:p text:style-name="P2"><text:span text:style-name="Source_20_Text">pipe(pipe2); <text:s/>// Child → Parent</text:span></text:p>
      <text:p text:style-name="Horizontal_20_Line"/>
      <text:h text:style-name="Heading_20_1" text:outline-level="1">Types of Pipes in POSIX</text:h>
      <text:h text:style-name="Heading_20_3" text:outline-level="3">1️⃣ Anonymous Pipes</text:h>
      <text:list xml:id="list505490187" text:style-name="L5">
        <text:list-item>
          <text:p text:style-name="P7">Created using <text:span text:style-name="Source_20_Text">pipe()</text:span></text:p>
        </text:list-item>
        <text:list-item>
          <text:p text:style-name="P7">Used between related processes</text:p>
        </text:list-item>
      </text:list>
      <text:h text:style-name="Heading_20_3" text:outline-level="3">2️⃣ Named Pipes (FIFO)</text:h>
      <text:p text:style-name="Text_20_body">Created using:</text:p>
      <text:p text:style-name="P2"><text:span text:style-name="Source_20_Text">mkfifo("myfifo", 0666);</text:span></text:p>
      <text:p text:style-name="Text_20_body">Used for unrelated processes.</text:p>
      <text:p text:style-name="Horizontal_20_Line"><text:soft-page-break/></text:p>
      <text:h text:style-name="Heading_20_1" text:outline-level="1">Comparison: Pipe vs FIFO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Pipe</text:p>
            </table:table-cell>
            <table:table-cell table:style-name="Table2.A1" office:value-type="string">
              <text:p text:style-name="Table_20_Heading">FIFO</text:p>
            </table:table-cell>
          </table:table-row>
        </table:table-header-rows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Yes</text:p>
          </table:table-cell>
        </table:table-row>
        <table:table-row>
          <table:table-cell table:style-name="Table2.A1" office:value-type="string">
            <text:p text:style-name="Table_20_Contents">Related Process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Not required</text:p>
          </table:table-cell>
        </table:table-row>
        <table:table-row>
          <table:table-cell table:style-name="Table2.A1" office:value-type="string">
            <text:p text:style-name="Table_20_Contents">Creation</text:p>
          </table:table-cell>
          <table:table-cell table:style-name="Table2.A1" office:value-type="string">
            <text:p text:style-name="Table_20_Contents"><text:span text:style-name="Source_20_Text">pipe()</text:span></text:p>
          </table:table-cell>
          <table:table-cell table:style-name="Table2.A1" office:value-type="string">
            <text:p text:style-name="Table_20_Contents"><text:span text:style-name="Source_20_Text">mkfifo()</text:span></text:p>
          </table:table-cell>
        </table:table-row>
      </table:table>
      <text:p text:style-name="Standard"/>
      <text:h text:style-name="Heading_20_2" text:outline-level="2">Two-Way Communication Using Pipes (Full Duplex) – POSIX</text:h>
      <text:p text:style-name="Text_20_body">A single <text:span text:style-name="Source_20_Text">pipe()</text:span> provides <text:span text:style-name="Strong_20_Emphasis">one-way communication</text:span>.<text:line-break/>For <text:span text:style-name="Strong_20_Emphasis">two-way communication</text:span>, we must create <text:span text:style-name="Strong_20_Emphasis">two pipes</text:span>:</text:p>
      <text:list xml:id="list497922251" text:style-name="L6">
        <text:list-item>
          <text:p text:style-name="P8">Pipe 1 → Parent ➝ Child</text:p>
        </text:list-item>
        <text:list-item>
          <text:p text:style-name="P8">Pipe 2 → Child ➝ Parent</text:p>
        </text:list-item>
      </text:list>
      <text:p text:style-name="Horizontal_20_Line"/>
      <text:h text:style-name="Heading_20_2" text:outline-level="2">🔹 Steps</text:h>
      <text:list xml:id="list310608646" text:style-name="L7">
        <text:list-item>
          <text:p text:style-name="P9">Create two pipes.</text:p>
        </text:list-item>
        <text:list-item>
          <text:p text:style-name="P9">Call <text:span text:style-name="Source_20_Text">fork()</text:span>.</text:p>
        </text:list-item>
        <text:list-item>
          <text:p text:style-name="P9">Close unused pipe ends in each process.</text:p>
        </text:list-item>
        <text:list-item>
          <text:p text:style-name="P9">Use <text:span text:style-name="Source_20_Text">write()</text:span> and <text:span text:style-name="Source_20_Text">read()</text:span> properly.</text:p>
        </text:list-item>
        <text:list-item>
          <text:p text:style-name="P9">Use <text:span text:style-name="Source_20_Text">wait()</text:span> in parent.</text:p>
        </text:list-item>
      </text:list>
      <text:p text:style-name="Horizontal_20_Line"/>
      <text:h text:style-name="Heading_20_2" text:outline-level="2">🔹 Diagram</text:h>
      <text:p text:style-name="P1"><text:span text:style-name="Source_20_Text">Parent <text:s/>----(pipe1)---&gt; <text:s/>Child</text:span></text:p>
      <text:p text:style-name="P2"><text:span text:style-name="Source_20_Text">Parent <text:s/>&lt;---(pipe2)---- <text:s/>Child</text:span></text:p>
      <text:p text:style-name="Horizontal_20_Line"/>
      <text:h text:style-name="Heading_20_1" text:outline-level="1">POSIX C Program – Two-Way Communication</text:h>
      <text:p text:style-name="P1"><text:span text:style-name="Source_20_Text">/*</text:span></text:p>
      <text:p text:style-name="P1"><text:span text:style-name="Source_20_Text"><text:s text:c="3"/>two_way_pipe.c</text:span></text:p>
      <text:p text:style-name="P1"><text:span text:style-name="Source_20_Text"><text:s text:c="3"/>Demonstrates Full Duplex Communication using POSIX Pipes</text:span></text:p>
      <text:p text:style-name="P1"><text:span text:style-name="Source_20_Text">*/</text:span></text:p>
      <text:p text:style-name="P1"/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unistd.h&gt;</text:span></text:p>
      <text:p text:style-name="P1"><text:soft-page-break/><text:span text:style-name="Source_20_Text">#include &lt;string.h&gt;</text:span></text:p>
      <text:p text:style-name="P1"><text:span text:style-name="Source_20_Text">#include &lt;sys/types.h&gt;</text:span></text:p>
      <text:p text:style-name="P1"><text:span text:style-name="Source_20_Text">#include &lt;sys/wait.h&gt;</text:span></text:p>
      <text:p text:style-name="P1"/>
      <text:p text:style-name="P1"><text:span text:style-name="Source_20_Text">int main() {</text:span></text:p>
      <text:p text:style-name="P1"><text:span text:style-name="Source_20_Text"><text:s text:c="4"/>int p2c[2]; <text:s text:c="2"/>// Parent to Child</text:span></text:p>
      <text:p text:style-name="P1"><text:span text:style-name="Source_20_Text"><text:s text:c="4"/>int c2p[2]; <text:s text:c="2"/>// Child to Parent</text:span></text:p>
      <text:p text:style-name="P1"><text:span text:style-name="Source_20_Text"><text:s text:c="4"/>pid_t pid;</text:span></text:p>
      <text:p text:style-name="P1"/>
      <text:p text:style-name="P1"><text:span text:style-name="Source_20_Text"><text:s text:c="4"/>char parent_msg[] = "Hello Child";</text:span></text:p>
      <text:p text:style-name="P1"><text:span text:style-name="Source_20_Text"><text:s text:c="4"/>char child_msg[] <text:s/>= "Hello Parent";</text:span></text:p>
      <text:p text:style-name="P1"/>
      <text:p text:style-name="P1"><text:span text:style-name="Source_20_Text"><text:s text:c="4"/>char buffer[100];</text:span></text:p>
      <text:p text:style-name="P1"/>
      <text:p text:style-name="P1"><text:span text:style-name="Source_20_Text"><text:s text:c="4"/>// Create both pipes</text:span></text:p>
      <text:p text:style-name="P1"><text:span text:style-name="Source_20_Text"><text:s text:c="4"/>if (pipe(p2c) == -1 || pipe(c2p) == -1) {</text:span></text:p>
      <text:p text:style-name="P1"><text:span text:style-name="Source_20_Text"><text:s text:c="8"/>perror("pipe");</text:span></text:p>
      <text:p text:style-name="P1"><text:span text:style-name="Source_20_Text"><text:s text:c="8"/>exit(EXIT_FAILURE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id = fork();</text:span></text:p>
      <text:p text:style-name="P1"/>
      <text:p text:style-name="P1"><text:span text:style-name="Source_20_Text"><text:s text:c="4"/>if (pid &lt; 0) {</text:span></text:p>
      <text:p text:style-name="P1"><text:span text:style-name="Source_20_Text"><text:s text:c="8"/>perror("fork");</text:span></text:p>
      <text:p text:style-name="P1"><text:span text:style-name="Source_20_Text"><text:s text:c="8"/>exit(EXIT_FAILURE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else if (pid == 0) { <text:s/>// Child Process</text:span></text:p>
      <text:p text:style-name="P1"/>
      <text:p text:style-name="P1"><text:span text:style-name="Source_20_Text"><text:s text:c="8"/>close(p2c[1]); <text:s/>// Close unused write end of p2c</text:span></text:p>
      <text:p text:style-name="P1"><text:span text:style-name="Source_20_Text"><text:s text:c="8"/>close(c2p[0]); <text:s/>// Close unused read end of c2p</text:span></text:p>
      <text:p text:style-name="P1"/>
      <text:p text:style-name="P1"><text:span text:style-name="Source_20_Text"><text:s text:c="8"/>// Read from parent</text:span></text:p>
      <text:p text:style-name="P1"><text:span text:style-name="Source_20_Text"><text:s text:c="8"/>read(p2c[0], buffer, sizeof(buffer));</text:span></text:p>
      <text:p text:style-name="P1"><text:span text:style-name="Source_20_Text"><text:s text:c="8"/>printf("Child received: %s\n", buffer);</text:span></text:p>
      <text:p text:style-name="P1"/>
      <text:p text:style-name="P1"><text:span text:style-name="Source_20_Text"><text:s text:c="8"/>// Send reply to parent</text:span></text:p>
      <text:p text:style-name="P1"><text:span text:style-name="Source_20_Text"><text:s text:c="8"/>write(c2p[1], child_msg, strlen(child_msg) + 1);</text:span></text:p>
      <text:p text:style-name="P1"/>
      <text:p text:style-name="P1"><text:span text:style-name="Source_20_Text"><text:s text:c="8"/>close(p2c[0]);</text:span></text:p>
      <text:p text:style-name="P1"><text:span text:style-name="Source_20_Text"><text:s text:c="8"/>close(c2p[1]);</text:span></text:p>
      <text:p text:style-name="P1"><text:span text:style-name="Source_20_Text"><text:s text:c="8"/>exit(EXIT_SUCCESS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else { <text:s/>// Parent Process</text:span></text:p>
      <text:p text:style-name="P1"/>
      <text:p text:style-name="P1"><text:span text:style-name="Source_20_Text"><text:s text:c="8"/>close(p2c[0]); <text:s/>// Close unused read end of p2c</text:span></text:p>
      <text:p text:style-name="P1"><text:span text:style-name="Source_20_Text"><text:s text:c="8"/>close(c2p[1]); <text:s/>// Close unused write end of c2p</text:span></text:p>
      <text:p text:style-name="P1"/>
      <text:p text:style-name="P1"><text:span text:style-name="Source_20_Text"><text:s text:c="8"/>// Send message to child</text:span></text:p>
      <text:p text:style-name="P1"><text:span text:style-name="Source_20_Text"><text:s text:c="8"/>write(p2c[1], parent_msg, strlen(parent_msg) + 1);</text:span></text:p>
      <text:p text:style-name="P1"/>
      <text:p text:style-name="P1"><text:span text:style-name="Source_20_Text"><text:s text:c="8"/>// Read reply from child</text:span></text:p>
      <text:p text:style-name="P1"><text:span text:style-name="Source_20_Text"><text:s text:c="8"/>read(c2p[0], buffer, sizeof(buffer));</text:span></text:p>
      <text:p text:style-name="P1"><text:span text:style-name="Source_20_Text"><text:s text:c="8"/>printf("Parent received: %s\n", buffer);</text:span></text:p>
      <text:p text:style-name="P1"/>
      <text:p text:style-name="P1"><text:span text:style-name="Source_20_Text"><text:s text:c="8"/>close(p2c[1]);</text:span></text:p>
      <text:p text:style-name="P1"><text:span text:style-name="Source_20_Text"><text:s text:c="8"/>close(c2p[0]);</text:span></text:p>
      <text:p text:style-name="P1"/>
      <text:p text:style-name="P1"><text:span text:style-name="Source_20_Text"><text:s text:c="8"/>wait(NULL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><text:soft-page-break/></text:p>
      <text:h text:style-name="Heading_20_2" text:outline-level="2">🔹 Compilation</text:h>
      <text:p text:style-name="P1"><text:span text:style-name="Source_20_Text">gcc two_way_pipe.c -o two_way_pipe</text:span></text:p>
      <text:p text:style-name="P2"><text:span text:style-name="Source_20_Text">./two_way_pipe</text:span></text:p>
      <text:h text:style-name="Heading_20_3" text:outline-level="3">🔹 Output</text:h>
      <text:p text:style-name="P1"><text:span text:style-name="Source_20_Text">Child received: Hello Child</text:span></text:p>
      <text:p text:style-name="P2"><text:span text:style-name="Source_20_Text">Parent received: Hello Parent</text:span></text:p>
      <text:p text:style-name="Horizontal_20_Line"/>
      <text:h text:style-name="Heading_20_1" text:outline-level="1">🔹 Important POSIX Concepts Used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Function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pipe()</text:span></text:p>
          </table:table-cell>
          <table:table-cell table:style-name="Table3.A1" office:value-type="string">
            <text:p text:style-name="Table_20_Contents">Create communication channel</text:p>
          </table:table-cell>
        </table:table-row>
        <table:table-row>
          <table:table-cell table:style-name="Table3.A1" office:value-type="string">
            <text:p text:style-name="Table_20_Contents"><text:span text:style-name="Source_20_Text">fork()</text:span></text:p>
          </table:table-cell>
          <table:table-cell table:style-name="Table3.A1" office:value-type="string">
            <text:p text:style-name="Table_20_Contents">Create child process</text:p>
          </table:table-cell>
        </table:table-row>
        <table:table-row>
          <table:table-cell table:style-name="Table3.A1" office:value-type="string">
            <text:p text:style-name="Table_20_Contents"><text:span text:style-name="Source_20_Text">read()</text:span></text:p>
          </table:table-cell>
          <table:table-cell table:style-name="Table3.A1" office:value-type="string">
            <text:p text:style-name="Table_20_Contents">Read data</text:p>
          </table:table-cell>
        </table:table-row>
        <table:table-row>
          <table:table-cell table:style-name="Table3.A1" office:value-type="string">
            <text:p text:style-name="Table_20_Contents"><text:span text:style-name="Source_20_Text">write()</text:span></text:p>
          </table:table-cell>
          <table:table-cell table:style-name="Table3.A1" office:value-type="string">
            <text:p text:style-name="Table_20_Contents">Send data</text:p>
          </table:table-cell>
        </table:table-row>
        <table:table-row>
          <table:table-cell table:style-name="Table3.A1" office:value-type="string">
            <text:p text:style-name="Table_20_Contents"><text:span text:style-name="Source_20_Text">close()</text:span></text:p>
          </table:table-cell>
          <table:table-cell table:style-name="Table3.A1" office:value-type="string">
            <text:p text:style-name="Table_20_Contents">Close unused descriptors</text:p>
          </table:table-cell>
        </table:table-row>
        <table:table-row>
          <table:table-cell table:style-name="Table3.A1" office:value-type="string">
            <text:p text:style-name="Table_20_Contents"><text:span text:style-name="Source_20_Text">wait()</text:span></text:p>
          </table:table-cell>
          <table:table-cell table:style-name="Table3.A1" office:value-type="string">
            <text:p text:style-name="Table_20_Contents">Synchronization</text:p>
          </table:table-cell>
        </table:table-row>
      </table:table>
      <text:p text:style-name="Horizontal_20_Line"/>
      <text:h text:style-name="Heading_20_1" text:outline-level="1">🔹 Why Closing Unused Ends is Important?</text:h>
      <text:p text:style-name="Text_20_body">If you don’t close unused ends:</text:p>
      <text:list xml:id="list631594945" text:style-name="L8">
        <text:list-item>
          <text:p text:style-name="P10"><text:span text:style-name="Source_20_Text">read()</text:span> may block forever.</text:p>
        </text:list-item>
        <text:list-item>
          <text:p text:style-name="P10">EOF will not be detected.</text:p>
        </text:list-item>
        <text:list-item>
          <text:p text:style-name="P10">Resource leakage happens.</text:p>
        </text:list-item>
      </text:list>
      <text:h text:style-name="Heading_20_1" text:outline-level="1">Two-Way Pipe using <text:span text:style-name="Source_20_Text">dup2()</text:span> and <text:span text:style-name="Source_20_Text">exec()</text:span> (POSIX)</text:h>
      <text:p text:style-name="Text_20_body">This example demonstrates <text:span text:style-name="Strong_20_Emphasis">full-duplex communication</text:span> between a parent and a child process where:</text:p>
      <text:list xml:id="list2436177423" text:style-name="L9">
        <text:list-item>
          <text:p text:style-name="P11">Parent communicates through pipes</text:p>
        </text:list-item>
        <text:list-item>
          <text:p text:style-name="P11">Child replaces itself using <text:span text:style-name="Source_20_Text">exec()</text:span></text:p>
        </text:list-item>
        <text:list-item>
          <text:p text:style-name="P11"><text:span text:style-name="Source_20_Text">dup2()</text:span> redirects <text:span text:style-name="Strong_20_Emphasis">stdin</text:span> and <text:span text:style-name="Strong_20_Emphasis">stdout</text:span> of the child</text:p>
        </text:list-item>
      </text:list>
      <text:p text:style-name="Horizontal_20_Line"/>
      <text:h text:style-name="Heading_20_2" text:outline-level="2"><text:soft-page-break/>🔹 Concept</text:h>
      <text:p text:style-name="Text_20_body">We create <text:span text:style-name="Strong_20_Emphasis">two pipes</text:span>:</text:p>
      <text:list xml:id="list4149302798" text:style-name="L10">
        <text:list-item>
          <text:p text:style-name="P12"><text:span text:style-name="Source_20_Text">p2c</text:span> → Parent ➝ Child (connected to child’s <text:span text:style-name="Source_20_Text">stdin</text:span>)</text:p>
        </text:list-item>
        <text:list-item>
          <text:p text:style-name="P12"><text:span text:style-name="Source_20_Text">c2p</text:span> → Child ➝ Parent (connected to child’s <text:span text:style-name="Source_20_Text">stdout</text:span>)</text:p>
        </text:list-item>
      </text:list>
      <text:p text:style-name="Text_20_body">Then:</text:p>
      <text:list xml:id="list1762349854" text:style-name="L11">
        <text:list-item>
          <text:p text:style-name="P13">In child:</text:p>
          <text:list>
            <text:list-item>
              <text:p text:style-name="P13"><text:span text:style-name="Source_20_Text">dup2(p2c[0], STDIN_FILENO);</text:span></text:p>
            </text:list-item>
            <text:list-item>
              <text:p text:style-name="P13"><text:span text:style-name="Source_20_Text">dup2(c2p[1], STDOUT_FILENO);</text:span></text:p>
            </text:list-item>
            <text:list-item>
              <text:p text:style-name="P13"><text:span text:style-name="Source_20_Text">execl()</text:span> replaces child with another program</text:p>
            </text:list-item>
          </text:list>
        </text:list-item>
        <text:list-item>
          <text:p text:style-name="P13">Parent:</text:p>
          <text:list>
            <text:list-item>
              <text:p text:style-name="P13">Writes to pipe</text:p>
            </text:list-item>
            <text:list-item>
              <text:p text:style-name="P13">Reads from pipe</text:p>
            </text:list-item>
          </text:list>
        </text:list-item>
      </text:list>
      <text:p text:style-name="Horizontal_20_Line"/>
      <text:h text:style-name="Heading_20_2" text:outline-level="2">🔹 Process Diagram</text:h>
      <text:p text:style-name="P1"><text:span text:style-name="Source_20_Text">Parent <text:s text:c="19"/>Child (exec program)</text:span></text:p>
      <text:p text:style-name="P1"/>
      <text:p text:style-name="P1"><text:span text:style-name="Source_20_Text">write ---&gt; p2c ---&gt; stdin</text:span></text:p>
      <text:p text:style-name="P2"><text:span text:style-name="Source_20_Text">read <text:s/>&lt;--- c2p &lt;--- stdout</text:span></text:p>
      <text:p text:style-name="Horizontal_20_Line"/>
      <text:h text:style-name="Heading_20_1" text:outline-level="1">Example Program</text:h>
      <text:p text:style-name="Text_20_body">We will execute the command: <text:span text:style-name="Strong_20_Emphasis"><text:span text:style-name="Source_20_Text">tr a-z A-Z</text:span></text:span></text:p>
      <text:p text:style-name="Text_20_body">This converts lowercase input into uppercase.</text:p>
      <text:p text:style-name="Horizontal_20_Line"/>
      <text:h text:style-name="Heading_20_2" text:outline-level="2">🔹 C Program</text:h>
      <text:p text:style-name="P1"><text:span text:style-name="Source_20_Text">/*</text:span></text:p>
      <text:p text:style-name="P1"><text:span text:style-name="Source_20_Text"><text:s text:c="3"/>two_way_dup2_exec.c</text:span></text:p>
      <text:p text:style-name="P1"><text:span text:style-name="Source_20_Text"><text:s text:c="3"/>Demonstrates two-way communication using</text:span></text:p>
      <text:p text:style-name="P1"><text:span text:style-name="Source_20_Text"><text:s text:c="3"/>pipe(), dup2(), and exec()</text:span></text:p>
      <text:p text:style-name="P1"><text:span text:style-name="Source_20_Text">*/</text:span></text:p>
      <text:p text:style-name="P1"/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unistd.h&gt;</text:span></text:p>
      <text:p text:style-name="P1"><text:span text:style-name="Source_20_Text">#include &lt;string.h&gt;</text:span></text:p>
      <text:p text:style-name="P1"><text:span text:style-name="Source_20_Text">#include &lt;sys/types.h&gt;</text:span></text:p>
      <text:p text:style-name="P1"><text:span text:style-name="Source_20_Text">#include &lt;sys/wait.h&gt;</text:span></text:p>
      <text:p text:style-name="P1"/>
      <text:p text:style-name="P1"><text:soft-page-break/><text:span text:style-name="Source_20_Text">int main() {</text:span></text:p>
      <text:p text:style-name="P1"><text:span text:style-name="Source_20_Text"><text:s text:c="4"/>int p2c[2], c2p[2];</text:span></text:p>
      <text:p text:style-name="P1"><text:span text:style-name="Source_20_Text"><text:s text:c="4"/>pid_t pid;</text:span></text:p>
      <text:p text:style-name="P1"><text:span text:style-name="Source_20_Text"><text:s text:c="4"/>char buffer[100];</text:span></text:p>
      <text:p text:style-name="P1"/>
      <text:p text:style-name="P1"><text:span text:style-name="Source_20_Text"><text:s text:c="4"/>// Create pipes</text:span></text:p>
      <text:p text:style-name="P1"><text:span text:style-name="Source_20_Text"><text:s text:c="4"/>if (pipe(p2c) == -1 || pipe(c2p) == -1) {</text:span></text:p>
      <text:p text:style-name="P1"><text:span text:style-name="Source_20_Text"><text:s text:c="8"/>perror("pipe");</text:span></text:p>
      <text:p text:style-name="P1"><text:span text:style-name="Source_20_Text"><text:s text:c="8"/>exit(EXIT_FAILURE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id = fork();</text:span></text:p>
      <text:p text:style-name="P1"/>
      <text:p text:style-name="P1"><text:span text:style-name="Source_20_Text"><text:s text:c="4"/>if (pid &lt; 0) {</text:span></text:p>
      <text:p text:style-name="P1"><text:span text:style-name="Source_20_Text"><text:s text:c="8"/>perror("fork");</text:span></text:p>
      <text:p text:style-name="P1"><text:span text:style-name="Source_20_Text"><text:s text:c="8"/>exit(EXIT_FAILURE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else if (pid == 0) { <text:s/>// Child</text:span></text:p>
      <text:p text:style-name="P1"/>
      <text:p text:style-name="P1"><text:span text:style-name="Source_20_Text"><text:s text:c="8"/>// Redirect stdin and stdout</text:span></text:p>
      <text:p text:style-name="P1"><text:span text:style-name="Source_20_Text"><text:s text:c="8"/>dup2(p2c[0], STDIN_FILENO);</text:span></text:p>
      <text:p text:style-name="P1"><text:span text:style-name="Source_20_Text"><text:s text:c="8"/>dup2(c2p[1], STDOUT_FILENO);</text:span></text:p>
      <text:p text:style-name="P1"/>
      <text:p text:style-name="P1"><text:span text:style-name="Source_20_Text"><text:s text:c="8"/>// Close unused descriptors</text:span></text:p>
      <text:p text:style-name="P1"><text:span text:style-name="Source_20_Text"><text:s text:c="8"/>close(p2c[1]);</text:span></text:p>
      <text:p text:style-name="P1"><text:span text:style-name="Source_20_Text"><text:s text:c="8"/>close(c2p[0]);</text:span></text:p>
      <text:p text:style-name="P1"><text:span text:style-name="Source_20_Text"><text:s text:c="8"/>close(p2c[0]);</text:span></text:p>
      <text:p text:style-name="P1"><text:span text:style-name="Source_20_Text"><text:s text:c="8"/>close(c2p[1]);</text:span></text:p>
      <text:p text:style-name="P1"/>
      <text:p text:style-name="P1"><text:span text:style-name="Source_20_Text"><text:s text:c="8"/>// Replace child with "tr" command</text:span></text:p>
      <text:p text:style-name="P1"><text:span text:style-name="Source_20_Text"><text:s text:c="8"/>execl("/usr/bin/tr", "tr", "a-z", "A-Z", (char *)NULL);</text:span></text:p>
      <text:p text:style-name="P1"/>
      <text:p text:style-name="P1"><text:span text:style-name="Source_20_Text"><text:s text:c="8"/>perror("execl");</text:span></text:p>
      <text:p text:style-name="P1"><text:span text:style-name="Source_20_Text"><text:s text:c="8"/>exit(EXIT_FAILURE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else { <text:s/>// Parent</text:span></text:p>
      <text:p text:style-name="P1"/>
      <text:p text:style-name="P1"><text:span text:style-name="Source_20_Text"><text:s text:c="8"/>close(p2c[0]); <text:s/>// Close unused read end</text:span></text:p>
      <text:p text:style-name="P1"><text:span text:style-name="Source_20_Text"><text:s text:c="8"/>close(c2p[1]); <text:s/>// Close unused write end</text:span></text:p>
      <text:p text:style-name="P1"/>
      <text:p text:style-name="P1"><text:span text:style-name="Source_20_Text"><text:s text:c="8"/>char msg[] = "hello posix pipe\n";</text:span></text:p>
      <text:p text:style-name="P1"/>
      <text:p text:style-name="P1"><text:span text:style-name="Source_20_Text"><text:s text:c="8"/>// Send data to child</text:span></text:p>
      <text:p text:style-name="P1"><text:span text:style-name="Source_20_Text"><text:s text:c="8"/>write(p2c[1], msg, strlen(msg));</text:span></text:p>
      <text:p text:style-name="P1"><text:span text:style-name="Source_20_Text"><text:s text:c="8"/>close(p2c[1]); <text:s text:c="2"/>// Important: send EOF</text:span></text:p>
      <text:p text:style-name="P1"/>
      <text:p text:style-name="P1"><text:span text:style-name="Source_20_Text"><text:s text:c="8"/>// Read processed output</text:span></text:p>
      <text:p text:style-name="P1"><text:span text:style-name="Source_20_Text"><text:s text:c="8"/>read(c2p[0], buffer, sizeof(buffer));</text:span></text:p>
      <text:p text:style-name="P1"><text:span text:style-name="Source_20_Text"><text:s text:c="8"/>printf("Parent received: %s", buffer);</text:span></text:p>
      <text:p text:style-name="P1"/>
      <text:p text:style-name="P1"><text:span text:style-name="Source_20_Text"><text:s text:c="8"/>close(c2p[0]);</text:span></text:p>
      <text:p text:style-name="P1"><text:span text:style-name="Source_20_Text"><text:s text:c="8"/>wait(NULL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2" text:outline-level="2"><text:soft-page-break/>🔹 Compilation</text:h>
      <text:p text:style-name="P1"><text:span text:style-name="Source_20_Text">gcc two_way_dup2_exec.c -o two_way_dup2_exec</text:span></text:p>
      <text:p text:style-name="P2"><text:span text:style-name="Source_20_Text">./two_way_dup2_exec</text:span></text:p>
      <text:p text:style-name="Horizontal_20_Line"/>
      <text:h text:style-name="Heading_20_2" text:outline-level="2">🔹 Output</text:h>
      <text:p text:style-name="P2"><text:span text:style-name="Source_20_Text">Parent received: HELLO POSIX PIPE</text:span></text:p>
      <text:p text:style-name="Horizontal_20_Line"/>
      <text:h text:style-name="Heading_20_1" text:outline-level="1">🔹 How <text:span text:style-name="Source_20_Text">dup2()</text:span> Works</text:h>
      <text:p text:style-name="P2"><text:span text:style-name="Source_20_Text">dup2(oldfd, newfd);</text:span></text:p>
      <text:p text:style-name="Text_20_body">It makes <text:span text:style-name="Source_20_Text">newfd</text:span> refer to the same file description as <text:span text:style-name="Source_20_Text">oldfd</text:span>.</text:p>
      <text:p text:style-name="Text_20_body">Example:</text:p>
      <text:p text:style-name="P2"><text:span text:style-name="Source_20_Text">dup2(p2c[0], STDIN_FILENO);</text:span></text:p>
      <text:p text:style-name="Text_20_body">Now the child reads from the pipe instead of keyboard.</text:p>
      <text:p text:style-name="Horizontal_20_Line"/>
      <text:h text:style-name="Heading_20_1" text:outline-level="1">🔹 Why Close After <text:span text:style-name="Source_20_Text">dup2()</text:span>?</text:h>
      <text:p text:style-name="Text_20_body">Because:</text:p>
      <text:list xml:id="list2945026476" text:style-name="L12">
        <text:list-item>
          <text:p text:style-name="P14"><text:span text:style-name="Source_20_Text">dup2()</text:span> creates a duplicate</text:p>
        </text:list-item>
        <text:list-item>
          <text:p text:style-name="P14">Original descriptors must be closed</text:p>
        </text:list-item>
        <text:list-item>
          <text:p text:style-name="P14">Prevents descriptor leaks</text:p>
        </text:list-item>
        <text:list-item>
          <text:p text:style-name="P14">Allows EOF detection</text:p>
        </text:list-item>
      </text:list>
      <text:h text:style-name="Heading_20_2" text:outline-level="2"><text:span text:style-name="Source_20_Text">read()</text:span> and <text:span text:style-name="Source_20_Text">write()</text:span> in POSIX (System Calls)</text:h>
      <text:p text:style-name="Text_20_body">Both <text:span text:style-name="Source_20_Text">read()</text:span> and <text:span text:style-name="Source_20_Text">write()</text:span> are <text:span text:style-name="Strong_20_Emphasis">low-level I/O system calls</text:span> used in POSIX systems (Linux/Unix).<text:line-break/>They work with:</text:p>
      <text:list xml:id="list2931588220" text:style-name="L13">
        <text:list-item>
          <text:p text:style-name="P15">Files</text:p>
        </text:list-item>
        <text:list-item>
          <text:p text:style-name="P15">Pipes</text:p>
        </text:list-item>
        <text:list-item>
          <text:p text:style-name="P15">Sockets</text:p>
        </text:list-item>
        <text:list-item>
          <text:p text:style-name="P15">Devices</text:p>
        </text:list-item>
      </text:list>
      <text:p text:style-name="Text_20_body">They operate on <text:span text:style-name="Strong_20_Emphasis">file descriptors</text:span>, not <text:span text:style-name="Source_20_Text">FILE *</text:span> streams.</text:p>
      <text:p text:style-name="Horizontal_20_Line"/>
      <text:h text:style-name="Heading_20_1" text:outline-level="1"><text:soft-page-break/>🔹 1️⃣ <text:span text:style-name="Source_20_Text">read()</text:span> System Call</text:h>
      <text:h text:style-name="Heading_20_3" text:outline-level="3">📌 Syntax</text:h>
      <text:p text:style-name="P1"><text:span text:style-name="Source_20_Text">#include &lt;unistd.h&gt;</text:span></text:p>
      <text:p text:style-name="P1"/>
      <text:p text:style-name="P2"><text:span text:style-name="Source_20_Text">ssize_t read(int fd, void *buf, size_t count);</text:span></text:p>
      <text:h text:style-name="Heading_20_3" text:outline-level="3">📌 Parameter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Parameter</text:p>
            </table:table-cell>
            <table:table-cell table:style-name="Table4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fd</text:span></text:p>
          </table:table-cell>
          <table:table-cell table:style-name="Table4.A1" office:value-type="string">
            <text:p text:style-name="Table_20_Contents">File descriptor (0 = stdin)</text:p>
          </table:table-cell>
        </table:table-row>
        <table:table-row>
          <table:table-cell table:style-name="Table4.A1" office:value-type="string">
            <text:p text:style-name="Table_20_Contents"><text:span text:style-name="Source_20_Text">buf</text:span></text:p>
          </table:table-cell>
          <table:table-cell table:style-name="Table4.A1" office:value-type="string">
            <text:p text:style-name="Table_20_Contents">Buffer to store data</text:p>
          </table:table-cell>
        </table:table-row>
        <table:table-row>
          <table:table-cell table:style-name="Table4.A1" office:value-type="string">
            <text:p text:style-name="Table_20_Contents"><text:span text:style-name="Source_20_Text">count</text:span></text:p>
          </table:table-cell>
          <table:table-cell table:style-name="Table4.A1" office:value-type="string">
            <text:p text:style-name="Table_20_Contents">Maximum bytes to read</text:p>
          </table:table-cell>
        </table:table-row>
      </table:table>
      <text:h text:style-name="Heading_20_3" text:outline-level="3">📌 Return Value</text:h>
      <text:list xml:id="list1080160490" text:style-name="L14">
        <text:list-item>
          <text:p text:style-name="P16"><text:span text:style-name="Strong_20_Emphasis">&gt; 0</text:span> → Number of bytes actually read</text:p>
        </text:list-item>
        <text:list-item>
          <text:p text:style-name="P16"><text:span text:style-name="Strong_20_Emphasis">0</text:span> → End of file (EOF)</text:p>
        </text:list-item>
        <text:list-item>
          <text:p text:style-name="P16"><text:span text:style-name="Strong_20_Emphasis">-1</text:span> → Error (check <text:span text:style-name="Source_20_Text">errno</text:span>)</text:p>
        </text:list-item>
      </text:list>
      <text:p text:style-name="Horizontal_20_Line"/>
      <text:h text:style-name="Heading_20_3" text:outline-level="3">📌 Example (Reading from stdin)</text:h>
      <text:p text:style-name="P1"><text:span text:style-name="Source_20_Text">char buffer[100];</text:span></text:p>
      <text:p text:style-name="P2"><text:span text:style-name="Source_20_Text">int n = read(0, buffer, sizeof(buffer));</text:span></text:p>
      <text:p text:style-name="Text_20_body">Here:</text:p>
      <text:list xml:id="list1499437292" text:style-name="L15">
        <text:list-item>
          <text:p text:style-name="P17"><text:span text:style-name="Source_20_Text">0</text:span> → <text:span text:style-name="Source_20_Text">STDIN_FILENO</text:span></text:p>
        </text:list-item>
        <text:list-item>
          <text:p text:style-name="P17">Data is read from keyboard</text:p>
        </text:list-item>
      </text:list>
      <text:p text:style-name="Horizontal_20_Line"/>
      <text:h text:style-name="Heading_20_3" text:outline-level="3">📌 Important Behavior</text:h>
      <text:list xml:id="list212084305" text:style-name="L16">
        <text:list-item>
          <text:p text:style-name="P18"><text:span text:style-name="Source_20_Text">read()</text:span> may read <text:span text:style-name="Strong_20_Emphasis">less than requested bytes</text:span></text:p>
        </text:list-item>
        <text:list-item>
          <text:p text:style-name="P18">It is a <text:span text:style-name="Strong_20_Emphasis">blocking call</text:span> by default</text:p>
        </text:list-item>
        <text:list-item>
          <text:p text:style-name="P18">Returns <text:span text:style-name="Source_20_Text">0</text:span> when:</text:p>
          <text:list>
            <text:list-item>
              <text:p text:style-name="P18">End of file in file</text:p>
            </text:list-item>
            <text:list-item>
              <text:p text:style-name="P18">All pipe writers are closed</text:p>
            </text:list-item>
          </text:list>
        </text:list-item>
      </text:list>
      <text:p text:style-name="Horizontal_20_Line"/>
      <text:h text:style-name="Heading_20_1" text:outline-level="1"><text:soft-page-break/>🔹 2️⃣ <text:span text:style-name="Source_20_Text">write()</text:span> System Call</text:h>
      <text:h text:style-name="Heading_20_3" text:outline-level="3">📌 Syntax</text:h>
      <text:p text:style-name="P1"><text:span text:style-name="Source_20_Text">#include &lt;unistd.h&gt;</text:span></text:p>
      <text:p text:style-name="P1"/>
      <text:p text:style-name="P2"><text:span text:style-name="Source_20_Text">ssize_t write(int fd, const void *buf, size_t count);</text:span></text:p>
      <text:h text:style-name="Heading_20_3" text:outline-level="3">📌 Parameter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Parameter</text:p>
            </table:table-cell>
            <table:table-cell table:style-name="Table5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fd</text:span></text:p>
          </table:table-cell>
          <table:table-cell table:style-name="Table5.A1" office:value-type="string">
            <text:p text:style-name="Table_20_Contents">File descriptor (1 = stdout)</text:p>
          </table:table-cell>
        </table:table-row>
        <table:table-row>
          <table:table-cell table:style-name="Table5.A1" office:value-type="string">
            <text:p text:style-name="Table_20_Contents"><text:span text:style-name="Source_20_Text">buf</text:span></text:p>
          </table:table-cell>
          <table:table-cell table:style-name="Table5.A1" office:value-type="string">
            <text:p text:style-name="Table_20_Contents">Data to write</text:p>
          </table:table-cell>
        </table:table-row>
        <table:table-row>
          <table:table-cell table:style-name="Table5.A1" office:value-type="string">
            <text:p text:style-name="Table_20_Contents"><text:span text:style-name="Source_20_Text">count</text:span></text:p>
          </table:table-cell>
          <table:table-cell table:style-name="Table5.A1" office:value-type="string">
            <text:p text:style-name="Table_20_Contents">Number of bytes to write</text:p>
          </table:table-cell>
        </table:table-row>
      </table:table>
      <text:h text:style-name="Heading_20_3" text:outline-level="3">📌 Return Value</text:h>
      <text:list xml:id="list2509227343" text:style-name="L17">
        <text:list-item>
          <text:p text:style-name="P19"><text:span text:style-name="Strong_20_Emphasis">&gt; 0</text:span> → Number of bytes actually written</text:p>
        </text:list-item>
        <text:list-item>
          <text:p text:style-name="P19"><text:span text:style-name="Strong_20_Emphasis">-1</text:span> → Error</text:p>
        </text:list-item>
      </text:list>
      <text:p text:style-name="Horizontal_20_Line"/>
      <text:h text:style-name="Heading_20_3" text:outline-level="3">📌 Example (Writing to stdout)</text:h>
      <text:p text:style-name="P1"><text:span text:style-name="Source_20_Text">char msg[] = "Hello\n";</text:span></text:p>
      <text:p text:style-name="P2"><text:span text:style-name="Source_20_Text">write(1, msg, 6);</text:span></text:p>
      <text:p text:style-name="Text_20_body">Here:</text:p>
      <text:list xml:id="list162932803" text:style-name="L18">
        <text:list-item>
          <text:p text:style-name="P20"><text:span text:style-name="Source_20_Text">1</text:span> → <text:span text:style-name="Source_20_Text">STDOUT_FILENO</text:span></text:p>
        </text:list-item>
      </text:list>
      <text:p text:style-name="Horizontal_20_Line"/>
      <text:h text:style-name="Heading_20_1" text:outline-level="1">🔹 File Descriptor Table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Descriptor</text:p>
            </table:table-cell>
            <table:table-cell table:style-name="Table6.A1" office:value-type="string">
              <text:p text:style-name="Table_20_Heading">Name</text:p>
            </table:table-cell>
          </table:table-row>
        </table:table-header-rows>
        <table:table-row>
          <table:table-cell table:style-name="Table6.A1" office:value-type="string">
            <text:p text:style-name="Table_20_Contents">0</text:p>
          </table:table-cell>
          <table:table-cell table:style-name="Table6.A1" office:value-type="string">
            <text:p text:style-name="Table_20_Contents"><text:span text:style-name="Source_20_Text">STDIN_FILENO</text:span></text:p>
          </table:table-cell>
        </table:table-row>
        <table:table-row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<text:span text:style-name="Source_20_Text">STDOUT_FILENO</text:span></text:p>
          </table:table-cell>
        </table:table-row>
        <table:table-row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<text:span text:style-name="Source_20_Text">STDERR_FILENO</text:span></text:p>
          </table:table-cell>
        </table:table-row>
      </table:table>
      <text:p text:style-name="Text_20_body">These are defined in <text:span text:style-name="Source_20_Text">&lt;unistd.h&gt;</text:span>.</text:p>
      <text:p text:style-name="Horizontal_20_Line"/>
      <text:h text:style-name="Heading_20_1" text:outline-level="1">🔹 How They Work with Pipes</text:h>
      <text:p text:style-name="Text_20_body">When using pipes:</text:p>
      <text:list xml:id="list2854509298" text:style-name="L19">
        <text:list-item>
          <text:p text:style-name="P21"><text:span text:style-name="Source_20_Text">read(fd[0], ...)</text:span> → reads from pipe</text:p>
        </text:list-item>
        <text:list-item>
          <text:p text:style-name="P21"><text:span text:style-name="Source_20_Text">write(fd[1], ...)</text:span> → writes to pipe</text:p>
        </text:list-item>
      </text:list>
      <text:p text:style-name="Text_20_body">If:</text:p>
      <text:list xml:id="list1677433409" text:style-name="L20">
        <text:list-item>
          <text:p text:style-name="P22"><text:soft-page-break/>All writers close → <text:span text:style-name="Source_20_Text">read()</text:span> returns 0 (EOF)</text:p>
        </text:list-item>
        <text:list-item>
          <text:p text:style-name="P22">No readers → <text:span text:style-name="Source_20_Text">write()</text:span> causes <text:span text:style-name="Source_20_Text">SIGPIPE</text:span></text:p>
        </text:list-item>
      </text:list>
      <text:p text:style-name="Horizontal_20_Line"/>
      <text:h text:style-name="Heading_20_1" text:outline-level="1">🔹 Difference from <text:span text:style-name="Source_20_Text">printf()</text:span> and <text:span text:style-name="Source_20_Text">scanf()</text:span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<text:span text:style-name="Source_20_Text">read/write</text:span></text:p>
            </table:table-cell>
            <table:table-cell table:style-name="Table7.A1" office:value-type="string">
              <text:p text:style-name="Table_20_Heading"><text:span text:style-name="Source_20_Text">printf/scanf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System call</text:p>
          </table:table-cell>
          <table:table-cell table:style-name="Table7.A1" office:value-type="string">
            <text:p text:style-name="Table_20_Contents">Library function</text:p>
          </table:table-cell>
        </table:table-row>
        <table:table-row>
          <table:table-cell table:style-name="Table7.A1" office:value-type="string">
            <text:p text:style-name="Table_20_Contents">Unbuffered</text:p>
          </table:table-cell>
          <table:table-cell table:style-name="Table7.A1" office:value-type="string">
            <text:p text:style-name="Table_20_Contents">Buffered</text:p>
          </table:table-cell>
        </table:table-row>
        <table:table-row>
          <table:table-cell table:style-name="Table7.A1" office:value-type="string">
            <text:p text:style-name="Table_20_Contents">Works with file descriptors</text:p>
          </table:table-cell>
          <table:table-cell table:style-name="Table7.A1" office:value-type="string">
            <text:p text:style-name="Table_20_Contents">Works with <text:span text:style-name="Source_20_Text">FILE *</text:span></text:p>
          </table:table-cell>
        </table:table-row>
        <table:table-row>
          <table:table-cell table:style-name="Table7.A1" office:value-type="string">
            <text:p text:style-name="Table_20_Contents">Faster</text:p>
          </table:table-cell>
          <table:table-cell table:style-name="Table7.A1" office:value-type="string">
            <text:p text:style-name="Table_20_Contents">Easier to use</text:p>
          </table:table-cell>
        </table:table-row>
      </table:table>
      <text:p text:style-name="Horizontal_20_Line"/>
      <text:h text:style-name="Heading_20_1" text:outline-level="1">🔹 Important Notes</text:h>
      <text:h text:style-name="Heading_20_3" text:outline-level="3">1️⃣ They return number of bytes processed</text:h>
      <text:p text:style-name="P2"><text:span text:style-name="Source_20_Text">int n = write(fd, buffer, size);</text:span></text:p>
      <text:p text:style-name="Text_20_body">Always check return value.</text:p>
      <text:p text:style-name="Horizontal_20_Line"/>
      <text:h text:style-name="Heading_20_3" text:outline-level="3">2️⃣ They do NOT add null terminator</text:h>
      <text:p text:style-name="Text_20_body">If reading strings:</text:p>
      <text:p text:style-name="P2"><text:span text:style-name="Source_20_Text">buffer[n] = '\0';</text:span></text:p>
      <text:p text:style-name="Horizontal_20_Line"/>
      <text:h text:style-name="Heading_20_3" text:outline-level="3">3️⃣ They are byte-oriented</text:h>
      <text:p text:style-name="Text_20_body">They don’t understand:</text:p>
      <text:list xml:id="list4046589477" text:style-name="L21">
        <text:list-item>
          <text:p text:style-name="P23">Integers</text:p>
        </text:list-item>
        <text:list-item>
          <text:p text:style-name="P23">Strings</text:p>
        </text:list-item>
        <text:list-item>
          <text:p text:style-name="P23">Structures</text:p>
        </text:list-item>
      </text:list>
      <text:p text:style-name="Text_20_body">They just handle raw bytes.</text:p>
      <text:p text:style-name="Horizontal_20_Line"/>
      <text:h text:style-name="Heading_20_1" text:outline-level="1">🔹 Small Demonstration Program</text:h>
      <text:p text:style-name="P1"><text:span text:style-name="Source_20_Text">#include &lt;unistd.h&gt;</text:span></text:p>
      <text:p text:style-name="P1"><text:span text:style-name="Source_20_Text">#include &lt;string.h&gt;</text:span></text:p>
      <text:p text:style-name="P1"/>
      <text:p text:style-name="P1"><text:span text:style-name="Source_20_Text">int main() {</text:span></text:p>
      <text:p text:style-name="P1"><text:soft-page-break/><text:span text:style-name="Source_20_Text"><text:s text:c="4"/>char msg[] = "Using write system call\n";</text:span></text:p>
      <text:p text:style-name="P1"><text:span text:style-name="Source_20_Text"><text:s text:c="4"/>write(STDOUT_FILENO, msg, strlen(msg));</text:span></text:p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1" text:outline-level="1">🔹 Summary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Feature</text:p>
            </table:table-cell>
            <table:table-cell table:style-name="Table8.A1" office:value-type="string">
              <text:p text:style-name="Table_20_Heading"><text:span text:style-name="Source_20_Text">read()</text:span></text:p>
            </table:table-cell>
            <table:table-cell table:style-name="Table8.A1" office:value-type="string">
              <text:p text:style-name="Table_20_Heading"><text:span text:style-name="Source_20_Text">write()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Direction</text:p>
          </table:table-cell>
          <table:table-cell table:style-name="Table8.A1" office:value-type="string">
            <text:p text:style-name="Table_20_Contents">Input</text:p>
          </table:table-cell>
          <table:table-cell table:style-name="Table8.A1" office:value-type="string">
            <text:p text:style-name="Table_20_Contents">Output</text:p>
          </table:table-cell>
        </table:table-row>
        <table:table-row>
          <table:table-cell table:style-name="Table8.A1" office:value-type="string">
            <text:p text:style-name="Table_20_Contents">Blocking</text:p>
          </table:table-cell>
          <table:table-cell table:style-name="Table8.A1" office:value-type="string">
            <text:p text:style-name="Table_20_Contents">Yes (default)</text:p>
          </table:table-cell>
          <table:table-cell table:style-name="Table8.A1" office:value-type="string">
            <text:p text:style-name="Table_20_Contents">Yes (default)</text:p>
          </table:table-cell>
        </table:table-row>
        <table:table-row>
          <table:table-cell table:style-name="Table8.A1" office:value-type="string">
            <text:p text:style-name="Table_20_Contents">Return</text:p>
          </table:table-cell>
          <table:table-cell table:style-name="Table8.A1" office:value-type="string">
            <text:p text:style-name="Table_20_Contents">Bytes read</text:p>
          </table:table-cell>
          <table:table-cell table:style-name="Table8.A1" office:value-type="string">
            <text:p text:style-name="Table_20_Contents">Bytes written</text:p>
          </table:table-cell>
        </table:table-row>
        <table:table-row>
          <table:table-cell table:style-name="Table8.A1" office:value-type="string">
            <text:p text:style-name="Table_20_Contents">On EOF</text:p>
          </table:table-cell>
          <table:table-cell table:style-name="Table8.A1" office:value-type="string">
            <text:p text:style-name="Table_20_Contents">Returns 0</text:p>
          </table:table-cell>
          <table:table-cell table:style-name="Table8.A1" office:value-type="string">
            <text:p text:style-name="Table_20_Contents">Not applicable</text:p>
          </table:table-cell>
        </table:table-row>
      </table:table>
      <text:p text:style-name="Standard"/>
      <text:p text:style-name="Text_20_body"/>
      <text:p text:style-name="P27">Let’s explain <text:span text:style-name="Source_20_Text">dup()</text:span> in <text:span text:style-name="Strong_20_Emphasis">very simple terms</text:span>.</text:p>
      <text:p text:style-name="Horizontal_20_Line"/>
      <text:h text:style-name="Heading_20_2" text:outline-level="2">🔹 Imagine This Situation</text:h>
      <text:p text:style-name="Text_20_body">You have:</text:p>
      <text:p text:style-name="Text_20_body">📄 One file<text:line-break/>🔢 One number (called a <text:span text:style-name="Strong_20_Emphasis">file descriptor</text:span>) that represents that file inside your program.</text:p>
      <text:p text:style-name="Text_20_body">In C (Linux/Unix), when you open a file, the OS gives you a <text:span text:style-name="Strong_20_Emphasis">file descriptor number</text:span> like:</text:p>
      <text:list xml:id="list128454653" text:style-name="L22">
        <text:list-item>
          <text:p text:style-name="P24"><text:span text:style-name="Source_20_Text">0</text:span> → Keyboard (stdin)</text:p>
        </text:list-item>
        <text:list-item>
          <text:p text:style-name="P24"><text:span text:style-name="Source_20_Text">1</text:span> → Screen (stdout)</text:p>
        </text:list-item>
        <text:list-item>
          <text:p text:style-name="P24"><text:span text:style-name="Source_20_Text">2</text:span> → Error screen (stderr)</text:p>
        </text:list-item>
        <text:list-item>
          <text:p text:style-name="P24"><text:span text:style-name="Source_20_Text">3, 4, 5...</text:span> → Files you open</text:p>
        </text:list-item>
      </text:list>
      <text:p text:style-name="Horizontal_20_Line"/>
      <text:h text:style-name="Heading_20_2" text:outline-level="2">🔹 What <text:span text:style-name="Source_20_Text">dup()</text:span> Does (Simple Idea)</text:h>
      <text:p text:style-name="Text_20_body">👉 <text:span text:style-name="Source_20_Text">dup()</text:span> makes a <text:span text:style-name="Strong_20_Emphasis">copy of a file descriptor</text:span>.</text:p>
      <text:p text:style-name="Text_20_body">Think of it like:</text:p>
      <text:p text:style-name="Quotations">You have one TV remote.<text:line-break/><text:span text:style-name="Source_20_Text">dup()</text:span> gives you another remote that controls the <text:span text:style-name="Strong_20_Emphasis">same TV</text:span>.</text:p>
      <text:p text:style-name="Text_20_body">Both remotes control the same thing.</text:p>
      <text:p text:style-name="Horizontal_20_Line"/>
      <text:h text:style-name="Heading_20_2" text:outline-level="2">🔹 Real Meaning</text:h>
      <text:p text:style-name="P2"><text:span text:style-name="Source_20_Text">int newfd = dup(oldfd);</text:span></text:p>
      <text:p text:style-name="Text_20_body">What happens:</text:p>
      <text:list xml:id="list24053306" text:style-name="L23">
        <text:list-item>
          <text:p text:style-name="P25"><text:span text:style-name="Source_20_Text">newfd</text:span> becomes a <text:span text:style-name="Strong_20_Emphasis">copy</text:span> of <text:span text:style-name="Source_20_Text">oldfd</text:span></text:p>
        </text:list-item>
        <text:list-item>
          <text:p text:style-name="P25">Both point to the <text:span text:style-name="Strong_20_Emphasis">same file</text:span></text:p>
        </text:list-item>
        <text:list-item>
          <text:p text:style-name="P25">If you write using either → it writes to the same file</text:p>
        </text:list-item>
        <text:list-item>
          <text:p text:style-name="P25">If you move the file pointer → it affects both</text:p>
        </text:list-item>
      </text:list>
      <text:p text:style-name="Horizontal_20_Line"/>
      <text:h text:style-name="Heading_20_2" text:outline-level="2">🔹 Simple Example</text:h>
      <text:p text:style-name="P1"><text:span text:style-name="Source_20_Text">#include &lt;stdio.h&gt;</text:span></text:p>
      <text:p text:style-name="P1"><text:span text:style-name="Source_20_Text">#include &lt;fcntl.h&gt;</text:span></text:p>
      <text:p text:style-name="P1"><text:span text:style-name="Source_20_Text">#include &lt;unistd.h&gt;</text:span></text:p>
      <text:p text:style-name="P1"><text:soft-page-break/></text:p>
      <text:p text:style-name="P1"><text:span text:style-name="Source_20_Text">int main() {</text:span></text:p>
      <text:p text:style-name="P1"><text:span text:style-name="Source_20_Text"><text:s text:c="4"/>int fd = open("test.txt", O_WRONLY | O_CREAT, 0644);</text:span></text:p>
      <text:p text:style-name="P1"><text:span text:style-name="Source_20_Text"><text:s text:c="4"/>int fd2 = dup(fd);</text:span></text:p>
      <text:p text:style-name="P1"/>
      <text:p text:style-name="P1"><text:span text:style-name="Source_20_Text"><text:s text:c="4"/>write(fd, "Hello ", 6);</text:span></text:p>
      <text:p text:style-name="P1"><text:span text:style-name="Source_20_Text"><text:s text:c="4"/>write(fd2, "World", 5);</text:span></text:p>
      <text:p text:style-name="P1"/>
      <text:p text:style-name="P1"><text:span text:style-name="Source_20_Text"><text:s text:c="4"/>close(fd);</text:span></text:p>
      <text:p text:style-name="P1"><text:span text:style-name="Source_20_Text"><text:s text:c="4"/>close(fd2);</text:span></text:p>
      <text:p text:style-name="P2"><text:span text:style-name="Source_20_Text">}</text:span></text:p>
      <text:h text:style-name="Heading_20_3" text:outline-level="3">Output inside <text:span text:style-name="Source_20_Text">test.txt</text:span>:</text:h>
      <text:p text:style-name="P2"><text:span text:style-name="Source_20_Text">Hello World</text:span></text:p>
      <text:p text:style-name="Text_20_body">Why?</text:p>
      <text:p text:style-name="Text_20_body">Because both <text:span text:style-name="Source_20_Text">fd</text:span> and <text:span text:style-name="Source_20_Text">fd2</text:span> are writing to the <text:span text:style-name="Strong_20_Emphasis">same file</text:span>.</text:p>
      <text:p text:style-name="Horizontal_20_Line"/>
      <text:h text:style-name="Heading_20_2" text:outline-level="2">🔹 Important Thing</text:h>
      <text:p text:style-name="Text_20_body">Both file descriptors share:</text:p>
      <text:list xml:id="list2125721293" text:style-name="L24">
        <text:list-item>
          <text:p text:style-name="P26">Same file</text:p>
        </text:list-item>
        <text:list-item>
          <text:p text:style-name="P26">Same file position</text:p>
        </text:list-item>
        <text:list-item>
          <text:p text:style-name="P26">Same access mode</text:p>
        </text:list-item>
      </text:list>
      <text:p text:style-name="Text_20_body">If one writes 5 bytes, the file pointer moves for both.</text:p>
      <text:p text:style-name="Horizontal_20_Line"/>
      <text:h text:style-name="Heading_20_2" text:outline-level="2">🔹 Why Is <text:span text:style-name="Source_20_Text">dup()</text:span> Used?</text:h>
      <text:p text:style-name="Text_20_body">Mainly for:</text:p>
      <text:h text:style-name="Heading_20_3" text:outline-level="3">1️⃣ Redirecting Output</text:h>
      <text:p text:style-name="Text_20_body">Example: Send output to a file instead of screen.</text:p>
      <text:p text:style-name="P1"><text:span text:style-name="Source_20_Text">int fd = open("output.txt", O_WRONLY | O_CREAT, 0644);</text:span></text:p>
      <text:p text:style-name="P1"><text:span text:style-name="Source_20_Text">dup2(fd, 1); <text:s text:c="2"/>// Replace stdout with file</text:span></text:p>
      <text:p text:style-name="P2"><text:span text:style-name="Source_20_Text">printf("Hello\n");</text:span></text:p>
      <text:p text:style-name="Text_20_body">Now <text:span text:style-name="Source_20_Text">printf()</text:span> writes to the file instead of screen.</text:p>
      <text:p text:style-name="Horizontal_20_Line"/>
      <text:h text:style-name="Heading_20_2" text:outline-level="2">🔹 Difference Between <text:span text:style-name="Source_20_Text">dup()</text:span> and <text:span text:style-name="Source_20_Text">dup2()</text:span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Function</text:p>
            </table:table-cell>
            <table:table-cell table:style-name="Table9.A1" office:value-type="string">
              <text:p text:style-name="Table_20_Heading">What it does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dup(oldfd)</text:span></text:p>
          </table:table-cell>
          <table:table-cell table:style-name="Table9.A1" office:value-type="string">
            <text:p text:style-name="Table_20_Contents">Copies to next free descriptor</text:p>
          </table:table-cell>
        </table:table-row>
        <text:soft-page-break/>
        <table:table-row>
          <table:table-cell table:style-name="Table9.A1" office:value-type="string">
            <text:p text:style-name="Table_20_Contents"><text:span text:style-name="Source_20_Text">dup2(oldfd, newfd)</text:span></text:p>
          </table:table-cell>
          <table:table-cell table:style-name="Table9.A1" office:value-type="string">
            <text:p text:style-name="Table_20_Contents">Copies exactly into <text:span text:style-name="Source_20_Text">newfd</text:span></text:p>
          </table:table-cell>
        </table:table-row>
      </table:table>
      <text:p text:style-name="Text_20_body">Example:</text:p>
      <text:p text:style-name="P2"><text:span text:style-name="Source_20_Text">dup2(fd, 1);</text:span></text:p>
      <text:p text:style-name="Text_20_body">Means:</text:p>
      <text:p text:style-name="Quotations">“Make stdout (1) behave like fd”</text:p>
      <text:p text:style-name="Horizontal_20_Line"/>
      <text:h text:style-name="Heading_20_2" text:outline-level="2">🔹 One Line Summary</text:h>
      <text:p text:style-name="Text_20_body"><text:span text:style-name="Source_20_Text">dup()</text:span> =<text:line-break/>🧠 “Give me another handle to the same file.”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1:23:09.689111979</meta:creation-date>
    <dc:date>2026-02-17T13:07:29.815972002</dc:date>
    <meta:editing-duration>PT1H44M20S</meta:editing-duration>
    <meta:editing-cycles>4</meta:editing-cycles>
    <meta:generator>LibreOffice/7.3.7.2$Linux_X86_64 LibreOffice_project/30$Build-2</meta:generator>
    <meta:document-statistic meta:table-count="9" meta:image-count="0" meta:object-count="0" meta:page-count="16" meta:paragraph-count="490" meta:word-count="1821" meta:character-count="11653" meta:non-whitespace-character-count="9602"/>
  </office:meta>
</office:document-meta>
</file>