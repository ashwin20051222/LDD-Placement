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515cm" table:align="left"/>
    </style:style>
    <style:style style:name="Table1.A" style:family="table-column">
      <style:table-column-properties style:column-width="1.565cm"/>
    </style:style>
    <style:style style:name="Table1.B" style:family="table-column">
      <style:table-column-properties style:column-width="13.95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7cm" table:align="left"/>
    </style:style>
    <style:style style:name="Table2.A" style:family="table-column">
      <style:table-column-properties style:column-width="4.574cm"/>
    </style:style>
    <style:style style:name="Table2.B" style:family="table-column">
      <style:table-column-properties style:column-width="6.12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318cm" table:align="left"/>
    </style:style>
    <style:style style:name="Table3.A" style:family="table-column">
      <style:table-column-properties style:column-width="1.639cm"/>
    </style:style>
    <style:style style:name="Table3.B" style:family="table-column">
      <style:table-column-properties style:column-width="1.616cm"/>
    </style:style>
    <style:style style:name="Table3.C" style:family="table-column">
      <style:table-column-properties style:column-width="4.06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8.269cm" table:align="left"/>
    </style:style>
    <style:style style:name="Table4.A" style:family="table-column">
      <style:table-column-properties style:column-width="3.203cm"/>
    </style:style>
    <style:style style:name="Table4.B" style:family="table-column">
      <style:table-column-properties style:column-width="5.06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6.655cm" table:align="left"/>
    </style:style>
    <style:style style:name="Table5.A" style:family="table-column">
      <style:table-column-properties style:column-width="3.016cm"/>
    </style:style>
    <style:style style:name="Table5.B" style:family="table-column">
      <style:table-column-properties style:column-width="3.63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4.436cm" table:align="left"/>
    </style:style>
    <style:style style:name="Table6.A" style:family="table-column">
      <style:table-column-properties style:column-width="1.475cm"/>
    </style:style>
    <style:style style:name="Table6.B" style:family="table-column">
      <style:table-column-properties style:column-width="2.962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ared Memory Based Display System Create four processes: Process 1: Reads current time and writes to shared memory. Process 2: Reads temperature sensor and writes to shared memory. Process 3: Reads humidity sensor and writes to shared memory. Process 4: Displays video or current time with temperature and humidity based on user selection. Use shared memory for data sharing.</text:p>
      <text:p text:style-name="Text_20_body">This is a <text:span text:style-name="Strong_20_Emphasis">very good real-time IPC mini project</text:span> 👍<text:line-break/>Since you’re already working on POSIX IPC concepts, I’ll give you a <text:span text:style-name="Strong_20_Emphasis">complete lab-style design + implementation approach</text:span> using <text:span text:style-name="Strong_20_Emphasis">POSIX Shared Memory + Synchronization</text:span>.</text:p>
      <text:p text:style-name="Horizontal_20_Line"/>
      <text:h text:style-name="Heading_20_1" text:outline-level="1">✅ Project: Shared Memory Based Display System</text:h>
      <text:h text:style-name="Heading_20_2" text:outline-level="2">🎯 Objective</text:h>
      <text:p text:style-name="Text_20_body">Create <text:span text:style-name="Strong_20_Emphasis">4 processes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ocess</text:p>
            </table:table-cell>
            <table:table-cell table:style-name="Table1.A1" office:value-type="string">
              <text:p text:style-name="Table_20_Heading">Role</text:p>
            </table:table-cell>
          </table:table-row>
        </table:table-header-rows>
        <table:table-row>
          <table:table-cell table:style-name="Table1.A1" office:value-type="string">
            <text:p text:style-name="Table_20_Contents">P1</text:p>
          </table:table-cell>
          <table:table-cell table:style-name="Table1.A1" office:value-type="string">
            <text:p text:style-name="Table_20_Contents">Reads current time → writes to shared memory</text:p>
          </table:table-cell>
        </table:table-row>
        <table:table-row>
          <table:table-cell table:style-name="Table1.A1" office:value-type="string">
            <text:p text:style-name="Table_20_Contents">P2</text:p>
          </table:table-cell>
          <table:table-cell table:style-name="Table1.A1" office:value-type="string">
            <text:p text:style-name="Table_20_Contents">Reads temperature sensor → writes to shared memory</text:p>
          </table:table-cell>
        </table:table-row>
        <table:table-row>
          <table:table-cell table:style-name="Table1.A1" office:value-type="string">
            <text:p text:style-name="Table_20_Contents">P3</text:p>
          </table:table-cell>
          <table:table-cell table:style-name="Table1.A1" office:value-type="string">
            <text:p text:style-name="Table_20_Contents">Reads humidity sensor → writes to shared memory</text:p>
          </table:table-cell>
        </table:table-row>
        <table:table-row>
          <table:table-cell table:style-name="Table1.A1" office:value-type="string">
            <text:p text:style-name="Table_20_Contents">P4</text:p>
          </table:table-cell>
          <table:table-cell table:style-name="Table1.A1" office:value-type="string">
            <text:p text:style-name="Table_20_Contents">Displays video OR shows time + temperature + humidity based on user selection</text:p>
          </table:table-cell>
        </table:table-row>
      </table:table>
      <text:p text:style-name="Text_20_body">All processes share data using <text:span text:style-name="Strong_20_Emphasis">POSIX Shared Memory</text:span>.</text:p>
      <text:p text:style-name="Horizontal_20_Line"/>
      <text:h text:style-name="Heading_20_1" text:outline-level="1">🧠 System Architecture</text:h>
      <text:p text:style-name="P1"><text:span text:style-name="Source_20_Text"><text:s text:c="16"/>+----------------------+</text:span></text:p>
      <text:p text:style-name="P1"><text:span text:style-name="Source_20_Text"><text:s text:c="16"/>| <text:s text:c="2"/>Shared Memory <text:s text:c="5"/>|</text:span></text:p>
      <text:p text:style-name="P1"><text:span text:style-name="Source_20_Text"><text:s text:c="16"/>|----------------------|</text:span></text:p>
      <text:p text:style-name="P1"><text:span text:style-name="Source_20_Text"><text:s text:c="16"/>| time_string <text:s text:c="9"/>|</text:span></text:p>
      <text:p text:style-name="P1"><text:span text:style-name="Source_20_Text"><text:s text:c="16"/>| temperature <text:s text:c="9"/>|</text:span></text:p>
      <text:p text:style-name="P1"><text:span text:style-name="Source_20_Text"><text:s text:c="16"/>| humidity <text:s text:c="12"/>|</text:span></text:p>
      <text:p text:style-name="P1"><text:span text:style-name="Source_20_Text"><text:s text:c="16"/>| display_mode <text:s text:c="8"/>|</text:span></text:p>
      <text:p text:style-name="P1"><text:span text:style-name="Source_20_Text"><text:s text:c="16"/>+----------+-----------+</text:span></text:p>
      <text:p text:style-name="P1"><text:span text:style-name="Source_20_Text"><text:s text:c="27"/>|</text:span></text:p>
      <text:p text:style-name="P1"><text:span text:style-name="Source_20_Text"><text:s text:c="3"/>---------------------------------------------------</text:span></text:p>
      <text:p text:style-name="P1"><text:span text:style-name="Source_20_Text"><text:s text:c="3"/>| <text:s text:c="11"/>| <text:s text:c="13"/>| <text:s text:c="19"/>|</text:span></text:p>
      <text:p text:style-name="P1"><text:span text:style-name="Source_20_Text"><text:s/>Process 1 <text:s text:c="2"/>Process 2 <text:s text:c="5"/>Process 3 <text:s text:c="10"/>Process 4</text:span></text:p>
      <text:p text:style-name="P2"><text:span text:style-name="Source_20_Text"><text:s/>(Time) <text:s text:c="6"/>(Temp) <text:s text:c="8"/>(Humidity) <text:s text:c="8"/>(Display)</text:span></text:p>
      <text:p text:style-name="Horizontal_20_Line"/>
      <text:h text:style-name="Heading_20_1" text:outline-level="1"><text:soft-page-break/>🔧 IPC Mechanism Used</text:h>
      <text:h text:style-name="Heading_20_3" text:outline-level="3">1️⃣ POSIX Shared Memory APIs</text:h>
      <text:p text:style-name="Text_20_body">From POSIX standard:</text:p>
      <text:list xml:id="list3785290675" text:style-name="L1">
        <text:list-item>
          <text:p text:style-name="P4"><text:span text:style-name="Source_20_Text">shm_open()</text:span></text:p>
        </text:list-item>
        <text:list-item>
          <text:p text:style-name="P4"><text:span text:style-name="Source_20_Text">ftruncate()</text:span></text:p>
        </text:list-item>
        <text:list-item>
          <text:p text:style-name="P4"><text:span text:style-name="Source_20_Text">mmap()</text:span></text:p>
        </text:list-item>
        <text:list-item>
          <text:p text:style-name="P4"><text:span text:style-name="Source_20_Text">munmap()</text:span></text:p>
        </text:list-item>
        <text:list-item>
          <text:p text:style-name="P4"><text:span text:style-name="Source_20_Text">shm_unlink()</text:span></text:p>
        </text:list-item>
      </text:list>
      <text:p text:style-name="Text_20_body">Header files:</text:p>
      <text:p text:style-name="P1"><text:span text:style-name="Source_20_Text">#include &lt;sys/mman.h&gt;</text:span></text:p>
      <text:p text:style-name="P1"><text:span text:style-name="Source_20_Text">#include &lt;sys/stat.h&gt;</text:span></text:p>
      <text:p text:style-name="P2"><text:span text:style-name="Source_20_Text">#include &lt;fcntl.h&gt;</text:span></text:p>
      <text:p text:style-name="Horizontal_20_Line"/>
      <text:h text:style-name="Heading_20_1" text:outline-level="1">🧩 Shared Memory Structure Design</text:h>
      <text:p text:style-name="P1"><text:span text:style-name="Source_20_Text">#define SHM_NAME "/display_shm"</text:span></text:p>
      <text:p text:style-name="P1"/>
      <text:p text:style-name="P1"><text:span text:style-name="Source_20_Text">typedef struct {</text:span></text:p>
      <text:p text:style-name="P1"><text:span text:style-name="Source_20_Text"><text:s text:c="4"/>char time_str[64];</text:span></text:p>
      <text:p text:style-name="P1"><text:span text:style-name="Source_20_Text"><text:s text:c="4"/>float temperature;</text:span></text:p>
      <text:p text:style-name="P1"><text:span text:style-name="Source_20_Text"><text:s text:c="4"/>float humidity;</text:span></text:p>
      <text:p text:style-name="P1"><text:span text:style-name="Source_20_Text"><text:s text:c="4"/>int display_mode; <text:s text:c="2"/>// 0 = show video, 1 = show data</text:span></text:p>
      <text:p text:style-name="P2"><text:span text:style-name="Source_20_Text">} shared_data_t;</text:span></text:p>
      <text:p text:style-name="Horizontal_20_Line"/>
      <text:h text:style-name="Heading_20_1" text:outline-level="1">🔐 Synchronization (IMPORTANT)</text:h>
      <text:p text:style-name="Text_20_body">Since multiple processes write simultaneously, use:</text:p>
      <text:list xml:id="list3295792897" text:style-name="L2">
        <text:list-item>
          <text:p text:style-name="P5">POSIX unnamed semaphore inside shared memory<text:line-break/>OR</text:p>
        </text:list-item>
        <text:list-item>
          <text:p text:style-name="P5">POSIX named semaphore (<text:span text:style-name="Source_20_Text">sem_open()</text:span>)</text:p>
        </text:list-item>
      </text:list>
      <text:p text:style-name="Text_20_body">For simplicity, we use <text:span text:style-name="Strong_20_Emphasis">named semaphore</text:span>.</text:p>
      <text:p text:style-name="P1"><text:span text:style-name="Source_20_Text">#include &lt;semaphore.h&gt;</text:span></text:p>
      <text:p text:style-name="P1"/>
      <text:p text:style-name="P2"><text:span text:style-name="Source_20_Text">#define SEM_NAME "/display_sem"</text:span></text:p>
      <text:p text:style-name="Horizontal_20_Line"/>
      <text:h text:style-name="Heading_20_1" text:outline-level="1"><text:soft-page-break/>🏗️ Step 1: Shared Memory Initialization (Run Once)</text:h>
      <text:p text:style-name="P1"><text:span text:style-name="Source_20_Text">int fd = shm_open(SHM_NAME, O_CREAT | O_RDWR, 0666);</text:span></text:p>
      <text:p text:style-name="P1"><text:span text:style-name="Source_20_Text">ftruncate(fd, sizeof(shared_data_t));</text:span></text:p>
      <text:p text:style-name="P1"/>
      <text:p text:style-name="P1"><text:span text:style-name="Source_20_Text">shared_data_t *data = mmap(NULL, sizeof(shared_data_t),</text:span></text:p>
      <text:p text:style-name="P1"><text:span text:style-name="Source_20_Text"><text:s text:c="27"/>PROT_READ | PROT_WRITE,</text:span></text:p>
      <text:p text:style-name="P1"><text:span text:style-name="Source_20_Text"><text:s text:c="27"/>MAP_SHARED, fd, 0);</text:span></text:p>
      <text:p text:style-name="P1"/>
      <text:p text:style-name="P2"><text:span text:style-name="Source_20_Text">sem_t *sem = sem_open(SEM_NAME, O_CREAT, 0666, 1);</text:span></text:p>
      <text:p text:style-name="Horizontal_20_Line"/>
      <text:h text:style-name="Heading_20_1" text:outline-level="1">🕒 Process 1: Time Writer</text:h>
      <text:p text:style-name="P1"><text:span text:style-name="Source_20_Text">while(1) {</text:span></text:p>
      <text:p text:style-name="P1"><text:span text:style-name="Source_20_Text"><text:s text:c="4"/>time_t now = time(NULL);</text:span></text:p>
      <text:p text:style-name="P1"><text:span text:style-name="Source_20_Text"><text:s text:c="4"/>struct tm *t = localtime(&amp;now);</text:span></text:p>
      <text:p text:style-name="P1"/>
      <text:p text:style-name="P1"><text:span text:style-name="Source_20_Text"><text:s text:c="4"/>sem_wait(sem);</text:span></text:p>
      <text:p text:style-name="P1"/>
      <text:p text:style-name="P1"><text:span text:style-name="Source_20_Text"><text:s text:c="4"/>strftime(data-&gt;time_str, sizeof(data-&gt;time_str),</text:span></text:p>
      <text:p text:style-name="P1"><text:span text:style-name="Source_20_Text"><text:s text:c="13"/>"%H:%M:%S", t);</text:span></text:p>
      <text:p text:style-name="P1"/>
      <text:p text:style-name="P1"><text:span text:style-name="Source_20_Text"><text:s text:c="4"/>sem_post(sem);</text:span></text:p>
      <text:p text:style-name="P1"/>
      <text:p text:style-name="P1"><text:span text:style-name="Source_20_Text"><text:s text:c="4"/>sleep(1);</text:span></text:p>
      <text:p text:style-name="P2"><text:span text:style-name="Source_20_Text">}</text:span></text:p>
      <text:p text:style-name="Horizontal_20_Line"/>
      <text:h text:style-name="Heading_20_1" text:outline-level="1">🌡️ Process 2: Temperature Writer (Simulated Sensor)</text:h>
      <text:p text:style-name="P1"><text:span text:style-name="Source_20_Text">while(1) {</text:span></text:p>
      <text:p text:style-name="P1"><text:span text:style-name="Source_20_Text"><text:s text:c="4"/>float temp = 25 + rand()%10;</text:span></text:p>
      <text:p text:style-name="P1"/>
      <text:p text:style-name="P1"><text:span text:style-name="Source_20_Text"><text:s text:c="4"/>sem_wait(sem);</text:span></text:p>
      <text:p text:style-name="P1"><text:span text:style-name="Source_20_Text"><text:s text:c="4"/>data-&gt;temperature = temp;</text:span></text:p>
      <text:p text:style-name="P1"><text:span text:style-name="Source_20_Text"><text:s text:c="4"/>sem_post(sem);</text:span></text:p>
      <text:p text:style-name="P1"/>
      <text:p text:style-name="P1"><text:span text:style-name="Source_20_Text"><text:s text:c="4"/>sleep(2);</text:span></text:p>
      <text:p text:style-name="P2"><text:span text:style-name="Source_20_Text">}</text:span></text:p>
      <text:p text:style-name="Horizontal_20_Line"/>
      <text:h text:style-name="Heading_20_1" text:outline-level="1">💧 Process 3: Humidity Writer</text:h>
      <text:p text:style-name="P1"><text:span text:style-name="Source_20_Text">while(1) {</text:span></text:p>
      <text:p text:style-name="P1"><text:span text:style-name="Source_20_Text"><text:s text:c="4"/>float hum = 50 + rand()%20;</text:span></text:p>
      <text:p text:style-name="P1"/>
      <text:p text:style-name="P1"><text:span text:style-name="Source_20_Text"><text:s text:c="4"/>sem_wait(sem);</text:span></text:p>
      <text:p text:style-name="P1"><text:soft-page-break/><text:span text:style-name="Source_20_Text"><text:s text:c="4"/>data-&gt;humidity = hum;</text:span></text:p>
      <text:p text:style-name="P1"><text:span text:style-name="Source_20_Text"><text:s text:c="4"/>sem_post(sem);</text:span></text:p>
      <text:p text:style-name="P1"/>
      <text:p text:style-name="P1"><text:span text:style-name="Source_20_Text"><text:s text:c="4"/>sleep(3);</text:span></text:p>
      <text:p text:style-name="P2"><text:span text:style-name="Source_20_Text">}</text:span></text:p>
      <text:p text:style-name="Horizontal_20_Line"/>
      <text:h text:style-name="Heading_20_1" text:outline-level="1">🖥️ Process 4: Display Controller</text:h>
      <text:p text:style-name="P1"><text:span text:style-name="Source_20_Text">while(1) {</text:span></text:p>
      <text:p text:style-name="P1"/>
      <text:p text:style-name="P1"><text:span text:style-name="Source_20_Text"><text:s text:c="4"/>printf("\nSelect Mode:\n");</text:span></text:p>
      <text:p text:style-name="P1"><text:span text:style-name="Source_20_Text"><text:s text:c="4"/>printf("0 - Show Video\n");</text:span></text:p>
      <text:p text:style-name="P1"><text:span text:style-name="Source_20_Text"><text:s text:c="4"/>printf("1 - Show Data\n");</text:span></text:p>
      <text:p text:style-name="P1"><text:span text:style-name="Source_20_Text"><text:s text:c="4"/>scanf("%d", &amp;data-&gt;display_mode);</text:span></text:p>
      <text:p text:style-name="P1"/>
      <text:p text:style-name="P1"><text:span text:style-name="Source_20_Text"><text:s text:c="4"/>sem_wait(sem);</text:span></text:p>
      <text:p text:style-name="P1"/>
      <text:p text:style-name="P1"><text:span text:style-name="Source_20_Text"><text:s text:c="4"/>if(data-&gt;display_mode == 1) {</text:span></text:p>
      <text:p text:style-name="P1"><text:span text:style-name="Source_20_Text"><text:s text:c="8"/>printf("\nTime: %s\n", data-&gt;time_str);</text:span></text:p>
      <text:p text:style-name="P1"><text:span text:style-name="Source_20_Text"><text:s text:c="8"/>printf("Temperature: %.2f C\n", data-&gt;temperature);</text:span></text:p>
      <text:p text:style-name="P1"><text:span text:style-name="Source_20_Text"><text:s text:c="8"/>printf("Humidity: %.2f %%\n", data-&gt;humidity);</text:span></text:p>
      <text:p text:style-name="P1"><text:span text:style-name="Source_20_Text"><text:s text:c="4"/>}</text:span></text:p>
      <text:p text:style-name="P1"><text:span text:style-name="Source_20_Text"><text:s text:c="4"/>else {</text:span></text:p>
      <text:p text:style-name="P1"><text:span text:style-name="Source_20_Text"><text:s text:c="8"/>printf("Playing video...\n");</text:span></text:p>
      <text:p text:style-name="P1"><text:span text:style-name="Source_20_Text"><text:s text:c="8"/>system("mpv sample.mp4"); <text:s/>// or simulate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sem_post(sem);</text:span></text:p>
      <text:p text:style-name="P1"/>
      <text:p text:style-name="P1"><text:span text:style-name="Source_20_Text"><text:s text:c="4"/>sleep(1);</text:span></text:p>
      <text:p text:style-name="P2"><text:span text:style-name="Source_20_Text">}</text:span></text:p>
      <text:p text:style-name="Horizontal_20_Line"/>
      <text:h text:style-name="Heading_20_1" text:outline-level="1">🧹 Cleanup Process</text:h>
      <text:p text:style-name="P1"><text:span text:style-name="Source_20_Text">munmap(data, sizeof(shared_data_t));</text:span></text:p>
      <text:p text:style-name="P1"><text:span text:style-name="Source_20_Text">close(fd);</text:span></text:p>
      <text:p text:style-name="P1"/>
      <text:p text:style-name="P1"><text:span text:style-name="Source_20_Text">shm_unlink(SHM_NAME);</text:span></text:p>
      <text:p text:style-name="P2"><text:span text:style-name="Source_20_Text">sem_unlink(SEM_NAME);</text:span></text:p>
      <text:p text:style-name="Text_20_body">Only one process should do cleanup.</text:p>
      <text:p text:style-name="Horizontal_20_Line"/>
      <text:h text:style-name="Heading_20_1" text:outline-level="1">🏃 How To Run</text:h>
      <text:h text:style-name="Heading_20_3" text:outline-level="3">Compile</text:h>
      <text:p text:style-name="P1"><text:span text:style-name="Source_20_Text">gcc time_writer.c -o time_writer -lrt -pthread</text:span></text:p>
      <text:p text:style-name="P1"><text:span text:style-name="Source_20_Text">gcc temp_writer.c -o temp_writer -lrt -pthread</text:span></text:p>
      <text:p text:style-name="P1"><text:span text:style-name="Source_20_Text">gcc hum_writer.c -o hum_writer -lrt -pthread</text:span></text:p>
      <text:p text:style-name="P2"><text:span text:style-name="Source_20_Text">gcc display.c -o display -lrt -pthread</text:span></text:p>
      <text:h text:style-name="Heading_20_3" text:outline-level="3"><text:soft-page-break/>Run in different terminals</text:h>
      <text:p text:style-name="P1"><text:span text:style-name="Source_20_Text">./time_writer</text:span></text:p>
      <text:p text:style-name="P1"><text:span text:style-name="Source_20_Text">./temp_writer</text:span></text:p>
      <text:p text:style-name="P1"><text:span text:style-name="Source_20_Text">./hum_writer</text:span></text:p>
      <text:p text:style-name="P2"><text:span text:style-name="Source_20_Text">./display</text:span></text:p>
      <text:p text:style-name="Horizontal_20_Line"/>
      <text:h text:style-name="Heading_20_1" text:outline-level="1">🎥 If Running on Embedded Linux / QNX</text:h>
      <text:p text:style-name="Text_20_body">Since you’re working with QNX-style systems:</text:p>
      <text:p text:style-name="Text_20_body">On QNX:</text:p>
      <text:list xml:id="list960480807" text:style-name="L3">
        <text:list-item>
          <text:p text:style-name="P6"><text:span text:style-name="Source_20_Text">-lrt</text:span> not required</text:p>
        </text:list-item>
        <text:list-item>
          <text:p text:style-name="P6">POSIX APIs fully supported</text:p>
        </text:list-item>
        <text:list-item>
          <text:p text:style-name="P6">Use <text:span text:style-name="Source_20_Text">/dev/shmem</text:span> to inspect shared memory</text:p>
        </text:list-item>
      </text:list>
      <text:p text:style-name="Horizontal_20_Line"/>
      <text:h text:style-name="Heading_20_1" text:outline-level="1">🧪 Real-Time Enhancement (For Mini Project)</text:h>
      <text:p text:style-name="Text_20_body">To make it <text:span text:style-name="Strong_20_Emphasis">real-time grade</text:span>:</text:p>
      <text:p text:style-name="Text_20_body">✔ Use <text:span text:style-name="Source_20_Text">clock_nanosleep()</text:span><text:line-break/>✔ Set priorities using <text:span text:style-name="Source_20_Text">sched_setscheduler()</text:span><text:line-break/>✔ Use <text:span text:style-name="Source_20_Text">SCHED_FIFO</text:span><text:line-break/>✔ Replace sleep() with periodic timer<text:line-break/>✔ Add watchdog process</text:p>
      <text:p text:style-name="Horizontal_20_Line"/>
      <text:h text:style-name="Heading_20_1" text:outline-level="1">📈 Advanced Version (If You Want Extra Marks)</text:h>
      <text:p text:style-name="Text_20_body">Add:</text:p>
      <text:list xml:id="list2346882748" text:style-name="L4">
        <text:list-item>
          <text:p text:style-name="P7">Logging process</text:p>
        </text:list-item>
        <text:list-item>
          <text:p text:style-name="P7">Alarm if temp &gt; threshold</text:p>
        </text:list-item>
        <text:list-item>
          <text:p text:style-name="P7">Video auto-switch when humidity high</text:p>
        </text:list-item>
        <text:list-item>
          <text:p text:style-name="P7">Python GUI reading shared memory</text:p>
        </text:list-item>
        <text:list-item>
          <text:p text:style-name="P7">Use <text:span text:style-name="Source_20_Text">select()</text:span> for non-blocking UI</text:p>
        </text:list-item>
      </text:list>
      <text:p text:style-name="Horizontal_20_Line"/>
      <text:h text:style-name="Heading_20_1" text:outline-level="1"><text:soft-page-break/>📚 Concepts Covered</text:h>
      <text:list xml:id="list2724848627" text:style-name="L5">
        <text:list-item>
          <text:p text:style-name="P8">POSIX Shared Memory</text:p>
        </text:list-item>
        <text:list-item>
          <text:p text:style-name="P8">Synchronization</text:p>
        </text:list-item>
        <text:list-item>
          <text:p text:style-name="P8">Real-time periodic tasks</text:p>
        </text:list-item>
        <text:list-item>
          <text:p text:style-name="P8">Multi-process data consistency</text:p>
        </text:list-item>
        <text:list-item>
          <text:p text:style-name="P8">IPC design pattern</text:p>
        </text:list-item>
        <text:list-item>
          <text:p text:style-name="P8">Embedded display control logic</text:p>
        </text:list-item>
      </text:list>
      <text:p text:style-name="Horizontal_20_Line"/>
      <text:h text:style-name="Heading_20_1" text:outline-level="1">💡 How to Present in Viva</text:h>
      <text:p text:style-name="Text_20_body">Explain:</text:p>
      <text:list xml:id="list2679348984" text:style-name="L6">
        <text:list-item>
          <text:p text:style-name="P9">Why shared memory is fastest IPC</text:p>
        </text:list-item>
        <text:list-item>
          <text:p text:style-name="P9">Why semaphore required</text:p>
        </text:list-item>
        <text:list-item>
          <text:p text:style-name="P9">What happens without synchronization?</text:p>
        </text:list-item>
        <text:list-item>
          <text:p text:style-name="P9">Difference between mmap and malloc</text:p>
        </text:list-item>
        <text:list-item>
          <text:p text:style-name="P9">Why MAP_SHARED used</text:p>
        </text:list-item>
        <text:list-item>
          <text:p text:style-name="P9">What happens if process crashes?</text:p>
        </text:list-item>
      </text:list>
      <text:p text:style-name="Horizontal_20_Line"/>
      <text:p text:style-name="Text_20_body">If you want, I can now give you:</text:p>
      <text:list xml:id="list3696232940" text:style-name="L7">
        <text:list-item>
          <text:p text:style-name="P10">✅ Complete single combined code (fork-based)</text:p>
        </text:list-item>
        <text:list-item>
          <text:p text:style-name="P10">✅ QNX version</text:p>
        </text:list-item>
        <text:list-item>
          <text:p text:style-name="P10">✅ Python UI wrapper reading shared memory</text:p>
        </text:list-item>
        <text:list-item>
          <text:p text:style-name="P10">✅ Real-time scheduling version</text:p>
        </text:list-item>
        <text:list-item>
          <text:p text:style-name="P10">✅ Diagram for report submission</text:p>
        </text:list-item>
      </text:list>
      <text:p text:style-name="Text_20_body">Tell me which level you want 🚀</text:p>
      <text:p text:style-name="Text_20_body">Complete single combined code (fork-based)</text:p>
      <text:p text:style-name="Text_20_body">Perfect 👍 Since you're practicing <text:span text:style-name="Strong_20_Emphasis">fork + POSIX IPC</text:span>, here is a <text:span text:style-name="Strong_20_Emphasis">complete single-program implementation</text:span> using:</text:p>
      <text:list xml:id="list644259377" text:style-name="L8">
        <text:list-item>
          <text:p text:style-name="P11"><text:span text:style-name="Source_20_Text">fork()</text:span> → create 4 processes</text:p>
        </text:list-item>
        <text:list-item>
          <text:p text:style-name="P11">POSIX <text:span text:style-name="Source_20_Text">shm_open()</text:span> → shared memory</text:p>
        </text:list-item>
        <text:list-item>
          <text:p text:style-name="P11"><text:span text:style-name="Source_20_Text">mmap()</text:span> → mapping</text:p>
        </text:list-item>
        <text:list-item>
          <text:p text:style-name="P11">POSIX <text:span text:style-name="Source_20_Text">sem_open()</text:span> → synchronization</text:p>
        </text:list-item>
        <text:list-item>
          <text:p text:style-name="P11"><text:soft-page-break/>Periodic writers (time, temp, humidity)</text:p>
        </text:list-item>
        <text:list-item>
          <text:p text:style-name="P11">Display controller process</text:p>
        </text:list-item>
      </text:list>
      <text:p text:style-name="Text_20_body">This runs as <text:span text:style-name="Strong_20_Emphasis">one executable</text:span> that forks into 4 processes.</text:p>
      <text:p text:style-name="Horizontal_20_Line"/>
      <text:h text:style-name="Heading_20_1" text:outline-level="1">✅ Architecture (Fork-Based)</text:h>
      <text:p text:style-name="P1"><text:span text:style-name="Source_20_Text">Parent Process</text:span></text:p>
      <text:p text:style-name="P1"><text:span text:style-name="Source_20_Text">│</text:span></text:p>
      <text:p text:style-name="P1"><text:span text:style-name="Source_20_Text">├── Child 1 → Time Writer</text:span></text:p>
      <text:p text:style-name="P1"><text:span text:style-name="Source_20_Text">├── Child 2 → Temperature Writer</text:span></text:p>
      <text:p text:style-name="P1"><text:span text:style-name="Source_20_Text">├── Child 3 → Humidity Writer</text:span></text:p>
      <text:p text:style-name="P2"><text:span text:style-name="Source_20_Text">└── Parent → Display Process</text:span></text:p>
      <text:p text:style-name="Text_20_body">All share the same shared memory region.</text:p>
      <text:p text:style-name="Horizontal_20_Line"/>
      <text:h text:style-name="Heading_20_1" text:outline-level="1">✅ Complete Code: <text:span text:style-name="Source_20_Text">display_system.c</text:span></text:h>
      <text:p text:style-name="P1"><text:span text:style-name="Source_20_Text">/*</text:span></text:p>
      <text:p text:style-name="P1"><text:span text:style-name="Source_20_Text"><text:s/>* display_system.c</text:span></text:p>
      <text:p text:style-name="P1"><text:span text:style-name="Source_20_Text"><text:s/>* Fork-based Shared Memory Display System</text:span></text:p>
      <text:p text:style-name="P1"><text:span text:style-name="Source_20_Text"><text:s/>*/</text:span></text:p>
      <text:p text:style-name="P1"/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pan text:style-name="Source_20_Text">#include &lt;time.h&gt;</text:span></text:p>
      <text:p text:style-name="P1"><text:span text:style-name="Source_20_Text">#include &lt;string.h&gt;</text:span></text:p>
      <text:p text:style-name="P1"><text:span text:style-name="Source_20_Text">#include &lt;fcntl.h&gt;</text:span></text:p>
      <text:p text:style-name="P1"><text:span text:style-name="Source_20_Text">#include &lt;sys/mman.h&gt;</text:span></text:p>
      <text:p text:style-name="P1"><text:span text:style-name="Source_20_Text">#include &lt;sys/stat.h&gt;</text:span></text:p>
      <text:p text:style-name="P1"><text:span text:style-name="Source_20_Text">#include &lt;sys/wait.h&gt;</text:span></text:p>
      <text:p text:style-name="P1"><text:span text:style-name="Source_20_Text">#include &lt;semaphore.h&gt;</text:span></text:p>
      <text:p text:style-name="P1"><text:span text:style-name="Source_20_Text">#include &lt;signal.h&gt;</text:span></text:p>
      <text:p text:style-name="P1"/>
      <text:p text:style-name="P1"><text:span text:style-name="Source_20_Text">#define SHM_NAME "/display_shm"</text:span></text:p>
      <text:p text:style-name="P1"><text:span text:style-name="Source_20_Text">#define SEM_NAME "/display_sem"</text:span></text:p>
      <text:p text:style-name="P1"/>
      <text:p text:style-name="P1"><text:span text:style-name="Source_20_Text">typedef struct {</text:span></text:p>
      <text:p text:style-name="P1"><text:span text:style-name="Source_20_Text"><text:s text:c="4"/>char time_str[64];</text:span></text:p>
      <text:p text:style-name="P1"><text:span text:style-name="Source_20_Text"><text:s text:c="4"/>float temperature;</text:span></text:p>
      <text:p text:style-name="P1"><text:span text:style-name="Source_20_Text"><text:s text:c="4"/>float humidity;</text:span></text:p>
      <text:p text:style-name="P1"><text:span text:style-name="Source_20_Text"><text:s text:c="4"/>int display_mode; <text:s text:c="2"/>// 0 = video, 1 = data</text:span></text:p>
      <text:p text:style-name="P1"><text:span text:style-name="Source_20_Text">} shared_data_t;</text:span></text:p>
      <text:p text:style-name="P1"/>
      <text:p text:style-name="P1"><text:span text:style-name="Source_20_Text">shared_data_t *data;</text:span></text:p>
      <text:p text:style-name="P1"><text:span text:style-name="Source_20_Text">sem_t *sem;</text:span></text:p>
      <text:p text:style-name="P1"/>
      <text:p text:style-name="P1"><text:span text:style-name="Source_20_Text">/* ================= Time Writer ================= */</text:span></text:p>
      <text:p text:style-name="P1"><text:span text:style-name="Source_20_Text">void time_writer() {</text:span></text:p>
      <text:p text:style-name="P1"><text:span text:style-name="Source_20_Text"><text:s text:c="4"/>while (1) {</text:span></text:p>
      <text:p text:style-name="P1"><text:span text:style-name="Source_20_Text"><text:s text:c="8"/>time_t now = time(NULL);</text:span></text:p>
      <text:p text:style-name="P1"><text:span text:style-name="Source_20_Text"><text:s text:c="8"/>struct tm *t = localtime(&amp;now);</text:span></text:p>
      <text:p text:style-name="P1"/>
      <text:p text:style-name="P1"><text:soft-page-break/><text:span text:style-name="Source_20_Text"><text:s text:c="8"/>sem_wait(sem);</text:span></text:p>
      <text:p text:style-name="P1"><text:span text:style-name="Source_20_Text"><text:s text:c="8"/>strftime(data-&gt;time_str, sizeof(data-&gt;time_str),</text:span></text:p>
      <text:p text:style-name="P1"><text:span text:style-name="Source_20_Text"><text:s text:c="17"/>"%H:%M:%S", t);</text:span></text:p>
      <text:p text:style-name="P1"><text:span text:style-name="Source_20_Text"><text:s text:c="8"/>sem_post(sem);</text:span></text:p>
      <text:p text:style-name="P1"/>
      <text:p text:style-name="P1"><text:span text:style-name="Source_20_Text"><text:s text:c="8"/>sleep(1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================= Temperature Writer ================= */</text:span></text:p>
      <text:p text:style-name="P1"><text:span text:style-name="Source_20_Text">void temp_writer() {</text:span></text:p>
      <text:p text:style-name="P1"><text:span text:style-name="Source_20_Text"><text:s text:c="4"/>srand(getpid());</text:span></text:p>
      <text:p text:style-name="P1"/>
      <text:p text:style-name="P1"><text:span text:style-name="Source_20_Text"><text:s text:c="4"/>while (1) {</text:span></text:p>
      <text:p text:style-name="P1"><text:span text:style-name="Source_20_Text"><text:s text:c="8"/>float temp = 25 + rand() % 10;</text:span></text:p>
      <text:p text:style-name="P1"/>
      <text:p text:style-name="P1"><text:span text:style-name="Source_20_Text"><text:s text:c="8"/>sem_wait(sem);</text:span></text:p>
      <text:p text:style-name="P1"><text:span text:style-name="Source_20_Text"><text:s text:c="8"/>data-&gt;temperature = temp;</text:span></text:p>
      <text:p text:style-name="P1"><text:span text:style-name="Source_20_Text"><text:s text:c="8"/>sem_post(sem);</text:span></text:p>
      <text:p text:style-name="P1"/>
      <text:p text:style-name="P1"><text:span text:style-name="Source_20_Text"><text:s text:c="8"/>sleep(2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================= Humidity Writer ================= */</text:span></text:p>
      <text:p text:style-name="P1"><text:span text:style-name="Source_20_Text">void hum_writer() {</text:span></text:p>
      <text:p text:style-name="P1"><text:span text:style-name="Source_20_Text"><text:s text:c="4"/>srand(getpid());</text:span></text:p>
      <text:p text:style-name="P1"/>
      <text:p text:style-name="P1"><text:span text:style-name="Source_20_Text"><text:s text:c="4"/>while (1) {</text:span></text:p>
      <text:p text:style-name="P1"><text:span text:style-name="Source_20_Text"><text:s text:c="8"/>float hum = 50 + rand() % 20;</text:span></text:p>
      <text:p text:style-name="P1"/>
      <text:p text:style-name="P1"><text:span text:style-name="Source_20_Text"><text:s text:c="8"/>sem_wait(sem);</text:span></text:p>
      <text:p text:style-name="P1"><text:span text:style-name="Source_20_Text"><text:s text:c="8"/>data-&gt;humidity = hum;</text:span></text:p>
      <text:p text:style-name="P1"><text:span text:style-name="Source_20_Text"><text:s text:c="8"/>sem_post(sem);</text:span></text:p>
      <text:p text:style-name="P1"/>
      <text:p text:style-name="P1"><text:span text:style-name="Source_20_Text"><text:s text:c="8"/>sleep(3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================= Display Process ================= */</text:span></text:p>
      <text:p text:style-name="P1"><text:span text:style-name="Source_20_Text">void display_process() {</text:span></text:p>
      <text:p text:style-name="P1"/>
      <text:p text:style-name="P1"><text:span text:style-name="Source_20_Text"><text:s text:c="4"/>int choice;</text:span></text:p>
      <text:p text:style-name="P1"/>
      <text:p text:style-name="P1"><text:span text:style-name="Source_20_Text"><text:s text:c="4"/>while (1) {</text:span></text:p>
      <text:p text:style-name="P1"/>
      <text:p text:style-name="P1"><text:span text:style-name="Source_20_Text"><text:s text:c="8"/>printf("\nSelect Mode:\n");</text:span></text:p>
      <text:p text:style-name="P1"><text:span text:style-name="Source_20_Text"><text:s text:c="8"/>printf("0 - Show Video\n");</text:span></text:p>
      <text:p text:style-name="P1"><text:span text:style-name="Source_20_Text"><text:s text:c="8"/>printf("1 - Show Data\n");</text:span></text:p>
      <text:p text:style-name="P1"><text:span text:style-name="Source_20_Text"><text:s text:c="8"/>printf("Enter choice: ");</text:span></text:p>
      <text:p text:style-name="P1"><text:span text:style-name="Source_20_Text"><text:s text:c="8"/>scanf("%d", &amp;choice);</text:span></text:p>
      <text:p text:style-name="P1"/>
      <text:p text:style-name="P1"><text:span text:style-name="Source_20_Text"><text:s text:c="8"/>sem_wait(sem);</text:span></text:p>
      <text:p text:style-name="P1"><text:span text:style-name="Source_20_Text"><text:s text:c="8"/>data-&gt;display_mode = choice;</text:span></text:p>
      <text:p text:style-name="P1"/>
      <text:p text:style-name="P1"><text:span text:style-name="Source_20_Text"><text:s text:c="8"/>if (data-&gt;display_mode == 1) {</text:span></text:p>
      <text:p text:style-name="P1"><text:span text:style-name="Source_20_Text"><text:s text:c="12"/>printf("\n===== DISPLAY DATA =====\n");</text:span></text:p>
      <text:p text:style-name="P1"><text:span text:style-name="Source_20_Text"><text:s text:c="12"/>printf("Time <text:s text:c="7"/>: %s\n", data-&gt;time_str);</text:span></text:p>
      <text:p text:style-name="P1"><text:span text:style-name="Source_20_Text"><text:s text:c="12"/>printf("Temperature : %.2f C\n", data-&gt;temperature);</text:span></text:p>
      <text:p text:style-name="P1"><text:span text:style-name="Source_20_Text"><text:s text:c="12"/>printf("Humidity <text:s text:c="3"/>: %.2f %%\n", data-&gt;humidity);</text:span></text:p>
      <text:p text:style-name="P1"><text:span text:style-name="Source_20_Text"><text:s text:c="12"/>printf("========================\n");</text:span></text:p>
      <text:p text:style-name="P1"><text:span text:style-name="Source_20_Text"><text:s text:c="8"/>} else {</text:span></text:p>
      <text:p text:style-name="P1"><text:span text:style-name="Source_20_Text"><text:s text:c="12"/>printf("\nPlaying video (simulated)...\n");</text:span></text:p>
      <text:p text:style-name="P1"><text:span text:style-name="Source_20_Text"><text:s text:c="8"/>}</text:span></text:p>
      <text:p text:style-name="P1"><text:soft-page-break/><text:span text:style-name="Source_20_Text"><text:s text:c="8"/>sem_post(sem);</text:span></text:p>
      <text:p text:style-name="P1"/>
      <text:p text:style-name="P1"><text:span text:style-name="Source_20_Text"><text:s text:c="8"/>sleep(1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================= Cleanup ================= */</text:span></text:p>
      <text:p text:style-name="P1"><text:span text:style-name="Source_20_Text">void cleanup(int signum) {</text:span></text:p>
      <text:p text:style-name="P1"><text:span text:style-name="Source_20_Text"><text:s text:c="4"/>printf("\nCleaning up shared memory...\n");</text:span></text:p>
      <text:p text:style-name="P1"><text:span text:style-name="Source_20_Text"><text:s text:c="4"/>munmap(data, sizeof(shared_data_t));</text:span></text:p>
      <text:p text:style-name="P1"><text:span text:style-name="Source_20_Text"><text:s text:c="4"/>shm_unlink(SHM_NAME);</text:span></text:p>
      <text:p text:style-name="P1"><text:span text:style-name="Source_20_Text"><text:s text:c="4"/>sem_unlink(SEM_NAME);</text:span></text:p>
      <text:p text:style-name="P1"><text:span text:style-name="Source_20_Text"><text:s text:c="4"/>exit(0);</text:span></text:p>
      <text:p text:style-name="P1"><text:span text:style-name="Source_20_Text">}</text:span></text:p>
      <text:p text:style-name="P1"/>
      <text:p text:style-name="P1"><text:span text:style-name="Source_20_Text">/* ================= MAIN ================= */</text:span></text:p>
      <text:p text:style-name="P1"><text:span text:style-name="Source_20_Text">int main() {</text:span></text:p>
      <text:p text:style-name="P1"/>
      <text:p text:style-name="P1"><text:span text:style-name="Source_20_Text"><text:s text:c="4"/>int shm_fd;</text:span></text:p>
      <text:p text:style-name="P1"/>
      <text:p text:style-name="P1"><text:span text:style-name="Source_20_Text"><text:s text:c="4"/>/* Create shared memory */</text:span></text:p>
      <text:p text:style-name="P1"><text:span text:style-name="Source_20_Text"><text:s text:c="4"/>shm_fd = shm_open(SHM_NAME, O_CREAT | O_RDWR, 0666);</text:span></text:p>
      <text:p text:style-name="P1"><text:span text:style-name="Source_20_Text"><text:s text:c="4"/>ftruncate(shm_fd, sizeof(shared_data_t));</text:span></text:p>
      <text:p text:style-name="P1"/>
      <text:p text:style-name="P1"><text:span text:style-name="Source_20_Text"><text:s text:c="4"/>data = mmap(NULL, sizeof(shared_data_t),</text:span></text:p>
      <text:p text:style-name="P1"><text:span text:style-name="Source_20_Text"><text:s text:c="16"/>PROT_READ | PROT_WRITE,</text:span></text:p>
      <text:p text:style-name="P1"><text:span text:style-name="Source_20_Text"><text:s text:c="16"/>MAP_SHARED, shm_fd, 0);</text:span></text:p>
      <text:p text:style-name="P1"/>
      <text:p text:style-name="P1"><text:span text:style-name="Source_20_Text"><text:s text:c="4"/>/* Initialize semaphore */</text:span></text:p>
      <text:p text:style-name="P1"><text:span text:style-name="Source_20_Text"><text:s text:c="4"/>sem = sem_open(SEM_NAME, O_CREAT, 0666, 1);</text:span></text:p>
      <text:p text:style-name="P1"/>
      <text:p text:style-name="P1"><text:span text:style-name="Source_20_Text"><text:s text:c="4"/>/* Handle Ctrl+C cleanup */</text:span></text:p>
      <text:p text:style-name="P1"><text:span text:style-name="Source_20_Text"><text:s text:c="4"/>signal(SIGINT, cleanup);</text:span></text:p>
      <text:p text:style-name="P1"/>
      <text:p text:style-name="P1"><text:span text:style-name="Source_20_Text"><text:s text:c="4"/>pid_t pid1, pid2, pid3;</text:span></text:p>
      <text:p text:style-name="P1"/>
      <text:p text:style-name="P1"><text:span text:style-name="Source_20_Text"><text:s text:c="4"/>/* Fork Time Writer */</text:span></text:p>
      <text:p text:style-name="P1"><text:span text:style-name="Source_20_Text"><text:s text:c="4"/>pid1 = fork();</text:span></text:p>
      <text:p text:style-name="P1"><text:span text:style-name="Source_20_Text"><text:s text:c="4"/>if (pid1 == 0) {</text:span></text:p>
      <text:p text:style-name="P1"><text:span text:style-name="Source_20_Text"><text:s text:c="8"/>time_writer(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* Fork Temperature Writer */</text:span></text:p>
      <text:p text:style-name="P1"><text:span text:style-name="Source_20_Text"><text:s text:c="4"/>pid2 = fork();</text:span></text:p>
      <text:p text:style-name="P1"><text:span text:style-name="Source_20_Text"><text:s text:c="4"/>if (pid2 == 0) {</text:span></text:p>
      <text:p text:style-name="P1"><text:span text:style-name="Source_20_Text"><text:s text:c="8"/>temp_writer(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* Fork Humidity Writer */</text:span></text:p>
      <text:p text:style-name="P1"><text:span text:style-name="Source_20_Text"><text:s text:c="4"/>pid3 = fork();</text:span></text:p>
      <text:p text:style-name="P1"><text:span text:style-name="Source_20_Text"><text:s text:c="4"/>if (pid3 == 0) {</text:span></text:p>
      <text:p text:style-name="P1"><text:span text:style-name="Source_20_Text"><text:s text:c="8"/>hum_writer(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* Parent runs Display Process */</text:span></text:p>
      <text:p text:style-name="P1"><text:span text:style-name="Source_20_Text"><text:s text:c="4"/>display_process();</text:span></text:p>
      <text:p text:style-name="P1"/>
      <text:p text:style-name="P1"><text:span text:style-name="Source_20_Text"><text:s text:c="4"/>/* Wait for children */</text:span></text:p>
      <text:p text:style-name="P1"><text:span text:style-name="Source_20_Text"><text:s text:c="4"/>wait(NULL);</text:span></text:p>
      <text:p text:style-name="P1"><text:span text:style-name="Source_20_Text"><text:s text:c="4"/>wait(NULL);</text:span></text:p>
      <text:p text:style-name="P1"><text:span text:style-name="Source_20_Text"><text:s text:c="4"/>wait(NULL);</text:span></text:p>
      <text:p text:style-name="P1"><text:soft-page-break/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✅ Compile (Linux)</text:h>
      <text:p text:style-name="P2"><text:span text:style-name="Source_20_Text">gcc display_system.c -o display_system -lrt -pthread</text:span></text:p>
      <text:p text:style-name="Quotations">On QNX, <text:span text:style-name="Source_20_Text">-lrt</text:span> may not be required.</text:p>
      <text:p text:style-name="Horizontal_20_Line"/>
      <text:h text:style-name="Heading_20_1" text:outline-level="1">✅ Run</text:h>
      <text:p text:style-name="P2"><text:span text:style-name="Source_20_Text">./display_system</text:span></text:p>
      <text:p text:style-name="Text_20_body">Press <text:span text:style-name="Source_20_Text">Ctrl + C</text:span> to cleanup shared memory.</text:p>
      <text:p text:style-name="Horizontal_20_Line"/>
      <text:h text:style-name="Heading_20_1" text:outline-level="1">🧠 What Happens Internally</text:h>
      <text:list xml:id="list3334406247" text:style-name="L9">
        <text:list-item>
          <text:p text:style-name="P12"><text:span text:style-name="Source_20_Text">fork()</text:span> duplicates memory space.</text:p>
        </text:list-item>
        <text:list-item>
          <text:p text:style-name="P12">Shared memory ensures all processes see same data.</text:p>
        </text:list-item>
        <text:list-item>
          <text:p text:style-name="P12"><text:span text:style-name="Source_20_Text">MAP_SHARED</text:span> makes updates visible.</text:p>
        </text:list-item>
        <text:list-item>
          <text:p text:style-name="P12">Semaphore prevents race condition.</text:p>
        </text:list-item>
        <text:list-item>
          <text:p text:style-name="P12">Parent acts as display controller.</text:p>
        </text:list-item>
      </text:list>
      <text:p text:style-name="Horizontal_20_Line"/>
      <text:h text:style-name="Heading_20_1" text:outline-level="1">🚀 If You Want Real-Time Upgrade</text:h>
      <text:p text:style-name="Text_20_body">Replace:</text:p>
      <text:p text:style-name="P2"><text:span text:style-name="Source_20_Text">sleep(1);</text:span></text:p>
      <text:p text:style-name="Text_20_body">With:</text:p>
      <text:p text:style-name="P1"><text:span text:style-name="Source_20_Text">struct timespec ts = {1, 0};</text:span></text:p>
      <text:p text:style-name="P2"><text:span text:style-name="Source_20_Text">nanosleep(&amp;ts, NULL);</text:span></text:p>
      <text:p text:style-name="Text_20_body">And add:</text:p>
      <text:p text:style-name="P2"><text:span text:style-name="Source_20_Text">#include &lt;sched.h&gt;</text:span></text:p>
      <text:p text:style-name="Text_20_body">Use:</text:p>
      <text:p text:style-name="P1"><text:span text:style-name="Source_20_Text">struct sched_param param;</text:span></text:p>
      <text:p text:style-name="P1"><text:soft-page-break/><text:span text:style-name="Source_20_Text">param.sched_priority = 20;</text:span></text:p>
      <text:p text:style-name="P2"><text:span text:style-name="Source_20_Text">sched_setscheduler(0, SCHED_FIFO, &amp;param);</text:span></text:p>
      <text:p text:style-name="Horizontal_20_Line"/>
      <text:h text:style-name="Heading_20_1" text:outline-level="1">🎯 Viva Questions They May Ask</text:h>
      <text:list xml:id="list2863612339" text:style-name="L10">
        <text:list-item>
          <text:p text:style-name="P13">Why semaphore required?</text:p>
        </text:list-item>
        <text:list-item>
          <text:p text:style-name="P13">What happens without it?</text:p>
        </text:list-item>
        <text:list-item>
          <text:p text:style-name="P13">Difference between MAP_PRIVATE and MAP_SHARED?</text:p>
        </text:list-item>
        <text:list-item>
          <text:p text:style-name="P13">What if parent crashes?</text:p>
        </text:list-item>
        <text:list-item>
          <text:p text:style-name="P13">Why shared memory faster than pipes?</text:p>
        </text:list-item>
        <text:list-item>
          <text:p text:style-name="P13">How to avoid busy waiting?</text:p>
        </text:list-item>
        <text:list-item>
          <text:p text:style-name="P13">What is memory visibility issue?</text:p>
        </text:list-item>
      </text:list>
      <text:p text:style-name="Horizontal_20_Line"/>
      <text:p text:style-name="Text_20_body">If you want next level:</text:p>
      <text:list xml:id="list4058550847" text:style-name="L11">
        <text:list-item>
          <text:p text:style-name="P14">✅ Version using <text:span text:style-name="Strong_20_Emphasis">unnamed semaphore inside shared memory</text:span></text:p>
        </text:list-item>
        <text:list-item>
          <text:p text:style-name="P14">✅ Version using <text:span text:style-name="Strong_20_Emphasis">pthread mutex in shared memory</text:span></text:p>
        </text:list-item>
        <text:list-item>
          <text:p text:style-name="P14">✅ QNX-specific version</text:p>
        </text:list-item>
        <text:list-item>
          <text:p text:style-name="P14">✅ Python GUI reading shared memory</text:p>
        </text:list-item>
        <text:list-item>
          <text:p text:style-name="P14">✅ Add watchdog process</text:p>
        </text:list-item>
        <text:list-item>
          <text:p text:style-name="P14">✅ Convert to server-client architecture</text:p>
        </text:list-item>
      </text:list>
      <text:p text:style-name="Text_20_body">Tell me which direction you want next 🔥</text:p>
      <text:p text:style-name="Text_20_body">QNX version</text:p>
      <text:p text:style-name="Text_20_body">Excellent 👍 Since you're working toward QNX-based systems, here is a <text:span text:style-name="Strong_20_Emphasis">QNX Neutrino–compatible version</text:span> of the Shared Memory Display System.</text:p>
      <text:p text:style-name="Text_20_body">In <text:span text:style-name="Strong_20_Emphasis">QNX Neutrino RTOS</text:span>, POSIX shared memory is fully supported, but:</text:p>
      <text:list xml:id="list761513443" text:style-name="L12">
        <text:list-item>
          <text:p text:style-name="P15">❌ <text:span text:style-name="Source_20_Text">-lrt</text:span> is NOT required</text:p>
        </text:list-item>
        <text:list-item>
          <text:p text:style-name="P15">✔ <text:span text:style-name="Source_20_Text">shm_open()</text:span> maps into <text:span text:style-name="Source_20_Text">/dev/shmem</text:span></text:p>
        </text:list-item>
        <text:list-item>
          <text:p text:style-name="P15">✔ Real-time scheduling (<text:span text:style-name="Source_20_Text">SCHED_FIFO</text:span>) is fully supported</text:p>
        </text:list-item>
        <text:list-item>
          <text:p text:style-name="P15">✔ QNX prefers <text:span text:style-name="Source_20_Text">clock_nanosleep()</text:span> for periodic tasks</text:p>
        </text:list-item>
      </text:list>
      <text:p text:style-name="Text_20_body">We will build a <text:span text:style-name="Strong_20_Emphasis">real-time fork-based version for QNX</text:span>.</text:p>
      <text:p text:style-name="Horizontal_20_Line"/>
      <text:h text:style-name="Heading_20_1" text:outline-level="1"><text:soft-page-break/>✅ QNX Architecture</text:h>
      <text:p text:style-name="P1"><text:span text:style-name="Source_20_Text">Main Process</text:span></text:p>
      <text:p text:style-name="P1"><text:span text:style-name="Source_20_Text">│</text:span></text:p>
      <text:p text:style-name="P1"><text:span text:style-name="Source_20_Text">├── Time Writer (High Priority)</text:span></text:p>
      <text:p text:style-name="P1"><text:span text:style-name="Source_20_Text">├── Temperature Writer</text:span></text:p>
      <text:p text:style-name="P1"><text:span text:style-name="Source_20_Text">├── Humidity Writer</text:span></text:p>
      <text:p text:style-name="P2"><text:span text:style-name="Source_20_Text">└── Display Controller (Lower Priority)</text:span></text:p>
      <text:p text:style-name="Text_20_body">Shared memory is visible under:</text:p>
      <text:p text:style-name="P2"><text:span text:style-name="Source_20_Text">/dev/shmem/display_shm</text:span></text:p>
      <text:p text:style-name="Horizontal_20_Line"/>
      <text:h text:style-name="Heading_20_1" text:outline-level="1">✅ QNX-Specific Improvements</text:h>
      <text:p text:style-name="Text_20_body">✔ Uses <text:span text:style-name="Source_20_Text">clock_nanosleep()</text:span> (real-time safe)<text:line-break/>✔ Uses <text:span text:style-name="Source_20_Text">SCHED_FIFO</text:span> scheduling<text:line-break/>✔ Priority assignment per process<text:line-break/>✔ Proper signal cleanup</text:p>
      <text:p text:style-name="Horizontal_20_Line"/>
      <text:h text:style-name="Heading_20_1" text:outline-level="1">✅ Complete QNX Code: <text:span text:style-name="Source_20_Text">display_qnx.c</text:span></text:h>
      <text:p text:style-name="P1"><text:span text:style-name="Source_20_Text">/*</text:span></text:p>
      <text:p text:style-name="P1"><text:span text:style-name="Source_20_Text"><text:s/>* display_qnx.c</text:span></text:p>
      <text:p text:style-name="P1"><text:span text:style-name="Source_20_Text"><text:s/>* QNX Neutrino Real-Time Shared Memory Display System</text:span></text:p>
      <text:p text:style-name="P1"><text:span text:style-name="Source_20_Text"><text:s/>*/</text:span></text:p>
      <text:p text:style-name="P1"/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pan text:style-name="Source_20_Text">#include &lt;time.h&gt;</text:span></text:p>
      <text:p text:style-name="P1"><text:span text:style-name="Source_20_Text">#include &lt;string.h&gt;</text:span></text:p>
      <text:p text:style-name="P1"><text:span text:style-name="Source_20_Text">#include &lt;fcntl.h&gt;</text:span></text:p>
      <text:p text:style-name="P1"><text:span text:style-name="Source_20_Text">#include &lt;sys/mman.h&gt;</text:span></text:p>
      <text:p text:style-name="P1"><text:span text:style-name="Source_20_Text">#include &lt;sys/stat.h&gt;</text:span></text:p>
      <text:p text:style-name="P1"><text:span text:style-name="Source_20_Text">#include &lt;sys/wait.h&gt;</text:span></text:p>
      <text:p text:style-name="P1"><text:span text:style-name="Source_20_Text">#include &lt;semaphore.h&gt;</text:span></text:p>
      <text:p text:style-name="P1"><text:span text:style-name="Source_20_Text">#include &lt;signal.h&gt;</text:span></text:p>
      <text:p text:style-name="P1"><text:span text:style-name="Source_20_Text">#include &lt;sched.h&gt;</text:span></text:p>
      <text:p text:style-name="P1"/>
      <text:p text:style-name="P1"><text:span text:style-name="Source_20_Text">#define SHM_NAME "/display_shm"</text:span></text:p>
      <text:p text:style-name="P1"><text:span text:style-name="Source_20_Text">#define SEM_NAME "/display_sem"</text:span></text:p>
      <text:p text:style-name="P1"/>
      <text:p text:style-name="P1"><text:span text:style-name="Source_20_Text">typedef struct {</text:span></text:p>
      <text:p text:style-name="P1"><text:span text:style-name="Source_20_Text"><text:s text:c="4"/>char time_str[64];</text:span></text:p>
      <text:p text:style-name="P1"><text:span text:style-name="Source_20_Text"><text:s text:c="4"/>float temperature;</text:span></text:p>
      <text:p text:style-name="P1"><text:span text:style-name="Source_20_Text"><text:s text:c="4"/>float humidity;</text:span></text:p>
      <text:p text:style-name="P1"><text:span text:style-name="Source_20_Text"><text:s text:c="4"/>int display_mode;</text:span></text:p>
      <text:p text:style-name="P1"><text:span text:style-name="Source_20_Text">} shared_data_t;</text:span></text:p>
      <text:p text:style-name="P1"/>
      <text:p text:style-name="P1"><text:span text:style-name="Source_20_Text">shared_data_t *data;</text:span></text:p>
      <text:p text:style-name="P1"><text:span text:style-name="Source_20_Text">sem_t *sem;</text:span></text:p>
      <text:p text:style-name="P1"/>
      <text:p text:style-name="P1"><text:soft-page-break/><text:span text:style-name="Source_20_Text">/* ============ Real-Time Periodic Sleep ============ */</text:span></text:p>
      <text:p text:style-name="P1"><text:span text:style-name="Source_20_Text">void periodic_sleep(int seconds)</text:span></text:p>
      <text:p text:style-name="P1"><text:span text:style-name="Source_20_Text">{</text:span></text:p>
      <text:p text:style-name="P1"><text:span text:style-name="Source_20_Text"><text:s text:c="4"/>struct timespec ts;</text:span></text:p>
      <text:p text:style-name="P1"><text:span text:style-name="Source_20_Text"><text:s text:c="4"/>ts.tv_sec = seconds;</text:span></text:p>
      <text:p text:style-name="P1"><text:span text:style-name="Source_20_Text"><text:s text:c="4"/>ts.tv_nsec = 0;</text:span></text:p>
      <text:p text:style-name="P1"><text:span text:style-name="Source_20_Text"><text:s text:c="4"/>clock_nanosleep(CLOCK_MONOTONIC, 0, &amp;ts, NULL);</text:span></text:p>
      <text:p text:style-name="P1"><text:span text:style-name="Source_20_Text">}</text:span></text:p>
      <text:p text:style-name="P1"/>
      <text:p text:style-name="P1"><text:span text:style-name="Source_20_Text">/* ============ Set Real-Time Priority ============ */</text:span></text:p>
      <text:p text:style-name="P1"><text:span text:style-name="Source_20_Text">void set_priority(int prio)</text:span></text:p>
      <text:p text:style-name="P1"><text:span text:style-name="Source_20_Text">{</text:span></text:p>
      <text:p text:style-name="P1"><text:span text:style-name="Source_20_Text"><text:s text:c="4"/>struct sched_param param;</text:span></text:p>
      <text:p text:style-name="P1"><text:span text:style-name="Source_20_Text"><text:s text:c="4"/>param.sched_priority = prio;</text:span></text:p>
      <text:p text:style-name="P1"/>
      <text:p text:style-name="P1"><text:span text:style-name="Source_20_Text"><text:s text:c="4"/>if (sched_setscheduler(0, SCHED_FIFO, &amp;param) == -1) {</text:span></text:p>
      <text:p text:style-name="P1"><text:span text:style-name="Source_20_Text"><text:s text:c="8"/>perror("sched_setscheduler"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============ Time Writer ============ */</text:span></text:p>
      <text:p text:style-name="P1"><text:span text:style-name="Source_20_Text">void time_writer()</text:span></text:p>
      <text:p text:style-name="P1"><text:span text:style-name="Source_20_Text">{</text:span></text:p>
      <text:p text:style-name="P1"><text:span text:style-name="Source_20_Text"><text:s text:c="4"/>set_priority(30); <text:s text:c="2"/>// High priority</text:span></text:p>
      <text:p text:style-name="P1"/>
      <text:p text:style-name="P1"><text:span text:style-name="Source_20_Text"><text:s text:c="4"/>while (1) {</text:span></text:p>
      <text:p text:style-name="P1"><text:span text:style-name="Source_20_Text"><text:s text:c="8"/>time_t now = time(NULL);</text:span></text:p>
      <text:p text:style-name="P1"><text:span text:style-name="Source_20_Text"><text:s text:c="8"/>struct tm *t = localtime(&amp;now);</text:span></text:p>
      <text:p text:style-name="P1"/>
      <text:p text:style-name="P1"><text:span text:style-name="Source_20_Text"><text:s text:c="8"/>sem_wait(sem);</text:span></text:p>
      <text:p text:style-name="P1"><text:span text:style-name="Source_20_Text"><text:s text:c="8"/>strftime(data-&gt;time_str, sizeof(data-&gt;time_str),</text:span></text:p>
      <text:p text:style-name="P1"><text:span text:style-name="Source_20_Text"><text:s text:c="17"/>"%H:%M:%S", t);</text:span></text:p>
      <text:p text:style-name="P1"><text:span text:style-name="Source_20_Text"><text:s text:c="8"/>sem_post(sem);</text:span></text:p>
      <text:p text:style-name="P1"/>
      <text:p text:style-name="P1"><text:span text:style-name="Source_20_Text"><text:s text:c="8"/>periodic_sleep(1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============ Temperature Writer ============ */</text:span></text:p>
      <text:p text:style-name="P1"><text:span text:style-name="Source_20_Text">void temp_writer()</text:span></text:p>
      <text:p text:style-name="P1"><text:span text:style-name="Source_20_Text">{</text:span></text:p>
      <text:p text:style-name="P1"><text:span text:style-name="Source_20_Text"><text:s text:c="4"/>set_priority(25);</text:span></text:p>
      <text:p text:style-name="P1"/>
      <text:p text:style-name="P1"><text:span text:style-name="Source_20_Text"><text:s text:c="4"/>srand(getpid());</text:span></text:p>
      <text:p text:style-name="P1"/>
      <text:p text:style-name="P1"><text:span text:style-name="Source_20_Text"><text:s text:c="4"/>while (1) {</text:span></text:p>
      <text:p text:style-name="P1"><text:span text:style-name="Source_20_Text"><text:s text:c="8"/>float temp = 25 + rand() % 10;</text:span></text:p>
      <text:p text:style-name="P1"/>
      <text:p text:style-name="P1"><text:span text:style-name="Source_20_Text"><text:s text:c="8"/>sem_wait(sem);</text:span></text:p>
      <text:p text:style-name="P1"><text:span text:style-name="Source_20_Text"><text:s text:c="8"/>data-&gt;temperature = temp;</text:span></text:p>
      <text:p text:style-name="P1"><text:span text:style-name="Source_20_Text"><text:s text:c="8"/>sem_post(sem);</text:span></text:p>
      <text:p text:style-name="P1"/>
      <text:p text:style-name="P1"><text:span text:style-name="Source_20_Text"><text:s text:c="8"/>periodic_sleep(2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============ Humidity Writer ============ */</text:span></text:p>
      <text:p text:style-name="P1"><text:span text:style-name="Source_20_Text">void hum_writer()</text:span></text:p>
      <text:p text:style-name="P1"><text:span text:style-name="Source_20_Text">{</text:span></text:p>
      <text:p text:style-name="P1"><text:span text:style-name="Source_20_Text"><text:s text:c="4"/>set_priority(20);</text:span></text:p>
      <text:p text:style-name="P1"/>
      <text:p text:style-name="P1"><text:span text:style-name="Source_20_Text"><text:s text:c="4"/>srand(getpid());</text:span></text:p>
      <text:p text:style-name="P1"/>
      <text:p text:style-name="P1"><text:span text:style-name="Source_20_Text"><text:s text:c="4"/>while (1) {</text:span></text:p>
      <text:p text:style-name="P1"><text:soft-page-break/><text:span text:style-name="Source_20_Text"><text:s text:c="8"/>float hum = 50 + rand() % 20;</text:span></text:p>
      <text:p text:style-name="P1"/>
      <text:p text:style-name="P1"><text:span text:style-name="Source_20_Text"><text:s text:c="8"/>sem_wait(sem);</text:span></text:p>
      <text:p text:style-name="P1"><text:span text:style-name="Source_20_Text"><text:s text:c="8"/>data-&gt;humidity = hum;</text:span></text:p>
      <text:p text:style-name="P1"><text:span text:style-name="Source_20_Text"><text:s text:c="8"/>sem_post(sem);</text:span></text:p>
      <text:p text:style-name="P1"/>
      <text:p text:style-name="P1"><text:span text:style-name="Source_20_Text"><text:s text:c="8"/>periodic_sleep(3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============ Display Controller ============ */</text:span></text:p>
      <text:p text:style-name="P1"><text:span text:style-name="Source_20_Text">void display_process()</text:span></text:p>
      <text:p text:style-name="P1"><text:span text:style-name="Source_20_Text">{</text:span></text:p>
      <text:p text:style-name="P1"><text:span text:style-name="Source_20_Text"><text:s text:c="4"/>set_priority(10); <text:s text:c="2"/>// Lower priority</text:span></text:p>
      <text:p text:style-name="P1"/>
      <text:p text:style-name="P1"><text:span text:style-name="Source_20_Text"><text:s text:c="4"/>int choice;</text:span></text:p>
      <text:p text:style-name="P1"/>
      <text:p text:style-name="P1"><text:span text:style-name="Source_20_Text"><text:s text:c="4"/>while (1) {</text:span></text:p>
      <text:p text:style-name="P1"/>
      <text:p text:style-name="P1"><text:span text:style-name="Source_20_Text"><text:s text:c="8"/>printf("\nSelect Mode:\n");</text:span></text:p>
      <text:p text:style-name="P1"><text:span text:style-name="Source_20_Text"><text:s text:c="8"/>printf("0 - Show Video\n");</text:span></text:p>
      <text:p text:style-name="P1"><text:span text:style-name="Source_20_Text"><text:s text:c="8"/>printf("1 - Show Data\n");</text:span></text:p>
      <text:p text:style-name="P1"><text:span text:style-name="Source_20_Text"><text:s text:c="8"/>printf("Enter choice: ");</text:span></text:p>
      <text:p text:style-name="P1"><text:span text:style-name="Source_20_Text"><text:s text:c="8"/>scanf("%d", &amp;choice);</text:span></text:p>
      <text:p text:style-name="P1"/>
      <text:p text:style-name="P1"><text:span text:style-name="Source_20_Text"><text:s text:c="8"/>sem_wait(sem);</text:span></text:p>
      <text:p text:style-name="P1"><text:span text:style-name="Source_20_Text"><text:s text:c="8"/>data-&gt;display_mode = choice;</text:span></text:p>
      <text:p text:style-name="P1"/>
      <text:p text:style-name="P1"><text:span text:style-name="Source_20_Text"><text:s text:c="8"/>if (data-&gt;display_mode == 1) {</text:span></text:p>
      <text:p text:style-name="P1"><text:span text:style-name="Source_20_Text"><text:s text:c="12"/>printf("\n==== DISPLAY DATA ====\n");</text:span></text:p>
      <text:p text:style-name="P1"><text:span text:style-name="Source_20_Text"><text:s text:c="12"/>printf("Time <text:s text:c="7"/>: %s\n", data-&gt;time_str);</text:span></text:p>
      <text:p text:style-name="P1"><text:span text:style-name="Source_20_Text"><text:s text:c="12"/>printf("Temperature : %.2f C\n", data-&gt;temperature);</text:span></text:p>
      <text:p text:style-name="P1"><text:span text:style-name="Source_20_Text"><text:s text:c="12"/>printf("Humidity <text:s text:c="3"/>: %.2f %%\n", data-&gt;humidity);</text:span></text:p>
      <text:p text:style-name="P1"><text:span text:style-name="Source_20_Text"><text:s text:c="12"/>printf("======================\n");</text:span></text:p>
      <text:p text:style-name="P1"><text:span text:style-name="Source_20_Text"><text:s text:c="8"/>} else {</text:span></text:p>
      <text:p text:style-name="P1"><text:span text:style-name="Source_20_Text"><text:s text:c="12"/>printf("\n[QNX] Playing video (simulated)...\n")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sem_post(sem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============ Cleanup ============ */</text:span></text:p>
      <text:p text:style-name="P1"><text:span text:style-name="Source_20_Text">void cleanup(int signo)</text:span></text:p>
      <text:p text:style-name="P1"><text:span text:style-name="Source_20_Text">{</text:span></text:p>
      <text:p text:style-name="P1"><text:span text:style-name="Source_20_Text"><text:s text:c="4"/>printf("\nCleaning up...\n");</text:span></text:p>
      <text:p text:style-name="P1"><text:span text:style-name="Source_20_Text"><text:s text:c="4"/>munmap(data, sizeof(shared_data_t));</text:span></text:p>
      <text:p text:style-name="P1"><text:span text:style-name="Source_20_Text"><text:s text:c="4"/>shm_unlink(SHM_NAME);</text:span></text:p>
      <text:p text:style-name="P1"><text:span text:style-name="Source_20_Text"><text:s text:c="4"/>sem_unlink(SEM_NAME);</text:span></text:p>
      <text:p text:style-name="P1"><text:span text:style-name="Source_20_Text"><text:s text:c="4"/>exit(0);</text:span></text:p>
      <text:p text:style-name="P1"><text:span text:style-name="Source_20_Text">}</text:span></text:p>
      <text:p text:style-name="P1"/>
      <text:p text:style-name="P1"><text:span text:style-name="Source_20_Text">/* ============ MAIN ============ */</text:span></text:p>
      <text:p text:style-name="P1"><text:span text:style-name="Source_20_Text">int main()</text:span></text:p>
      <text:p text:style-name="P1"><text:span text:style-name="Source_20_Text">{</text:span></text:p>
      <text:p text:style-name="P1"><text:span text:style-name="Source_20_Text"><text:s text:c="4"/>int shm_fd;</text:span></text:p>
      <text:p text:style-name="P1"/>
      <text:p text:style-name="P1"><text:span text:style-name="Source_20_Text"><text:s text:c="4"/>/* Create shared memory */</text:span></text:p>
      <text:p text:style-name="P1"><text:span text:style-name="Source_20_Text"><text:s text:c="4"/>shm_fd = shm_open(SHM_NAME, O_CREAT | O_RDWR, 0666);</text:span></text:p>
      <text:p text:style-name="P1"><text:span text:style-name="Source_20_Text"><text:s text:c="4"/>if (shm_fd == -1) {</text:span></text:p>
      <text:p text:style-name="P1"><text:span text:style-name="Source_20_Text"><text:s text:c="8"/>perror("shm_open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oft-page-break/><text:span text:style-name="Source_20_Text"><text:s text:c="4"/>ftruncate(shm_fd, sizeof(shared_data_t));</text:span></text:p>
      <text:p text:style-name="P1"/>
      <text:p text:style-name="P1"><text:span text:style-name="Source_20_Text"><text:s text:c="4"/>data = mmap(NULL, sizeof(shared_data_t),</text:span></text:p>
      <text:p text:style-name="P1"><text:span text:style-name="Source_20_Text"><text:s text:c="16"/>PROT_READ | PROT_WRITE,</text:span></text:p>
      <text:p text:style-name="P1"><text:span text:style-name="Source_20_Text"><text:s text:c="16"/>MAP_SHARED, shm_fd, 0);</text:span></text:p>
      <text:p text:style-name="P1"/>
      <text:p text:style-name="P1"><text:span text:style-name="Source_20_Text"><text:s text:c="4"/>/* Create semaphore */</text:span></text:p>
      <text:p text:style-name="P1"><text:span text:style-name="Source_20_Text"><text:s text:c="4"/>sem = sem_open(SEM_NAME, O_CREAT, 0666, 1);</text:span></text:p>
      <text:p text:style-name="P1"/>
      <text:p text:style-name="P1"><text:span text:style-name="Source_20_Text"><text:s text:c="4"/>signal(SIGINT, cleanup);</text:span></text:p>
      <text:p text:style-name="P1"/>
      <text:p text:style-name="P1"><text:span text:style-name="Source_20_Text"><text:s text:c="4"/>pid_t pid;</text:span></text:p>
      <text:p text:style-name="P1"/>
      <text:p text:style-name="P1"><text:span text:style-name="Source_20_Text"><text:s text:c="4"/>pid = fork();</text:span></text:p>
      <text:p text:style-name="P1"><text:span text:style-name="Source_20_Text"><text:s text:c="4"/>if (pid == 0) {</text:span></text:p>
      <text:p text:style-name="P1"><text:span text:style-name="Source_20_Text"><text:s text:c="8"/>time_writer(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id = fork();</text:span></text:p>
      <text:p text:style-name="P1"><text:span text:style-name="Source_20_Text"><text:s text:c="4"/>if (pid == 0) {</text:span></text:p>
      <text:p text:style-name="P1"><text:span text:style-name="Source_20_Text"><text:s text:c="8"/>temp_writer(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id = fork();</text:span></text:p>
      <text:p text:style-name="P1"><text:span text:style-name="Source_20_Text"><text:s text:c="4"/>if (pid == 0) {</text:span></text:p>
      <text:p text:style-name="P1"><text:span text:style-name="Source_20_Text"><text:s text:c="8"/>hum_writer(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* Parent runs display */</text:span></text:p>
      <text:p text:style-name="P1"><text:span text:style-name="Source_20_Text"><text:s text:c="4"/>display_process();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✅ Compile on QNX</text:h>
      <text:p text:style-name="Text_20_body">Using QNX Momentics:</text:p>
      <text:p text:style-name="P2"><text:span text:style-name="Source_20_Text">qcc display_qnx.c -o display_qnx -pthread</text:span></text:p>
      <text:p text:style-name="Text_20_body">No <text:span text:style-name="Source_20_Text">-lrt</text:span> needed in QNX.</text:p>
      <text:p text:style-name="Horizontal_20_Line"/>
      <text:h text:style-name="Heading_20_1" text:outline-level="1">✅ Run</text:h>
      <text:p text:style-name="P2"><text:span text:style-name="Source_20_Text">./display_qnx</text:span></text:p>
      <text:p text:style-name="Text_20_body">Check shared memory:</text:p>
      <text:p text:style-name="P2"><text:span text:style-name="Source_20_Text">ls /dev/shmem</text:span></text:p>
      <text:p text:style-name="Text_20_body">You should see:</text:p>
      <text:p text:style-name="P1"><text:soft-page-break/><text:span text:style-name="Source_20_Text">display_shm</text:span></text:p>
      <text:p text:style-name="P2"><text:span text:style-name="Source_20_Text">display_sem</text:span></text:p>
      <text:p text:style-name="Horizontal_20_Line"/>
      <text:h text:style-name="Heading_20_1" text:outline-level="1">🎯 Why This Is Proper QNX Styl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Why Important in QNX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CHED_FIFO</text:span></text:p>
          </table:table-cell>
          <table:table-cell table:style-name="Table2.A1" office:value-type="string">
            <text:p text:style-name="Table_20_Contents">Deterministic real-time scheduling</text:p>
          </table:table-cell>
        </table:table-row>
        <table:table-row>
          <table:table-cell table:style-name="Table2.A1" office:value-type="string">
            <text:p text:style-name="Table_20_Contents"><text:span text:style-name="Source_20_Text">clock_nanosleep()</text:span></text:p>
          </table:table-cell>
          <table:table-cell table:style-name="Table2.A1" office:value-type="string">
            <text:p text:style-name="Table_20_Contents">No drift periodic execution</text:p>
          </table:table-cell>
        </table:table-row>
        <table:table-row>
          <table:table-cell table:style-name="Table2.A1" office:value-type="string">
            <text:p text:style-name="Table_20_Contents">Priority separation</text:p>
          </table:table-cell>
          <table:table-cell table:style-name="Table2.A1" office:value-type="string">
            <text:p text:style-name="Table_20_Contents">Avoid priority inversion</text:p>
          </table:table-cell>
        </table:table-row>
        <table:table-row>
          <table:table-cell table:style-name="Table2.A1" office:value-type="string">
            <text:p text:style-name="Table_20_Contents">Shared memory</text:p>
          </table:table-cell>
          <table:table-cell table:style-name="Table2.A1" office:value-type="string">
            <text:p text:style-name="Table_20_Contents">Fastest IPC in Neutrino</text:p>
          </table:table-cell>
        </table:table-row>
      </table:table>
      <text:p text:style-name="Horizontal_20_Line"/>
      <text:h text:style-name="Heading_20_1" text:outline-level="1">🔥 If You Want Advanced QNX Version</text:h>
      <text:p text:style-name="Text_20_body">We can upgrade this to:</text:p>
      <text:list xml:id="list829982451" text:style-name="L13">
        <text:list-item>
          <text:p text:style-name="P16">✔ QNX Native Message Passing (<text:span text:style-name="Source_20_Text">MsgSend/MsgReceive</text:span>)</text:p>
        </text:list-item>
        <text:list-item>
          <text:p text:style-name="P16">✔ Resource Manager based server</text:p>
        </text:list-item>
        <text:list-item>
          <text:p text:style-name="P16">✔ Pulse-based notification</text:p>
        </text:list-item>
        <text:list-item>
          <text:p text:style-name="P16">✔ Timer-based interrupt simulation</text:p>
        </text:list-item>
        <text:list-item>
          <text:p text:style-name="P16">✔ Python GUI client on Linux talking to QNX server</text:p>
        </text:list-item>
        <text:list-item>
          <text:p text:style-name="P16">✔ Priority Inversion Demonstration (since you're studying that)</text:p>
        </text:list-item>
      </text:list>
      <text:p text:style-name="Horizontal_20_Line"/>
      <text:p text:style-name="Text_20_body">Since you were earlier working on <text:span text:style-name="Strong_20_Emphasis">priority inversion detection in QNX</text:span>,<text:line-break/>I can next convert this project into:</text:p>
      <text:p text:style-name="Text_20_body">👉 A priority inversion demonstration using shared memory + mutex<text:line-break/>👉 Or convert it into a QNX resource manager server</text:p>
      <text:p text:style-name="Text_20_body">Tell me which direction you want 🚀</text:p>
      <text:p text:style-name="Text_20_body">A priority inversion demonstration using shared memory + mutex</text:p>
      <text:p text:style-name="Text_20_body">Excellent choice 🔥<text:line-break/>Since you're working with <text:span text:style-name="Strong_20_Emphasis">QNX Neutrino RTOS</text:span>, this is a <text:span text:style-name="Strong_20_Emphasis">very strong mini-project</text:span> for viva + internal evaluation.</text:p>
      <text:p text:style-name="Text_20_body">We will now build a:</text:p>
      <text:h text:style-name="Heading_20_1" text:outline-level="1">✅ Priority Inversion Demonstration</text:h>
      <text:p text:style-name="Text_20_body">Using:</text:p>
      <text:list xml:id="list339496156" text:style-name="L14">
        <text:list-item>
          <text:p text:style-name="P17">POSIX Shared Memory</text:p>
        </text:list-item>
        <text:list-item>
          <text:p text:style-name="P17"><text:soft-page-break/>POSIX Mutex (process-shared)</text:p>
        </text:list-item>
        <text:list-item>
          <text:p text:style-name="P17"><text:span text:style-name="Source_20_Text">SCHED_FIFO</text:span> priorities</text:p>
        </text:list-item>
        <text:list-item>
          <text:p text:style-name="P17">Three processes: <text:span text:style-name="Strong_20_Emphasis">Low, Medium, High</text:span></text:p>
        </text:list-item>
      </text:list>
      <text:p text:style-name="Horizontal_20_Line"/>
      <text:h text:style-name="Heading_20_1" text:outline-level="1">🎯 What is Priority Inversion?</text:h>
      <text:p text:style-name="Text_20_body">Classic scenario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rocess</text:p>
            </table:table-cell>
            <table:table-cell table:style-name="Table3.A1" office:value-type="string">
              <text:p text:style-name="Table_20_Heading">Priority</text:p>
            </table:table-cell>
            <table:table-cell table:style-name="Table3.A1" office:value-type="string">
              <text:p text:style-name="Table_20_Heading">Behavior</text:p>
            </table:table-cell>
          </table:table-row>
        </table:table-header-rows>
        <table:table-row>
          <table:table-cell table:style-name="Table3.A1" office:value-type="string">
            <text:p text:style-name="Table_20_Contents">High</text:p>
          </table:table-cell>
          <table:table-cell table:style-name="Table3.A1" office:value-type="string">
            <text:p text:style-name="Table_20_Contents">30</text:p>
          </table:table-cell>
          <table:table-cell table:style-name="Table3.A1" office:value-type="string">
            <text:p text:style-name="Table_20_Contents">Needs shared resource</text:p>
          </table:table-cell>
        </table:table-row>
        <table:table-row>
          <table:table-cell table:style-name="Table3.A1" office:value-type="string">
            <text:p text:style-name="Table_20_Contents">Medium</text:p>
          </table:table-cell>
          <table:table-cell table:style-name="Table3.A1" office:value-type="string">
            <text:p text:style-name="Table_20_Contents">20</text:p>
          </table:table-cell>
          <table:table-cell table:style-name="Table3.A1" office:value-type="string">
            <text:p text:style-name="Table_20_Contents">CPU intensive task</text:p>
          </table:table-cell>
        </table:table-row>
        <table:table-row>
          <table:table-cell table:style-name="Table3.A1" office:value-type="string">
            <text:p text:style-name="Table_20_Contents">Low</text:p>
          </table:table-cell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Locks shared resource</text:p>
          </table:table-cell>
        </table:table-row>
      </table:table>
      <text:h text:style-name="Heading_20_3" text:outline-level="3">🔴 Problem</text:h>
      <text:list xml:id="list3661732215" text:style-name="L15">
        <text:list-item>
          <text:p text:style-name="P18">Low locks mutex.</text:p>
        </text:list-item>
        <text:list-item>
          <text:p text:style-name="P18">High tries to lock → blocked.</text:p>
        </text:list-item>
        <text:list-item>
          <text:p text:style-name="P18">Medium runs (because higher than Low).</text:p>
        </text:list-item>
        <text:list-item>
          <text:p text:style-name="P18">Low cannot run → cannot release mutex.</text:p>
        </text:list-item>
        <text:list-item>
          <text:p text:style-name="P18">High waits indefinitely.</text:p>
        </text:list-item>
      </text:list>
      <text:p text:style-name="Text_20_body">👉 This is <text:span text:style-name="Strong_20_Emphasis">priority inversion</text:span>.</text:p>
      <text:p text:style-name="Horizontal_20_Line"/>
      <text:h text:style-name="Heading_20_1" text:outline-level="1">🧠 System Design</text:h>
      <text:p text:style-name="Text_20_body">We will:</text:p>
      <text:list xml:id="list2403627327" text:style-name="L16">
        <text:list-item>
          <text:p text:style-name="P19">Put a <text:span text:style-name="Strong_20_Emphasis">pthread mutex inside shared memory</text:span></text:p>
        </text:list-item>
        <text:list-item>
          <text:p text:style-name="P19">Make it <text:span text:style-name="Source_20_Text">PTHREAD_PROCESS_SHARED</text:span></text:p>
        </text:list-item>
        <text:list-item>
          <text:p text:style-name="P19">Disable priority inheritance (to show inversion first)</text:p>
        </text:list-item>
        <text:list-item>
          <text:p text:style-name="P19">Then enable <text:span text:style-name="Source_20_Text">PTHREAD_PRIO_INHERIT</text:span> to fix it</text:p>
        </text:list-item>
      </text:list>
      <text:p text:style-name="Horizontal_20_Line"/>
      <text:h text:style-name="Heading_20_1" text:outline-level="1">🏗️ Shared Memory Structure</text:h>
      <text:p text:style-name="P1"><text:span text:style-name="Source_20_Text">typedef struct {</text:span></text:p>
      <text:p text:style-name="P1"><text:span text:style-name="Source_20_Text"><text:s text:c="4"/>pthread_mutex_t mutex;</text:span></text:p>
      <text:p text:style-name="P1"><text:span text:style-name="Source_20_Text"><text:s text:c="4"/>int shared_value;</text:span></text:p>
      <text:p text:style-name="P2"><text:span text:style-name="Source_20_Text">} shared_data_t;</text:span></text:p>
      <text:p text:style-name="Horizontal_20_Line"/>
      <text:h text:style-name="Heading_20_1" text:outline-level="1"><text:soft-page-break/>🚀 Complete QNX Code</text:h>
      <text:p text:style-name="Text_20_body">File: <text:span text:style-name="Source_20_Text">priority_inversion_qnx.c</text:span></text:p>
      <text:p text:style-name="P1"><text:span text:style-name="Source_20_Text">/*</text:span></text:p>
      <text:p text:style-name="P1"><text:span text:style-name="Source_20_Text"><text:s/>* priority_inversion_qnx.c</text:span></text:p>
      <text:p text:style-name="P1"><text:span text:style-name="Source_20_Text"><text:s/>* Demonstrates Priority Inversion in QNX</text:span></text:p>
      <text:p text:style-name="P1"><text:span text:style-name="Source_20_Text"><text:s/>*/</text:span></text:p>
      <text:p text:style-name="P1"/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pan text:style-name="Source_20_Text">#include &lt;fcntl.h&gt;</text:span></text:p>
      <text:p text:style-name="P1"><text:span text:style-name="Source_20_Text">#include &lt;sys/mman.h&gt;</text:span></text:p>
      <text:p text:style-name="P1"><text:span text:style-name="Source_20_Text">#include &lt;sys/stat.h&gt;</text:span></text:p>
      <text:p text:style-name="P1"><text:span text:style-name="Source_20_Text">#include &lt;sched.h&gt;</text:span></text:p>
      <text:p text:style-name="P1"><text:span text:style-name="Source_20_Text">#include &lt;pthread.h&gt;</text:span></text:p>
      <text:p text:style-name="P1"><text:span text:style-name="Source_20_Text">#include &lt;string.h&gt;</text:span></text:p>
      <text:p text:style-name="P1"><text:span text:style-name="Source_20_Text">#include &lt;signal.h&gt;</text:span></text:p>
      <text:p text:style-name="P1"/>
      <text:p text:style-name="P1"><text:span text:style-name="Source_20_Text">#define SHM_NAME "/prio_inv_shm"</text:span></text:p>
      <text:p text:style-name="P1"/>
      <text:p text:style-name="P1"><text:span text:style-name="Source_20_Text">typedef struct {</text:span></text:p>
      <text:p text:style-name="P1"><text:span text:style-name="Source_20_Text"><text:s text:c="4"/>pthread_mutex_t mutex;</text:span></text:p>
      <text:p text:style-name="P1"><text:span text:style-name="Source_20_Text"><text:s text:c="4"/>int shared_value;</text:span></text:p>
      <text:p text:style-name="P1"><text:span text:style-name="Source_20_Text">} shared_data_t;</text:span></text:p>
      <text:p text:style-name="P1"/>
      <text:p text:style-name="P1"><text:span text:style-name="Source_20_Text">shared_data_t *data;</text:span></text:p>
      <text:p text:style-name="P1"/>
      <text:p text:style-name="P1"><text:span text:style-name="Source_20_Text">/* ================= Set Priority ================= */</text:span></text:p>
      <text:p text:style-name="P1"><text:span text:style-name="Source_20_Text">void set_priority(int prio)</text:span></text:p>
      <text:p text:style-name="P1"><text:span text:style-name="Source_20_Text">{</text:span></text:p>
      <text:p text:style-name="P1"><text:span text:style-name="Source_20_Text"><text:s text:c="4"/>struct sched_param param;</text:span></text:p>
      <text:p text:style-name="P1"><text:span text:style-name="Source_20_Text"><text:s text:c="4"/>param.sched_priority = prio;</text:span></text:p>
      <text:p text:style-name="P1"/>
      <text:p text:style-name="P1"><text:span text:style-name="Source_20_Text"><text:s text:c="4"/>if (sched_setscheduler(0, SCHED_FIFO, &amp;param) == -1) {</text:span></text:p>
      <text:p text:style-name="P1"><text:span text:style-name="Source_20_Text"><text:s text:c="8"/>perror("sched_setscheduler"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================= LOW Priority Task ================= */</text:span></text:p>
      <text:p text:style-name="P1"><text:span text:style-name="Source_20_Text">void low_task()</text:span></text:p>
      <text:p text:style-name="P1"><text:span text:style-name="Source_20_Text">{</text:span></text:p>
      <text:p text:style-name="P1"><text:span text:style-name="Source_20_Text"><text:s text:c="4"/>set_priority(10);</text:span></text:p>
      <text:p text:style-name="P1"/>
      <text:p text:style-name="P1"><text:span text:style-name="Source_20_Text"><text:s text:c="4"/>printf("LOW: Trying to lock mutex\n");</text:span></text:p>
      <text:p text:style-name="P1"><text:span text:style-name="Source_20_Text"><text:s text:c="4"/>pthread_mutex_lock(&amp;data-&gt;mutex);</text:span></text:p>
      <text:p text:style-name="P1"/>
      <text:p text:style-name="P1"><text:span text:style-name="Source_20_Text"><text:s text:c="4"/>printf("LOW: Mutex locked, working...\n");</text:span></text:p>
      <text:p text:style-name="P1"><text:span text:style-name="Source_20_Text"><text:s text:c="4"/>sleep(5); <text:s text:c="2"/>// Hold mutex for long time</text:span></text:p>
      <text:p text:style-name="P1"/>
      <text:p text:style-name="P1"><text:span text:style-name="Source_20_Text"><text:s text:c="4"/>data-&gt;shared_value = 100;</text:span></text:p>
      <text:p text:style-name="P1"/>
      <text:p text:style-name="P1"><text:span text:style-name="Source_20_Text"><text:s text:c="4"/>printf("LOW: Releasing mutex\n");</text:span></text:p>
      <text:p text:style-name="P1"><text:span text:style-name="Source_20_Text"><text:s text:c="4"/>pthread_mutex_unlock(&amp;data-&gt;mutex);</text:span></text:p>
      <text:p text:style-name="P1"/>
      <text:p text:style-name="P1"><text:span text:style-name="Source_20_Text"><text:s text:c="4"/>exit(0);</text:span></text:p>
      <text:p text:style-name="P1"><text:span text:style-name="Source_20_Text">}</text:span></text:p>
      <text:p text:style-name="P1"/>
      <text:p text:style-name="P1"><text:span text:style-name="Source_20_Text">/* ================= MEDIUM Priority Task ================= */</text:span></text:p>
      <text:p text:style-name="P1"><text:span text:style-name="Source_20_Text">void medium_task()</text:span></text:p>
      <text:p text:style-name="P1"><text:span text:style-name="Source_20_Text">{</text:span></text:p>
      <text:p text:style-name="P1"><text:span text:style-name="Source_20_Text"><text:s text:c="4"/>set_priority(20);</text:span></text:p>
      <text:p text:style-name="P1"><text:soft-page-break/></text:p>
      <text:p text:style-name="P1"><text:span text:style-name="Source_20_Text"><text:s text:c="4"/>printf("MEDIUM: CPU intensive task running...\n");</text:span></text:p>
      <text:p text:style-name="P1"/>
      <text:p text:style-name="P1"><text:span text:style-name="Source_20_Text"><text:s text:c="4"/>for (int i = 0; i &lt; 10; i++) {</text:span></text:p>
      <text:p text:style-name="P1"><text:span text:style-name="Source_20_Text"><text:s text:c="8"/>printf("MEDIUM: Working %d\n", i);</text:span></text:p>
      <text:p text:style-name="P1"><text:span text:style-name="Source_20_Text"><text:s text:c="8"/>sleep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exit(0);</text:span></text:p>
      <text:p text:style-name="P1"><text:span text:style-name="Source_20_Text">}</text:span></text:p>
      <text:p text:style-name="P1"/>
      <text:p text:style-name="P1"><text:span text:style-name="Source_20_Text">/* ================= HIGH Priority Task ================= */</text:span></text:p>
      <text:p text:style-name="P1"><text:span text:style-name="Source_20_Text">void high_task()</text:span></text:p>
      <text:p text:style-name="P1"><text:span text:style-name="Source_20_Text">{</text:span></text:p>
      <text:p text:style-name="P1"><text:span text:style-name="Source_20_Text"><text:s text:c="4"/>sleep(1); <text:s/>// Ensure LOW locks first</text:span></text:p>
      <text:p text:style-name="P1"/>
      <text:p text:style-name="P1"><text:span text:style-name="Source_20_Text"><text:s text:c="4"/>set_priority(30);</text:span></text:p>
      <text:p text:style-name="P1"/>
      <text:p text:style-name="P1"><text:span text:style-name="Source_20_Text"><text:s text:c="4"/>printf("HIGH: Trying to lock mutex\n");</text:span></text:p>
      <text:p text:style-name="P1"/>
      <text:p text:style-name="P1"><text:span text:style-name="Source_20_Text"><text:s text:c="4"/>pthread_mutex_lock(&amp;data-&gt;mutex);</text:span></text:p>
      <text:p text:style-name="P1"/>
      <text:p text:style-name="P1"><text:span text:style-name="Source_20_Text"><text:s text:c="4"/>printf("HIGH: Got mutex! shared_value=%d\n", data-&gt;shared_value);</text:span></text:p>
      <text:p text:style-name="P1"/>
      <text:p text:style-name="P1"><text:span text:style-name="Source_20_Text"><text:s text:c="4"/>pthread_mutex_unlock(&amp;data-&gt;mutex);</text:span></text:p>
      <text:p text:style-name="P1"/>
      <text:p text:style-name="P1"><text:span text:style-name="Source_20_Text"><text:s text:c="4"/>exit(0);</text:span></text:p>
      <text:p text:style-name="P1"><text:span text:style-name="Source_20_Text">}</text:span></text:p>
      <text:p text:style-name="P1"/>
      <text:p text:style-name="P1"><text:span text:style-name="Source_20_Text">/* ================= MAIN ================= */</text:span></text:p>
      <text:p text:style-name="P1"><text:span text:style-name="Source_20_Text">int main()</text:span></text:p>
      <text:p text:style-name="P1"><text:span text:style-name="Source_20_Text">{</text:span></text:p>
      <text:p text:style-name="P1"><text:span text:style-name="Source_20_Text"><text:s text:c="4"/>int shm_fd;</text:span></text:p>
      <text:p text:style-name="P1"/>
      <text:p text:style-name="P1"><text:span text:style-name="Source_20_Text"><text:s text:c="4"/>shm_fd = shm_open(SHM_NAME, O_CREAT | O_RDWR, 0666);</text:span></text:p>
      <text:p text:style-name="P1"><text:span text:style-name="Source_20_Text"><text:s text:c="4"/>ftruncate(shm_fd, sizeof(shared_data_t));</text:span></text:p>
      <text:p text:style-name="P1"/>
      <text:p text:style-name="P1"><text:span text:style-name="Source_20_Text"><text:s text:c="4"/>data = mmap(NULL, sizeof(shared_data_t),</text:span></text:p>
      <text:p text:style-name="P1"><text:span text:style-name="Source_20_Text"><text:s text:c="16"/>PROT_READ | PROT_WRITE,</text:span></text:p>
      <text:p text:style-name="P1"><text:span text:style-name="Source_20_Text"><text:s text:c="16"/>MAP_SHARED, shm_fd, 0);</text:span></text:p>
      <text:p text:style-name="P1"/>
      <text:p text:style-name="P1"><text:span text:style-name="Source_20_Text"><text:s text:c="4"/>/* Initialize mutex attributes */</text:span></text:p>
      <text:p text:style-name="P1"><text:span text:style-name="Source_20_Text"><text:s text:c="4"/>pthread_mutexattr_t attr;</text:span></text:p>
      <text:p text:style-name="P1"><text:span text:style-name="Source_20_Text"><text:s text:c="4"/>pthread_mutexattr_init(&amp;attr);</text:span></text:p>
      <text:p text:style-name="P1"/>
      <text:p text:style-name="P1"><text:span text:style-name="Source_20_Text"><text:s text:c="4"/>/* Process shared mutex */</text:span></text:p>
      <text:p text:style-name="P1"><text:span text:style-name="Source_20_Text"><text:s text:c="4"/>pthread_mutexattr_setpshared(&amp;attr, PTHREAD_PROCESS_SHARED);</text:span></text:p>
      <text:p text:style-name="P1"/>
      <text:p text:style-name="P1"><text:span text:style-name="Source_20_Text"><text:s text:c="4"/>/* ---- IMPORTANT ---- */</text:span></text:p>
      <text:p text:style-name="P1"><text:span text:style-name="Source_20_Text"><text:s text:c="4"/>/* Disable priority inheritance first */</text:span></text:p>
      <text:p text:style-name="P1"><text:span text:style-name="Source_20_Text"><text:s text:c="4"/>pthread_mutexattr_setprotocol(&amp;attr, PTHREAD_PRIO_NONE);</text:span></text:p>
      <text:p text:style-name="P1"/>
      <text:p text:style-name="P1"><text:span text:style-name="Source_20_Text"><text:s text:c="4"/>pthread_mutex_init(&amp;data-&gt;mutex, &amp;attr);</text:span></text:p>
      <text:p text:style-name="P1"/>
      <text:p text:style-name="P1"><text:span text:style-name="Source_20_Text"><text:s text:c="4"/>data-&gt;shared_value = 0;</text:span></text:p>
      <text:p text:style-name="P1"/>
      <text:p text:style-name="P1"><text:span text:style-name="Source_20_Text"><text:s text:c="4"/>pid_t pid;</text:span></text:p>
      <text:p text:style-name="P1"/>
      <text:p text:style-name="P1"><text:span text:style-name="Source_20_Text"><text:s text:c="4"/>/* LOW */</text:span></text:p>
      <text:p text:style-name="P1"><text:span text:style-name="Source_20_Text"><text:s text:c="4"/>pid = fork();</text:span></text:p>
      <text:p text:style-name="P1"><text:span text:style-name="Source_20_Text"><text:s text:c="4"/>if (pid == 0)</text:span></text:p>
      <text:p text:style-name="P1"><text:span text:style-name="Source_20_Text"><text:s text:c="8"/>low_task();</text:span></text:p>
      <text:p text:style-name="P1"/>
      <text:p text:style-name="P1"><text:span text:style-name="Source_20_Text"><text:s text:c="4"/>/* MEDIUM */</text:span></text:p>
      <text:p text:style-name="P1"><text:soft-page-break/><text:span text:style-name="Source_20_Text"><text:s text:c="4"/>pid = fork();</text:span></text:p>
      <text:p text:style-name="P1"><text:span text:style-name="Source_20_Text"><text:s text:c="4"/>if (pid == 0)</text:span></text:p>
      <text:p text:style-name="P1"><text:span text:style-name="Source_20_Text"><text:s text:c="8"/>medium_task();</text:span></text:p>
      <text:p text:style-name="P1"/>
      <text:p text:style-name="P1"><text:span text:style-name="Source_20_Text"><text:s text:c="4"/>/* HIGH */</text:span></text:p>
      <text:p text:style-name="P1"><text:span text:style-name="Source_20_Text"><text:s text:c="4"/>pid = fork();</text:span></text:p>
      <text:p text:style-name="P1"><text:span text:style-name="Source_20_Text"><text:s text:c="4"/>if (pid == 0)</text:span></text:p>
      <text:p text:style-name="P1"><text:span text:style-name="Source_20_Text"><text:s text:c="8"/>high_task();</text:span></text:p>
      <text:p text:style-name="P1"/>
      <text:p text:style-name="P1"><text:span text:style-name="Source_20_Text"><text:s text:c="4"/>wait(NULL);</text:span></text:p>
      <text:p text:style-name="P1"><text:span text:style-name="Source_20_Text"><text:s text:c="4"/>wait(NULL);</text:span></text:p>
      <text:p text:style-name="P1"><text:span text:style-name="Source_20_Text"><text:s text:c="4"/>wait(NULL);</text:span></text:p>
      <text:p text:style-name="P1"/>
      <text:p text:style-name="P1"><text:span text:style-name="Source_20_Text"><text:s text:c="4"/>shm_unlink(SHM_NAME);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✅ Compile on QNX</text:h>
      <text:p text:style-name="P2"><text:span text:style-name="Source_20_Text">qcc priority_inversion_qnx.c -o prio_inv -pthread</text:span></text:p>
      <text:p text:style-name="Horizontal_20_Line"/>
      <text:h text:style-name="Heading_20_1" text:outline-level="1">▶ Run</text:h>
      <text:p text:style-name="P2"><text:span text:style-name="Source_20_Text">./prio_inv</text:span></text:p>
      <text:p text:style-name="Horizontal_20_Line"/>
      <text:h text:style-name="Heading_20_1" text:outline-level="1">🧪 What You Will Observe (Without Priority Inheritance)</text:h>
      <text:p text:style-name="Text_20_body">Output order:</text:p>
      <text:p text:style-name="P1"><text:span text:style-name="Source_20_Text">LOW locks mutex</text:span></text:p>
      <text:p text:style-name="P1"><text:span text:style-name="Source_20_Text">HIGH tries to lock (blocked)</text:span></text:p>
      <text:p text:style-name="P1"><text:span text:style-name="Source_20_Text">MEDIUM runs continuously</text:span></text:p>
      <text:p text:style-name="P1"><text:span text:style-name="Source_20_Text">LOW does not get CPU</text:span></text:p>
      <text:p text:style-name="P2"><text:span text:style-name="Source_20_Text">HIGH waits longer than expected</text:span></text:p>
      <text:p text:style-name="Text_20_body">🔥 That delay is <text:span text:style-name="Strong_20_Emphasis">priority inversion</text:span></text:p>
      <text:p text:style-name="Horizontal_20_Line"/>
      <text:h text:style-name="Heading_20_1" text:outline-level="1">🛠️ Fix Using Priority Inheritance</text:h>
      <text:p text:style-name="Text_20_body">Change this line:</text:p>
      <text:p text:style-name="P2"><text:span text:style-name="Source_20_Text">pthread_mutexattr_setprotocol(&amp;attr, PTHREAD_PRIO_NONE);</text:span></text:p>
      <text:p text:style-name="Text_20_body"><text:soft-page-break/>To:</text:p>
      <text:p text:style-name="P2"><text:span text:style-name="Source_20_Text">pthread_mutexattr_setprotocol(&amp;attr, PTHREAD_PRIO_INHERIT);</text:span></text:p>
      <text:p text:style-name="Horizontal_20_Line"/>
      <text:h text:style-name="Heading_20_1" text:outline-level="1">✅ What Happens Now?</text:h>
      <text:p text:style-name="Text_20_body">When:</text:p>
      <text:list xml:id="list2790572640" text:style-name="L17">
        <text:list-item>
          <text:p text:style-name="P20">HIGH blocks on mutex</text:p>
        </text:list-item>
        <text:list-item>
          <text:p text:style-name="P20">LOW automatically inherits HIGH priority (30)</text:p>
        </text:list-item>
        <text:list-item>
          <text:p text:style-name="P20">LOW runs immediately</text:p>
        </text:list-item>
        <text:list-item>
          <text:p text:style-name="P20">Releases mutex quickly</text:p>
        </text:list-item>
        <text:list-item>
          <text:p text:style-name="P20">HIGH proceeds</text:p>
        </text:list-item>
      </text:list>
      <text:p text:style-name="Text_20_body">🚀 Priority inversion solved.</text:p>
      <text:p text:style-name="Horizontal_20_Line"/>
      <text:h text:style-name="Heading_20_1" text:outline-level="1">📊 Viva Explanation Flow</text:h>
      <text:p text:style-name="Text_20_body">Explain:</text:p>
      <text:list xml:id="list3195174104" text:style-name="L18">
        <text:list-item>
          <text:p text:style-name="P21">What is priority inversion?</text:p>
        </text:list-item>
        <text:list-item>
          <text:p text:style-name="P21">Why does medium cause problem?</text:p>
        </text:list-item>
        <text:list-item>
          <text:p text:style-name="P21">What is priority inheritance?</text:p>
        </text:list-item>
        <text:list-item>
          <text:p text:style-name="P21">Difference between:</text:p>
          <text:list>
            <text:list-item>
              <text:p text:style-name="P21"><text:span text:style-name="Source_20_Text">PTHREAD_PRIO_NONE</text:span></text:p>
            </text:list-item>
            <text:list-item>
              <text:p text:style-name="P21"><text:span text:style-name="Source_20_Text">PTHREAD_PRIO_INHERIT</text:span></text:p>
            </text:list-item>
            <text:list-item>
              <text:p text:style-name="P21"><text:span text:style-name="Source_20_Text">PTHREAD_PRIO_PROTECT</text:span></text:p>
            </text:list-item>
          </text:list>
        </text:list-item>
        <text:list-item>
          <text:p text:style-name="P21">Why QNX supports this natively?</text:p>
        </text:list-item>
        <text:list-item>
          <text:p text:style-name="P21">Where is this used? (Mars Rover case)</text:p>
        </text:list-item>
      </text:list>
      <text:p text:style-name="Horizontal_20_Line"/>
      <text:h text:style-name="Heading_20_1" text:outline-level="1">🛰️ Real-World Example</text:h>
      <text:p text:style-name="Text_20_body">The famous <text:span text:style-name="Strong_20_Emphasis">Mars Pathfinder bug</text:span> was caused by priority inversion and fixed by enabling priority inheritance.</text:p>
      <text:p text:style-name="Horizontal_20_Line"/>
      <text:h text:style-name="Heading_20_1" text:outline-level="1"><text:soft-page-break/>🔥 If You Want Advanced Version</text:h>
      <text:p text:style-name="Text_20_body">We can upgrade this to:</text:p>
      <text:list xml:id="list1797778282" text:style-name="L19">
        <text:list-item>
          <text:p text:style-name="P22">✔ Measure actual wait time using timestamps</text:p>
        </text:list-item>
        <text:list-item>
          <text:p text:style-name="P22">✔ Add logging to file</text:p>
        </text:list-item>
        <text:list-item>
          <text:p text:style-name="P22">✔ Add Python UI monitor</text:p>
        </text:list-item>
        <text:list-item>
          <text:p text:style-name="P22">✔ Convert to QNX native message passing</text:p>
        </text:list-item>
        <text:list-item>
          <text:p text:style-name="P22">✔ Implement Priority Ceiling Protocol demo</text:p>
        </text:list-item>
        <text:list-item>
          <text:p text:style-name="P22">✔ Convert into server-client architecture</text:p>
        </text:list-item>
      </text:list>
      <text:p text:style-name="Horizontal_20_Line"/>
      <text:p text:style-name="Text_20_body">Since you're working on <text:span text:style-name="Strong_20_Emphasis">QNX + priority inversion detection project</text:span>,<text:line-break/>I can now build:</text:p>
      <text:p text:style-name="Text_20_body">👉 A full mini-project architecture with logging + UI wrapper<text:line-break/>👉 Or a comparison table: Shared Memory vs QNX Message Passing for inversion</text:p>
      <text:p text:style-name="Text_20_body">Tell me which one you want next 🚀</text:p>
      <text:p text:style-name="Text_20_body">A full mini-project architecture with logging + UI wrapper</text:p>
      <text:p text:style-name="Text_20_body">Excellent 🔥<text:line-break/>Now we’ll design a <text:span text:style-name="Strong_20_Emphasis">Complete Mini-Project Architecture</text:span> for:</text:p>
      <text:h text:style-name="Heading_20_1" text:outline-level="1">✅ Priority Inversion Detection &amp; Visualization System (QNX)</text:h>
      <text:p text:style-name="Text_20_body">This will look like a <text:span text:style-name="Strong_20_Emphasis">real embedded RTOS project</text:span>, not just a demo program.</text:p>
      <text:p text:style-name="Horizontal_20_Line"/>
      <text:h text:style-name="Heading_20_1" text:outline-level="1">🎯 Project Goal</text:h>
      <text:p text:style-name="Text_20_body">Build a QNX-based system that:</text:p>
      <text:list xml:id="list2280609521" text:style-name="L20">
        <text:list-item>
          <text:p text:style-name="P23">Demonstrates Priority Inversion</text:p>
        </text:list-item>
        <text:list-item>
          <text:p text:style-name="P23">Detects blocking time</text:p>
        </text:list-item>
        <text:list-item>
          <text:p text:style-name="P23">Logs events</text:p>
        </text:list-item>
        <text:list-item>
          <text:p text:style-name="P23">Sends data to a Python UI</text:p>
        </text:list-item>
        <text:list-item>
          <text:p text:style-name="P23">Allows toggling Priority Inheritance ON/OFF</text:p>
        </text:list-item>
      </text:list>
      <text:p text:style-name="Horizontal_20_Line"/>
      <text:h text:style-name="Heading_20_1" text:outline-level="1"><text:soft-page-break/>🧠 High-Level Architecture</text:h>
      <text:p text:style-name="P1"><text:span text:style-name="Source_20_Text"><text:s text:c="17"/>┌─────────────────────────┐</text:span></text:p>
      <text:p text:style-name="P1"><text:span text:style-name="Source_20_Text"><text:s text:c="17"/>│ <text:s text:c="5"/>Python UI <text:s text:c="9"/>│</text:span></text:p>
      <text:p text:style-name="P1"><text:span text:style-name="Source_20_Text"><text:s text:c="17"/>│ <text:s/>(Linux / Host PC) <text:s text:c="5"/>│</text:span></text:p>
      <text:p text:style-name="P1"><text:span text:style-name="Source_20_Text"><text:s text:c="17"/>│ <text:s/>- Live Graph <text:s text:c="10"/>│</text:span></text:p>
      <text:p text:style-name="P1"><text:span text:style-name="Source_20_Text"><text:s text:c="17"/>│ <text:s/>- Event Log Viewer <text:s text:c="4"/>│</text:span></text:p>
      <text:p text:style-name="P1"><text:span text:style-name="Source_20_Text"><text:s text:c="17"/>│ <text:s/>- Toggle PI <text:s text:c="11"/>│</text:span></text:p>
      <text:p text:style-name="P1"><text:span text:style-name="Source_20_Text"><text:s text:c="17"/>└────────────┬────────────┘</text:span></text:p>
      <text:p text:style-name="P1"><text:span text:style-name="Source_20_Text"><text:s text:c="30"/>│ TCP Socket</text:span></text:p>
      <text:p text:style-name="P1"><text:span text:style-name="Source_20_Text"><text:s text:c="30"/>▼</text:span></text:p>
      <text:p text:style-name="P1"><text:span text:style-name="Source_20_Text">┌────────────────────────────────────────────────┐</text:span></text:p>
      <text:p text:style-name="P1"><text:span text:style-name="Source_20_Text">│ <text:s text:c="13"/>QNX Target System <text:s text:c="15"/>│</text:span></text:p>
      <text:p text:style-name="P1"><text:span text:style-name="Source_20_Text">│ <text:s text:c="47"/>│</text:span></text:p>
      <text:p text:style-name="P1"><text:span text:style-name="Source_20_Text">│ <text:s/>┌──────────────────────────────────────────┐ <text:s/>│</text:span></text:p>
      <text:p text:style-name="P1"><text:span text:style-name="Source_20_Text">│ <text:s/>│ Priority Inversion Server <text:s text:c="14"/>│ <text:s/>│</text:span></text:p>
      <text:p text:style-name="P1"><text:span text:style-name="Source_20_Text">│ <text:s/>│------------------------------------------│ <text:s/>│</text:span></text:p>
      <text:p text:style-name="P1"><text:span text:style-name="Source_20_Text">│ <text:s/>│ Shared Memory + Mutex <text:s text:c="18"/>│ <text:s/>│</text:span></text:p>
      <text:p text:style-name="P1"><text:span text:style-name="Source_20_Text">│ <text:s/>│ Logging Engine <text:s text:c="25"/>│ <text:s/>│</text:span></text:p>
      <text:p text:style-name="P1"><text:span text:style-name="Source_20_Text">│ <text:s/>│ Wait Time Measurement <text:s text:c="18"/>│ <text:s/>│</text:span></text:p>
      <text:p text:style-name="P1"><text:span text:style-name="Source_20_Text">│ <text:s/>│ Socket Communication Thread <text:s text:c="12"/>│ <text:s/>│</text:span></text:p>
      <text:p text:style-name="P1"><text:span text:style-name="Source_20_Text">│ <text:s/>└──────────────────────────────────────────┘ <text:s/>│</text:span></text:p>
      <text:p text:style-name="P1"><text:span text:style-name="Source_20_Text">│ <text:s text:c="7"/>│ <text:s text:c="11"/>│ <text:s text:c="12"/>│ <text:s text:c="11"/>│</text:span></text:p>
      <text:p text:style-name="P1"><text:span text:style-name="Source_20_Text">│ <text:s text:c="7"/>▼ <text:s text:c="11"/>▼ <text:s text:c="12"/>▼ <text:s text:c="11"/>│</text:span></text:p>
      <text:p text:style-name="P1"><text:span text:style-name="Source_20_Text">│ <text:s text:c="5"/>LOW <text:s text:c="9"/>MEDIUM <text:s text:c="8"/>HIGH <text:s text:c="9"/>│</text:span></text:p>
      <text:p text:style-name="P1"><text:span text:style-name="Source_20_Text">│ <text:s text:c="2"/>Priority 10 <text:s text:c="2"/>Priority 20 <text:s text:c="2"/>Priority 30 <text:s text:c="4"/>│</text:span></text:p>
      <text:p text:style-name="P2"><text:span text:style-name="Source_20_Text">└────────────────────────────────────────────────┘</text:span></text:p>
      <text:p text:style-name="Horizontal_20_Line"/>
      <text:h text:style-name="Heading_20_1" text:outline-level="1">🧩 Components</text:h>
      <text:p text:style-name="Horizontal_20_Line"/>
      <text:h text:style-name="Heading_20_2" text:outline-level="2">1️⃣ QNX Core Server (Main Application)</text:h>
      <text:p text:style-name="Text_20_body">This single program:</text:p>
      <text:list xml:id="list533572401" text:style-name="L21">
        <text:list-item>
          <text:p text:style-name="P24">Creates shared memory</text:p>
        </text:list-item>
        <text:list-item>
          <text:p text:style-name="P24">Initializes mutex (PI ON/OFF configurable)</text:p>
        </text:list-item>
        <text:list-item>
          <text:p text:style-name="P24">Forks Low, Medium, High processes</text:p>
        </text:list-item>
        <text:list-item>
          <text:p text:style-name="P24">Measures wait times</text:p>
        </text:list-item>
        <text:list-item>
          <text:p text:style-name="P24">Logs events</text:p>
        </text:list-item>
        <text:list-item>
          <text:p text:style-name="P24">Opens TCP socket to Python UI</text:p>
        </text:list-item>
      </text:list>
      <text:p text:style-name="Horizontal_20_Line"/>
      <text:h text:style-name="Heading_20_2" text:outline-level="2">2️⃣ Logging System</text:h>
      <text:p text:style-name="Text_20_body">Each important event logs:</text:p>
      <text:p text:style-name="P2"><text:span text:style-name="Source_20_Text">[TIMESTAMP] [PROCESS] [EVENT] [WAIT_TIME]</text:span></text:p>
      <text:p text:style-name="Text_20_body"><text:soft-page-break/>Example:</text:p>
      <text:p text:style-name="P1"><text:span text:style-name="Source_20_Text">12:01:10 LOW LOCK_ACQUIRED</text:span></text:p>
      <text:p text:style-name="P1"><text:span text:style-name="Source_20_Text">12:01:11 HIGH BLOCKED</text:span></text:p>
      <text:p text:style-name="P2"><text:span text:style-name="Source_20_Text">12:01:17 HIGH ACQUIRED WAIT=6000ms</text:span></text:p>
      <text:p text:style-name="Text_20_body">Log file:</text:p>
      <text:p text:style-name="P2"><text:span text:style-name="Source_20_Text">/tmp/prio_inv_log.txt</text:span></text:p>
      <text:p text:style-name="Horizontal_20_Line"/>
      <text:h text:style-name="Heading_20_2" text:outline-level="2">3️⃣ Wait Time Detection</text:h>
      <text:p text:style-name="Text_20_body">We measure inversion time:</text:p>
      <text:p text:style-name="P1"><text:span text:style-name="Source_20_Text">clock_gettime(CLOCK_MONOTONIC, &amp;start);</text:span></text:p>
      <text:p text:style-name="P1"><text:span text:style-name="Source_20_Text">pthread_mutex_lock(...);</text:span></text:p>
      <text:p text:style-name="P2"><text:span text:style-name="Source_20_Text">clock_gettime(CLOCK_MONOTONIC, &amp;end);</text:span></text:p>
      <text:p text:style-name="Text_20_body">Wait time = end - start</text:p>
      <text:p text:style-name="Text_20_body">If wait_time &gt; threshold → log inversion detected.</text:p>
      <text:p text:style-name="Horizontal_20_Line"/>
      <text:h text:style-name="Heading_20_2" text:outline-level="2">4️⃣ Python UI Wrapper</text:h>
      <text:p text:style-name="Text_20_body">Python UI will:</text:p>
      <text:list xml:id="list3904036467" text:style-name="L22">
        <text:list-item>
          <text:p text:style-name="P25">Connect via TCP socket</text:p>
        </text:list-item>
        <text:list-item>
          <text:p text:style-name="P25">Display:</text:p>
          <text:list>
            <text:list-item>
              <text:p text:style-name="P25">Wait time graph</text:p>
            </text:list-item>
            <text:list-item>
              <text:p text:style-name="P25">Current lock owner</text:p>
            </text:list-item>
            <text:list-item>
              <text:p text:style-name="P25">PI mode ON/OFF</text:p>
            </text:list-item>
          </text:list>
        </text:list-item>
        <text:list-item>
          <text:p text:style-name="P25">Button to toggle priority inheritance</text:p>
        </text:list-item>
      </text:list>
      <text:p text:style-name="Text_20_body">We use:</text:p>
      <text:p text:style-name="P1"><text:span text:style-name="Source_20_Text">socket</text:span></text:p>
      <text:p text:style-name="P1"><text:span text:style-name="Source_20_Text">tkinter</text:span></text:p>
      <text:p text:style-name="P2"><text:span text:style-name="Source_20_Text">matplotlib</text:span></text:p>
      <text:p text:style-name="Horizontal_20_Line"/>
      <text:h text:style-name="Heading_20_1" text:outline-level="1">🏗️ QNX Server Architecture (Modular)</text:h>
      <text:h text:style-name="Heading_20_3" text:outline-level="3">Modules: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Module</text:p>
            </table:table-cell>
            <table:table-cell table:style-name="Table4.A1" office:value-type="string">
              <text:p text:style-name="Table_20_Heading">Responsibility</text:p>
            </table:table-cell>
          </table:table-row>
        </table:table-header-rows>
        <table:table-row>
          <table:table-cell table:style-name="Table4.A1" office:value-type="string">
            <text:p text:style-name="Table_20_Contents">shm_manager.c</text:p>
          </table:table-cell>
          <table:table-cell table:style-name="Table4.A1" office:value-type="string">
            <text:p text:style-name="Table_20_Contents">Shared memory setup</text:p>
          </table:table-cell>
        </table:table-row>
        <text:soft-page-break/>
        <table:table-row>
          <table:table-cell table:style-name="Table4.A1" office:value-type="string">
            <text:p text:style-name="Table_20_Contents">mutex_manager.c</text:p>
          </table:table-cell>
          <table:table-cell table:style-name="Table4.A1" office:value-type="string">
            <text:p text:style-name="Table_20_Contents">Mutex attributes</text:p>
          </table:table-cell>
        </table:table-row>
        <table:table-row>
          <table:table-cell table:style-name="Table4.A1" office:value-type="string">
            <text:p text:style-name="Table_20_Contents">scheduler.c</text:p>
          </table:table-cell>
          <table:table-cell table:style-name="Table4.A1" office:value-type="string">
            <text:p text:style-name="Table_20_Contents">Set SCHED_FIFO priorities</text:p>
          </table:table-cell>
        </table:table-row>
        <table:table-row>
          <table:table-cell table:style-name="Table4.A1" office:value-type="string">
            <text:p text:style-name="Table_20_Contents">logger.c</text:p>
          </table:table-cell>
          <table:table-cell table:style-name="Table4.A1" office:value-type="string">
            <text:p text:style-name="Table_20_Contents">File logging</text:p>
          </table:table-cell>
        </table:table-row>
        <table:table-row>
          <table:table-cell table:style-name="Table4.A1" office:value-type="string">
            <text:p text:style-name="Table_20_Contents">socket_server.c</text:p>
          </table:table-cell>
          <table:table-cell table:style-name="Table4.A1" office:value-type="string">
            <text:p text:style-name="Table_20_Contents">TCP communication</text:p>
          </table:table-cell>
        </table:table-row>
        <table:table-row>
          <table:table-cell table:style-name="Table4.A1" office:value-type="string">
            <text:p text:style-name="Table_20_Contents">main.c</text:p>
          </table:table-cell>
          <table:table-cell table:style-name="Table4.A1" office:value-type="string">
            <text:p text:style-name="Table_20_Contents">Orchestrator</text:p>
          </table:table-cell>
        </table:table-row>
      </table:table>
      <text:p text:style-name="Horizontal_20_Line"/>
      <text:h text:style-name="Heading_20_1" text:outline-level="1">🚀 Execution Flow</text:h>
      <text:h text:style-name="Heading_20_3" text:outline-level="3">Phase 1 – Start System</text:h>
      <text:list xml:id="list2449159614" text:style-name="L23">
        <text:list-item>
          <text:p text:style-name="P26">Initialize shared memory</text:p>
        </text:list-item>
        <text:list-item>
          <text:p text:style-name="P26">Configure mutex protocol:</text:p>
          <text:list>
            <text:list-item>
              <text:p text:style-name="P26">NONE</text:p>
            </text:list-item>
            <text:list-item>
              <text:p text:style-name="P26">PRIO_INHERIT</text:p>
            </text:list-item>
          </text:list>
        </text:list-item>
        <text:list-item>
          <text:p text:style-name="P26">Start socket server</text:p>
        </text:list-item>
        <text:list-item>
          <text:p text:style-name="P26">Fork LOW, MEDIUM, HIGH</text:p>
        </text:list-item>
      </text:list>
      <text:p text:style-name="Horizontal_20_Line"/>
      <text:h text:style-name="Heading_20_3" text:outline-level="3">Phase 2 – Runtime Behavior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Event</text:p>
            </table:table-cell>
            <table:table-cell table:style-name="Table5.A1" office:value-type="string">
              <text:p text:style-name="Table_20_Heading">Action</text:p>
            </table:table-cell>
          </table:table-row>
        </table:table-header-rows>
        <table:table-row>
          <table:table-cell table:style-name="Table5.A1" office:value-type="string">
            <text:p text:style-name="Table_20_Contents">LOW locks</text:p>
          </table:table-cell>
          <table:table-cell table:style-name="Table5.A1" office:value-type="string">
            <text:p text:style-name="Table_20_Contents">Log event</text:p>
          </table:table-cell>
        </table:table-row>
        <table:table-row>
          <table:table-cell table:style-name="Table5.A1" office:value-type="string">
            <text:p text:style-name="Table_20_Contents">HIGH blocks</text:p>
          </table:table-cell>
          <table:table-cell table:style-name="Table5.A1" office:value-type="string">
            <text:p text:style-name="Table_20_Contents">Start wait timer</text:p>
          </table:table-cell>
        </table:table-row>
        <table:table-row>
          <table:table-cell table:style-name="Table5.A1" office:value-type="string">
            <text:p text:style-name="Table_20_Contents">HIGH acquires</text:p>
          </table:table-cell>
          <table:table-cell table:style-name="Table5.A1" office:value-type="string">
            <text:p text:style-name="Table_20_Contents">Calculate wait</text:p>
          </table:table-cell>
        </table:table-row>
        <table:table-row>
          <table:table-cell table:style-name="Table5.A1" office:value-type="string">
            <text:p text:style-name="Table_20_Contents">Wait &gt; threshold</text:p>
          </table:table-cell>
          <table:table-cell table:style-name="Table5.A1" office:value-type="string">
            <text:p text:style-name="Table_20_Contents">Raise inversion flag</text:p>
          </table:table-cell>
        </table:table-row>
        <table:table-row>
          <table:table-cell table:style-name="Table5.A1" office:value-type="string">
            <text:p text:style-name="Table_20_Contents">Send data to UI</text:p>
          </table:table-cell>
          <table:table-cell table:style-name="Table5.A1" office:value-type="string">
            <text:p text:style-name="Table_20_Contents">Over socket</text:p>
          </table:table-cell>
        </table:table-row>
      </table:table>
      <text:p text:style-name="Horizontal_20_Line"/>
      <text:h text:style-name="Heading_20_1" text:outline-level="1">📊 Data Sent to Python</text:h>
      <text:p text:style-name="Text_20_body">JSON format:</text:p>
      <text:p text:style-name="P1"><text:span text:style-name="Source_20_Text">{</text:span></text:p>
      <text:p text:style-name="P1"><text:span text:style-name="Source_20_Text"><text:s text:c="2"/>"event": "HIGH_ACQUIRED",</text:span></text:p>
      <text:p text:style-name="P1"><text:span text:style-name="Source_20_Text"><text:s text:c="2"/>"wait_time_ms": 6023,</text:span></text:p>
      <text:p text:style-name="P1"><text:span text:style-name="Source_20_Text"><text:s text:c="2"/>"pi_mode": "OFF"</text:span></text:p>
      <text:p text:style-name="P2"><text:span text:style-name="Source_20_Text">}</text:span></text:p>
      <text:p text:style-name="Horizontal_20_Line"/>
      <text:h text:style-name="Heading_20_1" text:outline-level="1"><text:soft-page-break/>🖥️ Python UI Structure</text:h>
      <text:h text:style-name="Heading_20_3" text:outline-level="3">UI Layout</text:h>
      <text:p text:style-name="P1"><text:span text:style-name="Source_20_Text">-------------------------------------</text:span></text:p>
      <text:p text:style-name="P1"><text:span text:style-name="Source_20_Text"><text:s/>Priority Inversion Monitor</text:span></text:p>
      <text:p text:style-name="P1"><text:span text:style-name="Source_20_Text">-------------------------------------</text:span></text:p>
      <text:p text:style-name="P1"><text:span text:style-name="Source_20_Text"><text:s/>PI Mode: [ ON / OFF ]</text:span></text:p>
      <text:p text:style-name="P1"/>
      <text:p text:style-name="P1"><text:span text:style-name="Source_20_Text"><text:s/>Current Wait Time: 6023 ms</text:span></text:p>
      <text:p text:style-name="P1"/>
      <text:p text:style-name="P1"><text:span text:style-name="Source_20_Text"><text:s/>Graph:</text:span></text:p>
      <text:p text:style-name="P1"><text:span text:style-name="Source_20_Text"><text:s/>|----------------------------------|</text:span></text:p>
      <text:p text:style-name="P1"><text:span text:style-name="Source_20_Text"><text:s/>| <text:s text:c="33"/>|</text:span></text:p>
      <text:p text:style-name="P1"><text:span text:style-name="Source_20_Text"><text:s/>| <text:s text:c="4"/>* <text:s text:c="5"/>* <text:s text:c="5"/>* <text:s text:c="13"/>|</text:span></text:p>
      <text:p text:style-name="P1"><text:span text:style-name="Source_20_Text"><text:s/>|----------------------------------|</text:span></text:p>
      <text:p text:style-name="P1"/>
      <text:p text:style-name="P1"><text:span text:style-name="Source_20_Text"><text:s/>Log Window:</text:span></text:p>
      <text:p text:style-name="P1"><text:span text:style-name="Source_20_Text"><text:s/>----------------------------------</text:span></text:p>
      <text:p text:style-name="P1"><text:span text:style-name="Source_20_Text"><text:s/>12:01:10 LOW LOCK</text:span></text:p>
      <text:p text:style-name="P1"><text:span text:style-name="Source_20_Text"><text:s/>12:01:17 HIGH ACQUIRED</text:span></text:p>
      <text:p text:style-name="P2"><text:span text:style-name="Source_20_Text"><text:s/>----------------------------------</text:span></text:p>
      <text:p text:style-name="Horizontal_20_Line"/>
      <text:h text:style-name="Heading_20_1" text:outline-level="1">📁 Suggested Project Folder</text:h>
      <text:p text:style-name="P1"><text:span text:style-name="Source_20_Text">prio_inv_project/</text:span></text:p>
      <text:p text:style-name="P1"><text:span text:style-name="Source_20_Text">│</text:span></text:p>
      <text:p text:style-name="P1"><text:span text:style-name="Source_20_Text">├── qnx_server/</text:span></text:p>
      <text:p text:style-name="P1"><text:span text:style-name="Source_20_Text">│ <text:s text:c="2"/>├── main.c</text:span></text:p>
      <text:p text:style-name="P1"><text:span text:style-name="Source_20_Text">│ <text:s text:c="2"/>├── logger.c</text:span></text:p>
      <text:p text:style-name="P1"><text:span text:style-name="Source_20_Text">│ <text:s text:c="2"/>├── socket_server.c</text:span></text:p>
      <text:p text:style-name="P1"><text:span text:style-name="Source_20_Text">│ <text:s text:c="2"/>├── scheduler.c</text:span></text:p>
      <text:p text:style-name="P1"><text:span text:style-name="Source_20_Text">│ <text:s text:c="2"/>└── Makefile</text:span></text:p>
      <text:p text:style-name="P1"><text:span text:style-name="Source_20_Text">│</text:span></text:p>
      <text:p text:style-name="P1"><text:span text:style-name="Source_20_Text">├── python_ui/</text:span></text:p>
      <text:p text:style-name="P1"><text:span text:style-name="Source_20_Text">│ <text:s text:c="2"/>├── monitor.py</text:span></text:p>
      <text:p text:style-name="P1"><text:span text:style-name="Source_20_Text">│ <text:s text:c="2"/>└── requirements.txt</text:span></text:p>
      <text:p text:style-name="P1"><text:span text:style-name="Source_20_Text">│</text:span></text:p>
      <text:p text:style-name="P1"><text:span text:style-name="Source_20_Text">└── report/</text:span></text:p>
      <text:p text:style-name="P1"><text:span text:style-name="Source_20_Text"><text:s text:c="4"/>├── architecture_diagram.png</text:span></text:p>
      <text:p text:style-name="P2"><text:span text:style-name="Source_20_Text"><text:s text:c="4"/>├── results_analysis.docx</text:span></text:p>
      <text:p text:style-name="Horizontal_20_Line"/>
      <text:h text:style-name="Heading_20_1" text:outline-level="1">🎯 Demonstration Scenarios</text:h>
      <text:h text:style-name="Heading_20_3" text:outline-level="3">Scenario 1 – PI OFF</text:h>
      <text:list xml:id="list1665675070" text:style-name="L24">
        <text:list-item>
          <text:p text:style-name="P27">High waits long</text:p>
        </text:list-item>
        <text:list-item>
          <text:p text:style-name="P27">Graph spikes</text:p>
        </text:list-item>
        <text:list-item>
          <text:p text:style-name="P27">Log shows inversion detected</text:p>
        </text:list-item>
      </text:list>
      <text:h text:style-name="Heading_20_3" text:outline-level="3"><text:soft-page-break/>Scenario 2 – PI ON</text:h>
      <text:list xml:id="list3395072278" text:style-name="L25">
        <text:list-item>
          <text:p text:style-name="P28">Low inherits high priority</text:p>
        </text:list-item>
        <text:list-item>
          <text:p text:style-name="P28">Wait time minimal</text:p>
        </text:list-item>
        <text:list-item>
          <text:p text:style-name="P28">Graph flat</text:p>
        </text:list-item>
      </text:list>
      <text:p text:style-name="Horizontal_20_Line"/>
      <text:h text:style-name="Heading_20_1" text:outline-level="1">📈 Metrics to Show in Report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Mode</text:p>
            </table:table-cell>
            <table:table-cell table:style-name="Table6.A1" office:value-type="string">
              <text:p text:style-name="Table_20_Heading">Avg Wait Time</text:p>
            </table:table-cell>
          </table:table-row>
        </table:table-header-rows>
        <table:table-row>
          <table:table-cell table:style-name="Table6.A1" office:value-type="string">
            <text:p text:style-name="Table_20_Contents">PI OFF</text:p>
          </table:table-cell>
          <table:table-cell table:style-name="Table6.A1" office:value-type="string">
            <text:p text:style-name="Table_20_Contents">5000–7000 ms</text:p>
          </table:table-cell>
        </table:table-row>
        <table:table-row>
          <table:table-cell table:style-name="Table6.A1" office:value-type="string">
            <text:p text:style-name="Table_20_Contents">PI ON</text:p>
          </table:table-cell>
          <table:table-cell table:style-name="Table6.A1" office:value-type="string">
            <text:p text:style-name="Table_20_Contents">&lt; 100 ms</text:p>
          </table:table-cell>
        </table:table-row>
      </table:table>
      <text:p text:style-name="Horizontal_20_Line"/>
      <text:h text:style-name="Heading_20_1" text:outline-level="1">🔥 Extra Features (For High Grades)</text:h>
      <text:p text:style-name="Text_20_body">✔ Add watchdog process<text:line-break/>✔ Add pulse-based notification (QNX native)<text:line-break/>✔ Convert to Resource Manager<text:line-break/>✔ Store results in CSV<text:line-break/>✔ Export graph automatically<text:line-break/>✔ Add priority ceiling demo</text:p>
      <text:p text:style-name="Horizontal_20_Line"/>
      <text:h text:style-name="Heading_20_1" text:outline-level="1">🧪 Viva Questions You Can Answer</text:h>
      <text:list xml:id="list3513371678" text:style-name="L26">
        <text:list-item>
          <text:p text:style-name="P29">What caused inversion?</text:p>
        </text:list-item>
        <text:list-item>
          <text:p text:style-name="P29">Why medium task interfered?</text:p>
        </text:list-item>
        <text:list-item>
          <text:p text:style-name="P29">What is priority inheritance?</text:p>
        </text:list-item>
        <text:list-item>
          <text:p text:style-name="P29">What is priority ceiling protocol?</text:p>
        </text:list-item>
        <text:list-item>
          <text:p text:style-name="P29">Why QNX avoids unbounded inversion?</text:p>
        </text:list-item>
        <text:list-item>
          <text:p text:style-name="P29">Why message passing avoids this problem?</text:p>
        </text:list-item>
      </text:list>
      <text:p text:style-name="Horizontal_20_Line"/>
      <text:h text:style-name="Heading_20_1" text:outline-level="1">🎓 How to Present This</text:h>
      <text:p text:style-name="Text_20_body">Say:</text:p>
      <text:p text:style-name="Quotations">"We implemented a real-time inversion detection framework on QNX using process-shared mutex and SCHED_FIFO scheduling. The system logs blocking times and provides a live visualization through a Python UI."</text:p>
      <text:p text:style-name="Text_20_body"><text:soft-page-break/>That sounds industry-level 🔥</text:p>
      <text:p text:style-name="Horizontal_20_Line"/>
      <text:h text:style-name="Heading_20_1" text:outline-level="1">🚀 Next Step</text:h>
      <text:p text:style-name="Text_20_body">I can now give you:</text:p>
      <text:list xml:id="list807548320" text:style-name="L27">
        <text:list-item>
          <text:p text:style-name="P30">✅ Full QNX server code (modular with logging + socket)</text:p>
        </text:list-item>
        <text:list-item>
          <text:p text:style-name="P30">✅ Complete Python UI implementation</text:p>
        </text:list-item>
        <text:list-item>
          <text:p text:style-name="P30">✅ Only logging-enabled compact version</text:p>
        </text:list-item>
        <text:list-item>
          <text:p text:style-name="P30">✅ Resource manager-based professional version</text:p>
        </text:list-item>
        <text:list-item>
          <text:p text:style-name="P30">✅ Final mini-project report template (ready to submit)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8:44:59.133901080</meta:creation-date>
    <dc:date>2026-02-19T08:45:56.038129466</dc:date>
    <meta:editing-duration>PT58S</meta:editing-duration>
    <meta:editing-cycles>1</meta:editing-cycles>
    <meta:document-statistic meta:table-count="6" meta:image-count="0" meta:object-count="0" meta:page-count="28" meta:paragraph-count="942" meta:word-count="3447" meta:character-count="26015" meta:non-whitespace-character-count="20933"/>
    <meta:generator>LibreOffice/7.3.7.2$Linux_X86_64 LibreOffice_project/30$Build-2</meta:generator>
  </office:meta>
</office:document-meta>
</file>