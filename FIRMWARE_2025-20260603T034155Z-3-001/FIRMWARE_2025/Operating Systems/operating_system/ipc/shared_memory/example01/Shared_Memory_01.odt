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827cm" table:align="left"/>
    </style:style>
    <style:style style:name="Table1.A" style:family="table-column">
      <style:table-column-properties style:column-width="2.136cm"/>
    </style:style>
    <style:style style:name="Table1.B" style:family="table-column">
      <style:table-column-properties style:column-width="7.69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262cm" table:align="left"/>
    </style:style>
    <style:style style:name="Table2.A" style:family="table-column">
      <style:table-column-properties style:column-width="2.136cm"/>
    </style:style>
    <style:style style:name="Table2.B" style:family="table-column">
      <style:table-column-properties style:column-width="4.12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0.268cm" table:align="left"/>
    </style:style>
    <style:style style:name="Table3.A" style:family="table-column">
      <style:table-column-properties style:column-width="2.455cm"/>
    </style:style>
    <style:style style:name="Table3.B" style:family="table-column">
      <style:table-column-properties style:column-width="3.129cm"/>
    </style:style>
    <style:style style:name="Table3.C" style:family="table-column">
      <style:table-column-properties style:column-width="1.612cm"/>
    </style:style>
    <style:style style:name="Table3.D" style:family="table-column">
      <style:table-column-properties style:column-width="3.07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️⃣ What is Shared Memory in OS?</text:h>
      <text:p text:style-name="Text_20_body"><text:span text:style-name="Strong_20_Emphasis">Shared Memory</text:span> is an <text:span text:style-name="Strong_20_Emphasis">Inter-Process Communication (IPC)</text:span> mechanism that allows <text:span text:style-name="Strong_20_Emphasis">multiple processes to access the same memory region</text:span>.</text:p>
      <text:p text:style-name="Text_20_body">Instead of sending data through:</text:p>
      <text:list xml:id="list2220828147" text:style-name="L1">
        <text:list-item>
          <text:p text:style-name="P3">Pipes</text:p>
        </text:list-item>
        <text:list-item>
          <text:p text:style-name="P3">Message queues</text:p>
        </text:list-item>
        <text:list-item>
          <text:p text:style-name="P3">Sockets</text:p>
        </text:list-item>
      </text:list>
      <text:p text:style-name="Text_20_body">Processes directly read/write to a <text:span text:style-name="Strong_20_Emphasis">common memory block</text:span>.</text:p>
      <text:p text:style-name="Text_20_body">👉 It is the <text:span text:style-name="Strong_20_Emphasis">fastest IPC mechanism</text:span> because:</text:p>
      <text:list xml:id="list2278304749" text:style-name="L2">
        <text:list-item>
          <text:p text:style-name="P4">No data copying between kernel and user space (after mapping)</text:p>
        </text:list-item>
        <text:list-item>
          <text:p text:style-name="P4">Direct memory access</text:p>
        </text:list-item>
      </text:list>
      <text:p text:style-name="Horizontal_20_Line"/>
      <text:h text:style-name="Heading_20_2" text:outline-level="2">2️⃣ Why Shared Memory is Needed?</text:h>
      <text:p text:style-name="Text_20_body">Imagine your QNX or Linux system:</text:p>
      <text:list xml:id="list3631601355" text:style-name="L3">
        <text:list-item>
          <text:p text:style-name="P5">Process 1 → Reads temperature sensor</text:p>
        </text:list-item>
        <text:list-item>
          <text:p text:style-name="P5">Process 2 → Reads humidity</text:p>
        </text:list-item>
        <text:list-item>
          <text:p text:style-name="P5">Process 3 → Displays data</text:p>
        </text:list-item>
      </text:list>
      <text:p text:style-name="Text_20_body">If they use pipes → data copying overhead<text:line-break/>If they use shared memory → all access same memory → <text:span text:style-name="Strong_20_Emphasis">very fast + real-time friendly</text:span></text:p>
      <text:p text:style-name="Text_20_body">That’s why shared memory is used in:</text:p>
      <text:list xml:id="list1812667121" text:style-name="L4">
        <text:list-item>
          <text:p text:style-name="P6">Real-time systems (QNX, RTLinux)</text:p>
        </text:list-item>
        <text:list-item>
          <text:p text:style-name="P6">Multimedia systems</text:p>
        </text:list-item>
        <text:list-item>
          <text:p text:style-name="P6">Database engines</text:p>
        </text:list-item>
        <text:list-item>
          <text:p text:style-name="P6">Embedded systems</text:p>
        </text:list-item>
      </text:list>
      <text:p text:style-name="Horizontal_20_Line"/>
      <text:h text:style-name="Heading_20_1" text:outline-level="1">3️⃣ Two Types of Shared Memory in POSIX Systems</text:h>
      <text:h text:style-name="Heading_20_3" text:outline-level="3">1. System V Shared Memory (older)</text:h>
      <text:list xml:id="list3477986438" text:style-name="L5">
        <text:list-item>
          <text:p text:style-name="P7">shmget()</text:p>
        </text:list-item>
        <text:list-item>
          <text:p text:style-name="P7">shmat()</text:p>
        </text:list-item>
        <text:list-item>
          <text:p text:style-name="P7"><text:soft-page-break/>shmdt()</text:p>
        </text:list-item>
        <text:list-item>
          <text:p text:style-name="P7">shmctl()</text:p>
        </text:list-item>
      </text:list>
      <text:h text:style-name="Heading_20_3" text:outline-level="3">2. POSIX Shared Memory (modern, recommended)</text:h>
      <text:p text:style-name="Text_20_body">Defined in:</text:p>
      <text:p text:style-name="P1"><text:span text:style-name="Source_20_Text">#include &lt;sys/mman.h&gt;</text:span></text:p>
      <text:p text:style-name="P2"><text:span text:style-name="Source_20_Text">#include &lt;fcntl.h&gt;</text:span></text:p>
      <text:p text:style-name="Text_20_body">We will focus on <text:span text:style-name="Strong_20_Emphasis">POSIX shared memory</text:span> (used in Linux + QNX).</text:p>
      <text:p text:style-name="Horizontal_20_Line"/>
      <text:h text:style-name="Heading_20_1" text:outline-level="1">4️⃣ How POSIX Shared Memory Works</text:h>
      <text:p text:style-name="Text_20_body">Internally:</text:p>
      <text:list xml:id="list1944375550" text:style-name="L6">
        <text:list-item>
          <text:p text:style-name="P8">It creates a <text:span text:style-name="Strong_20_Emphasis">memory object in /dev/shm</text:span></text:p>
        </text:list-item>
        <text:list-item>
          <text:p text:style-name="P8">Then maps it into process address space</text:p>
        </text:list-item>
      </text:list>
      <text:p text:style-name="Text_20_body">Flow:</text:p>
      <text:p text:style-name="P2"><text:span text:style-name="Source_20_Text">shm_open() <text:s/>→ <text:s/>ftruncate() <text:s/>→ <text:s/>mmap() <text:s/>→ <text:s/>use memory</text:span></text:p>
      <text:p text:style-name="Horizontal_20_Line"/>
      <text:h text:style-name="Heading_20_1" text:outline-level="1">5️⃣ POSIX Shared Memory APIs (Detailed)</text:h>
      <text:p text:style-name="Horizontal_20_Line"/>
      <text:h text:style-name="Heading_20_2" text:outline-level="2">🔹 1. shm_open()</text:h>
      <text:h text:style-name="Heading_20_3" text:outline-level="3">Purpose:</text:h>
      <text:p text:style-name="Text_20_body">Creates or opens a shared memory object.</text:p>
      <text:h text:style-name="Heading_20_3" text:outline-level="3">Prototype:</text:h>
      <text:p text:style-name="P2"><text:span text:style-name="Source_20_Text">int shm_open(const char *name, int oflag, mode_t mode);</text:span></text:p>
      <text:h text:style-name="Heading_20_3" text:outline-level="3">Parameter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Name of shared memory (must start with <text:span text:style-name="Source_20_Text">/</text:span>)</text:p>
          </table:table-cell>
        </table:table-row>
        <table:table-row>
          <table:table-cell table:style-name="Table1.A1" office:value-type="string">
            <text:p text:style-name="Table_20_Contents">oflag</text:p>
          </table:table-cell>
          <table:table-cell table:style-name="Table1.A1" office:value-type="string">
            <text:p text:style-name="Table_20_Contents">O_CREAT, O_RDWR, O_EXCL etc</text:p>
          </table:table-cell>
        </table:table-row>
        <table:table-row>
          <table:table-cell table:style-name="Table1.A1" office:value-type="string">
            <text:p text:style-name="Table_20_Contents">mode</text:p>
          </table:table-cell>
          <table:table-cell table:style-name="Table1.A1" office:value-type="string">
            <text:p text:style-name="Table_20_Contents">Permissions (0666, 0644 etc)</text:p>
          </table:table-cell>
        </table:table-row>
      </table:table>
      <text:h text:style-name="Heading_20_3" text:outline-level="3">Example:</text:h>
      <text:p text:style-name="P2"><text:span text:style-name="Source_20_Text">int fd = shm_open("/myshm", O_CREAT | O_RDWR, 0666);</text:span></text:p>
      <text:p text:style-name="Text_20_body"><text:soft-page-break/>🔎 This creates:</text:p>
      <text:p text:style-name="P2"><text:span text:style-name="Source_20_Text">/dev/shm/myshm</text:span></text:p>
      <text:p text:style-name="Horizontal_20_Line"/>
      <text:h text:style-name="Heading_20_2" text:outline-level="2">🔹 2. ftruncate()</text:h>
      <text:h text:style-name="Heading_20_3" text:outline-level="3">Purpose:</text:h>
      <text:p text:style-name="Text_20_body">Sets size of shared memory.</text:p>
      <text:h text:style-name="Heading_20_3" text:outline-level="3">Prototype:</text:h>
      <text:p text:style-name="P2"><text:span text:style-name="Source_20_Text">int ftruncate(int fd, off_t length);</text:span></text:p>
      <text:h text:style-name="Heading_20_3" text:outline-level="3">Example:</text:h>
      <text:p text:style-name="P2"><text:span text:style-name="Source_20_Text">ftruncate(fd, 1024);</text:span></text:p>
      <text:p text:style-name="Text_20_body">Without this → memory size is 0 → segmentation fault.</text:p>
      <text:p text:style-name="Horizontal_20_Line"/>
      <text:h text:style-name="Heading_20_2" text:outline-level="2">🔹 3. mmap()</text:h>
      <text:h text:style-name="Heading_20_3" text:outline-level="3">Purpose:</text:h>
      <text:p text:style-name="Text_20_body">Maps shared memory object into process address space.</text:p>
      <text:h text:style-name="Heading_20_3" text:outline-level="3">Prototype:</text:h>
      <text:p text:style-name="P1"><text:span text:style-name="Source_20_Text">void *mmap(void *addr,</text:span></text:p>
      <text:p text:style-name="P1"><text:span text:style-name="Source_20_Text"><text:s text:c="11"/>size_t length,</text:span></text:p>
      <text:p text:style-name="P1"><text:span text:style-name="Source_20_Text"><text:s text:c="11"/>int prot,</text:span></text:p>
      <text:p text:style-name="P1"><text:span text:style-name="Source_20_Text"><text:s text:c="11"/>int flags,</text:span></text:p>
      <text:p text:style-name="P1"><text:span text:style-name="Source_20_Text"><text:s text:c="11"/>int fd,</text:span></text:p>
      <text:p text:style-name="P2"><text:span text:style-name="Source_20_Text"><text:s text:c="11"/>off_t offset);</text:span></text:p>
      <text:h text:style-name="Heading_20_3" text:outline-level="3">Parameters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arameter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addr</text:p>
          </table:table-cell>
          <table:table-cell table:style-name="Table2.A1" office:value-type="string">
            <text:p text:style-name="Table_20_Contents">NULL (let OS choose)</text:p>
          </table:table-cell>
        </table:table-row>
        <table:table-row>
          <table:table-cell table:style-name="Table2.A1" office:value-type="string">
            <text:p text:style-name="Table_20_Contents">length</text:p>
          </table:table-cell>
          <table:table-cell table:style-name="Table2.A1" office:value-type="string">
            <text:p text:style-name="Table_20_Contents">Size</text:p>
          </table:table-cell>
        </table:table-row>
        <table:table-row>
          <table:table-cell table:style-name="Table2.A1" office:value-type="string">
            <text:p text:style-name="Table_20_Contents">prot</text:p>
          </table:table-cell>
          <table:table-cell table:style-name="Table2.A1" office:value-type="string">
            <text:p text:style-name="Table_20_Contents">PROT_READ</text:p>
          </table:table-cell>
        </table:table-row>
        <table:table-row>
          <table:table-cell table:style-name="Table2.A1" office:value-type="string">
            <text:p text:style-name="Table_20_Contents">flags</text:p>
          </table:table-cell>
          <table:table-cell table:style-name="Table2.A1" office:value-type="string">
            <text:p text:style-name="Table_20_Contents">MAP_SHARED</text:p>
          </table:table-cell>
        </table:table-row>
        <table:table-row>
          <table:table-cell table:style-name="Table2.A1" office:value-type="string">
            <text:p text:style-name="Table_20_Contents">fd</text:p>
          </table:table-cell>
          <table:table-cell table:style-name="Table2.A1" office:value-type="string">
            <text:p text:style-name="Table_20_Contents">shm fd</text:p>
          </table:table-cell>
        </table:table-row>
        <table:table-row>
          <table:table-cell table:style-name="Table2.A1" office:value-type="string">
            <text:p text:style-name="Table_20_Contents">offset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3" text:outline-level="3">Example:</text:h>
      <text:p text:style-name="P1"><text:span text:style-name="Source_20_Text">void *ptr = mmap(NULL, 1024,</text:span></text:p>
      <text:p text:style-name="P1"><text:span text:style-name="Source_20_Text"><text:s text:c="17"/>PROT_READ | PROT_WRITE,</text:span></text:p>
      <text:p text:style-name="P1"><text:span text:style-name="Source_20_Text"><text:s text:c="17"/>MAP_SHARED,</text:span></text:p>
      <text:p text:style-name="P1"><text:soft-page-break/><text:span text:style-name="Source_20_Text"><text:s text:c="17"/>fd,</text:span></text:p>
      <text:p text:style-name="P2"><text:span text:style-name="Source_20_Text"><text:s text:c="17"/>0);</text:span></text:p>
      <text:p text:style-name="Text_20_body">Now <text:span text:style-name="Source_20_Text">ptr</text:span> behaves like normal memory.</text:p>
      <text:p text:style-name="Horizontal_20_Line"/>
      <text:h text:style-name="Heading_20_2" text:outline-level="2">🔹 4. munmap()</text:h>
      <text:p text:style-name="Text_20_body">Unmaps memory.</text:p>
      <text:p text:style-name="P2"><text:span text:style-name="Source_20_Text">munmap(ptr, 1024);</text:span></text:p>
      <text:p text:style-name="Horizontal_20_Line"/>
      <text:h text:style-name="Heading_20_2" text:outline-level="2">🔹 5. shm_unlink()</text:h>
      <text:p text:style-name="Text_20_body">Deletes shared memory object.</text:p>
      <text:p text:style-name="P2"><text:span text:style-name="Source_20_Text">shm_unlink("/myshm");</text:span></text:p>
      <text:p text:style-name="Text_20_body">⚠️ Important:</text:p>
      <text:list xml:id="list3982826145" text:style-name="L7">
        <text:list-item>
          <text:p text:style-name="P9">Only removes name</text:p>
        </text:list-item>
        <text:list-item>
          <text:p text:style-name="P9">Memory removed after all processes detach</text:p>
        </text:list-item>
      </text:list>
      <text:p text:style-name="Horizontal_20_Line"/>
      <text:h text:style-name="Heading_20_1" text:outline-level="1">6️⃣ Complete Example (Writer + Reader)</text:h>
      <text:p text:style-name="Horizontal_20_Line"/>
      <text:h text:style-name="Heading_20_2" text:outline-level="2">🔹 Writer Process</text:h>
      <text:p text:style-name="P1"><text:span text:style-name="Source_20_Text">#include &lt;stdio.h&gt;</text:span></text:p>
      <text:p text:style-name="P1"><text:span text:style-name="Source_20_Text">#include &lt;sys/mman.h&gt;</text:span></text:p>
      <text:p text:style-name="P1"><text:span text:style-name="Source_20_Text">#include &lt;fcntl.h&gt;</text:span></text:p>
      <text:p text:style-name="P1"><text:span text:style-name="Source_20_Text">#include &lt;unistd.h&gt;</text:span></text:p>
      <text:p text:style-name="P1"><text:span text:style-name="Source_20_Text">#include &lt;string.h&gt;</text:span></text:p>
      <text:p text:style-name="P1"/>
      <text:p text:style-name="P1"><text:span text:style-name="Source_20_Text">#define SIZE 1024</text:span></text:p>
      <text:p text:style-name="P1"/>
      <text:p text:style-name="P1"><text:span text:style-name="Source_20_Text">int main() {</text:span></text:p>
      <text:p text:style-name="P1"><text:span text:style-name="Source_20_Text"><text:s text:c="4"/>int fd = shm_open("/myshm", O_CREAT | O_RDWR, 0666);</text:span></text:p>
      <text:p text:style-name="P1"><text:span text:style-name="Source_20_Text"><text:s text:c="4"/>ftruncate(fd, SIZE);</text:span></text:p>
      <text:p text:style-name="P1"/>
      <text:p text:style-name="P1"><text:span text:style-name="Source_20_Text"><text:s text:c="4"/>char *ptr = mmap(NULL, SIZE,</text:span></text:p>
      <text:p text:style-name="P1"><text:span text:style-name="Source_20_Text"><text:s text:c="21"/>PROT_READ | PROT_WRITE,</text:span></text:p>
      <text:p text:style-name="P1"><text:span text:style-name="Source_20_Text"><text:s text:c="21"/>MAP_SHARED, fd, 0);</text:span></text:p>
      <text:p text:style-name="P1"/>
      <text:p text:style-name="P1"><text:span text:style-name="Source_20_Text"><text:s text:c="4"/>strcpy(ptr, "Hello from Writer");</text:span></text:p>
      <text:p text:style-name="P1"/>
      <text:p text:style-name="P1"><text:span text:style-name="Source_20_Text"><text:s text:c="4"/>printf("Data written\n");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><text:soft-page-break/></text:p>
      <text:h text:style-name="Heading_20_2" text:outline-level="2">🔹 Reader Process</text:h>
      <text:p text:style-name="P1"><text:span text:style-name="Source_20_Text">#include &lt;stdio.h&gt;</text:span></text:p>
      <text:p text:style-name="P1"><text:span text:style-name="Source_20_Text">#include &lt;sys/mman.h&gt;</text:span></text:p>
      <text:p text:style-name="P1"><text:span text:style-name="Source_20_Text">#include &lt;fcntl.h&gt;</text:span></text:p>
      <text:p text:style-name="P1"><text:span text:style-name="Source_20_Text">#include &lt;unistd.h&gt;</text:span></text:p>
      <text:p text:style-name="P1"/>
      <text:p text:style-name="P1"><text:span text:style-name="Source_20_Text">#define SIZE 1024</text:span></text:p>
      <text:p text:style-name="P1"/>
      <text:p text:style-name="P1"><text:span text:style-name="Source_20_Text">int main() {</text:span></text:p>
      <text:p text:style-name="P1"><text:span text:style-name="Source_20_Text"><text:s text:c="4"/>int fd = shm_open("/myshm", O_RDONLY, 0666);</text:span></text:p>
      <text:p text:style-name="P1"/>
      <text:p text:style-name="P1"><text:span text:style-name="Source_20_Text"><text:s text:c="4"/>char *ptr = mmap(NULL, SIZE,</text:span></text:p>
      <text:p text:style-name="P1"><text:span text:style-name="Source_20_Text"><text:s text:c="21"/>PROT_READ,</text:span></text:p>
      <text:p text:style-name="P1"><text:span text:style-name="Source_20_Text"><text:s text:c="21"/>MAP_SHARED, fd, 0);</text:span></text:p>
      <text:p text:style-name="P1"/>
      <text:p text:style-name="P1"><text:span text:style-name="Source_20_Text"><text:s text:c="4"/>printf("Read: %s\n", ptr);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1" text:outline-level="1">7️⃣ Shared Memory with Structures (Important for Projects)</text:h>
      <text:p text:style-name="Text_20_body">You can share structures:</text:p>
      <text:p text:style-name="P1"><text:span text:style-name="Source_20_Text">typedef struct {</text:span></text:p>
      <text:p text:style-name="P1"><text:span text:style-name="Source_20_Text"><text:s text:c="4"/>int temperature;</text:span></text:p>
      <text:p text:style-name="P1"><text:span text:style-name="Source_20_Text"><text:s text:c="4"/>int humidity;</text:span></text:p>
      <text:p text:style-name="P1"><text:span text:style-name="Source_20_Text"><text:s text:c="4"/>int flag;</text:span></text:p>
      <text:p text:style-name="P2"><text:span text:style-name="Source_20_Text">} SensorData;</text:span></text:p>
      <text:p text:style-name="Text_20_body">Then:</text:p>
      <text:p text:style-name="P1"><text:span text:style-name="Source_20_Text">SensorData *data = mmap(...);</text:span></text:p>
      <text:p text:style-name="P2"><text:span text:style-name="Source_20_Text">data-&gt;temperature = 35;</text:span></text:p>
      <text:p text:style-name="Text_20_body">This is how you implement:</text:p>
      <text:list xml:id="list3642616220" text:style-name="L8">
        <text:list-item>
          <text:p text:style-name="P10">Real-time dashboards</text:p>
        </text:list-item>
        <text:list-item>
          <text:p text:style-name="P10">Sensor fusion systems</text:p>
        </text:list-item>
        <text:list-item>
          <text:p text:style-name="P10">Control systems</text:p>
        </text:list-item>
      </text:list>
      <text:p text:style-name="Horizontal_20_Line"/>
      <text:h text:style-name="Heading_20_1" text:outline-level="1">8️⃣ Synchronization Problem ⚠️</text:h>
      <text:p text:style-name="Text_20_body">Shared memory does NOT provide synchronization.</text:p>
      <text:p text:style-name="Text_20_body">If two processes write at same time → race condition.</text:p>
      <text:p text:style-name="Text_20_body"><text:soft-page-break/>So we use:</text:p>
      <text:list xml:id="list1026990016" text:style-name="L9">
        <text:list-item>
          <text:p text:style-name="P11">POSIX Mutex (pthread_mutex)</text:p>
        </text:list-item>
        <text:list-item>
          <text:p text:style-name="P11">POSIX Semaphores (sem_open, sem_wait, sem_post)</text:p>
        </text:list-item>
        <text:list-item>
          <text:p text:style-name="P11">Condition Variables</text:p>
        </text:list-item>
      </text:list>
      <text:p text:style-name="Horizontal_20_Line"/>
      <text:h text:style-name="Heading_20_2" text:outline-level="2">🔹 POSIX Named Semaphore API</text:h>
      <text:p text:style-name="P1"><text:span text:style-name="Source_20_Text">#include &lt;semaphore.h&gt;</text:span></text:p>
      <text:p text:style-name="P1"/>
      <text:p text:style-name="P1"><text:span text:style-name="Source_20_Text">sem_t *sem = sem_open("/mysem", O_CREAT, 0666, 1);</text:span></text:p>
      <text:p text:style-name="P1"/>
      <text:p text:style-name="P1"><text:span text:style-name="Source_20_Text">sem_wait(sem); <text:s text:c="2"/>// lock</text:span></text:p>
      <text:p text:style-name="P1"><text:span text:style-name="Source_20_Text">// critical section</text:span></text:p>
      <text:p text:style-name="P2"><text:span text:style-name="Source_20_Text">sem_post(sem); <text:s text:c="2"/>// unlock</text:span></text:p>
      <text:p text:style-name="Text_20_body">Remove:</text:p>
      <text:p text:style-name="P2"><text:span text:style-name="Source_20_Text">sem_unlink("/mysem");</text:span></text:p>
      <text:p text:style-name="Horizontal_20_Line"/>
      <text:h text:style-name="Heading_20_1" text:outline-level="1">9️⃣ Real-Time Usage (QNX Context)</text:h>
      <text:p text:style-name="Text_20_body">Since you're working with QNX projects:</text:p>
      <text:p text:style-name="Text_20_body">In <text:span text:style-name="Strong_20_Emphasis">QNX Neutrino RTOS</text:span>:</text:p>
      <text:list xml:id="list1322717980" text:style-name="L10">
        <text:list-item>
          <text:p text:style-name="P12">Shared memory is extremely common</text:p>
        </text:list-item>
        <text:list-item>
          <text:p text:style-name="P12">Often used with:</text:p>
          <text:list>
            <text:list-item>
              <text:p text:style-name="P12">pthread_mutexattr_setprotocol()</text:p>
            </text:list-item>
            <text:list-item>
              <text:p text:style-name="P12">Priority inheritance</text:p>
            </text:list-item>
            <text:list-item>
              <text:p text:style-name="P12">Real-time scheduling</text:p>
            </text:list-item>
          </text:list>
        </text:list-item>
      </text:list>
      <text:p text:style-name="Text_20_body">To avoid <text:span text:style-name="Strong_20_Emphasis">priority inversion</text:span>, use:</text:p>
      <text:p text:style-name="P2"><text:span text:style-name="Source_20_Text">pthread_mutexattr_setprotocol(&amp;attr, PTHREAD_PRIO_INHERIT);</text:span></text:p>
      <text:p text:style-name="Text_20_body">This is critical in:</text:p>
      <text:list xml:id="list255808872" text:style-name="L11">
        <text:list-item>
          <text:p text:style-name="P13">Automotive systems</text:p>
        </text:list-item>
        <text:list-item>
          <text:p text:style-name="P13">Industrial control</text:p>
        </text:list-item>
        <text:list-item>
          <text:p text:style-name="P13">Embedded HMI systems</text:p>
        </text:list-item>
      </text:list>
      <text:p text:style-name="Horizontal_20_Line"/>
      <text:h text:style-name="Heading_20_1" text:outline-level="1"><text:soft-page-break/>🔟 Memory Layout Concept</text:h>
      <text:p text:style-name="Text_20_body">Each process has:</text:p>
      <text:p text:style-name="P1"><text:span text:style-name="Source_20_Text">Virtual Address Space</text:span></text:p>
      <text:p text:style-name="P1"><text:span text:style-name="Source_20_Text"><text:s text:c="4"/>|</text:span></text:p>
      <text:p text:style-name="P1"><text:span text:style-name="Source_20_Text"><text:s text:c="4"/>|-- Code</text:span></text:p>
      <text:p text:style-name="P1"><text:span text:style-name="Source_20_Text"><text:s text:c="4"/>|-- Heap</text:span></text:p>
      <text:p text:style-name="P1"><text:span text:style-name="Source_20_Text"><text:s text:c="4"/>|-- Stack</text:span></text:p>
      <text:p text:style-name="P2"><text:span text:style-name="Source_20_Text"><text:s text:c="4"/>|-- Shared Memory (mapped region)</text:span></text:p>
      <text:p text:style-name="Text_20_body">Even though virtual addresses differ,<text:line-break/>they refer to same physical memory.</text:p>
      <text:p text:style-name="Horizontal_20_Line"/>
      <text:h text:style-name="Heading_20_1" text:outline-level="1">1️⃣1️⃣ Advantages of Shared Memory</text:h>
      <text:p text:style-name="Text_20_body">✅ Fastest IPC<text:line-break/>✅ Suitable for large data<text:line-break/>✅ Ideal for real-time<text:line-break/>✅ Zero copy after mapping</text:p>
      <text:p text:style-name="Horizontal_20_Line"/>
      <text:h text:style-name="Heading_20_1" text:outline-level="1">1️⃣2️⃣ Disadvantages</text:h>
      <text:p text:style-name="Text_20_body">❌ No built-in synchronization<text:line-break/>❌ Harder debugging<text:line-break/>❌ Risk of corruption<text:line-break/>❌ Manual cleanup required</text:p>
      <text:p text:style-name="Horizontal_20_Line"/>
      <text:h text:style-name="Heading_20_1" text:outline-level="1">1️⃣3️⃣ When to Use Shared Memory?</text:h>
      <text:p text:style-name="Text_20_body">Use it when:</text:p>
      <text:list xml:id="list4123316206" text:style-name="L12">
        <text:list-item>
          <text:p text:style-name="P14">High data rate</text:p>
        </text:list-item>
        <text:list-item>
          <text:p text:style-name="P14">Real-time systems</text:p>
        </text:list-item>
        <text:list-item>
          <text:p text:style-name="P14">Video streaming</text:p>
        </text:list-item>
        <text:list-item>
          <text:p text:style-name="P14">Sensor data sharing</text:p>
        </text:list-item>
        <text:list-item>
          <text:p text:style-name="P14">Multi-process architecture</text:p>
        </text:list-item>
      </text:list>
      <text:p text:style-name="Text_20_body">Do NOT use when:</text:p>
      <text:list xml:id="list2105497296" text:style-name="L13">
        <text:list-item>
          <text:p text:style-name="P15">Simple command passing → use pipes</text:p>
        </text:list-item>
        <text:list-item>
          <text:p text:style-name="P15">Distributed systems → use sockets</text:p>
        </text:list-item>
      </text:list>
      <text:p text:style-name="Horizontal_20_Line"><text:soft-page-break/></text:p>
      <text:h text:style-name="Heading_20_1" text:outline-level="1">1️⃣4️⃣ Checking Shared Memory in Linux</text:h>
      <text:p text:style-name="Text_20_body">List:</text:p>
      <text:p text:style-name="P2"><text:span text:style-name="Source_20_Text">ls /dev/shm</text:span></text:p>
      <text:p text:style-name="Text_20_body">Remove manually:</text:p>
      <text:p text:style-name="P2"><text:span text:style-name="Source_20_Text">rm /dev/shm/myshm</text:span></text:p>
      <text:p text:style-name="Horizontal_20_Line"/>
      <text:h text:style-name="Heading_20_1" text:outline-level="1">1️⃣5️⃣ Comparison with Other IPC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Shared Memory</text:p>
            </table:table-cell>
            <table:table-cell table:style-name="Table3.A1" office:value-type="string">
              <text:p text:style-name="Table_20_Heading">Pipe</text:p>
            </table:table-cell>
            <table:table-cell table:style-name="Table3.A1" office:value-type="string">
              <text:p text:style-name="Table_20_Heading">Message Queue</text:p>
            </table:table-cell>
          </table:table-row>
        </table:table-header-rows>
        <table:table-row>
          <table:table-cell table:style-name="Table3.A1" office:value-type="string">
            <text:p text:style-name="Table_20_Contents">Speed</text:p>
          </table:table-cell>
          <table:table-cell table:style-name="Table3.A1" office:value-type="string">
            <text:p text:style-name="Table_20_Contents">🔥 Fastest</text:p>
          </table:table-cell>
          <table:table-cell table:style-name="Table3.A1" office:value-type="string">
            <text:p text:style-name="Table_20_Contents">Medium</text:p>
          </table:table-cell>
          <table:table-cell table:style-name="Table3.A1" office:value-type="string">
            <text:p text:style-name="Table_20_Contents">Medium</text:p>
          </table:table-cell>
        </table:table-row>
        <table:table-row>
          <table:table-cell table:style-name="Table3.A1" office:value-type="string">
            <text:p text:style-name="Table_20_Contents">Sync Neede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Partial</text:p>
          </table:table-cell>
        </table:table-row>
        <table:table-row>
          <table:table-cell table:style-name="Table3.A1" office:value-type="string">
            <text:p text:style-name="Table_20_Contents">Data Size</text:p>
          </table:table-cell>
          <table:table-cell table:style-name="Table3.A1" office:value-type="string">
            <text:p text:style-name="Table_20_Contents">Large</text:p>
          </table:table-cell>
          <table:table-cell table:style-name="Table3.A1" office:value-type="string">
            <text:p text:style-name="Table_20_Contents">Small</text:p>
          </table:table-cell>
          <table:table-cell table:style-name="Table3.A1" office:value-type="string">
            <text:p text:style-name="Table_20_Contents">Medium</text:p>
          </table:table-cell>
        </table:table-row>
        <table:table-row>
          <table:table-cell table:style-name="Table3.A1" office:value-type="string">
            <text:p text:style-name="Table_20_Contents">Kernel Copy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</table:table-row>
      </table:table>
      <text:p text:style-name="Horizontal_20_Line"/>
      <text:h text:style-name="Heading_20_1" text:outline-level="1">🎯 Final Summary</text:h>
      <text:p text:style-name="Text_20_body">Shared Memory = <text:span text:style-name="Strong_20_Emphasis">Direct memory sharing between processes</text:span></text:p>
      <text:p text:style-name="Text_20_body">Core APIs:</text:p>
      <text:list xml:id="list1826566451" text:style-name="L14">
        <text:list-item>
          <text:p text:style-name="P16">shm_open()</text:p>
        </text:list-item>
        <text:list-item>
          <text:p text:style-name="P16">ftruncate()</text:p>
        </text:list-item>
        <text:list-item>
          <text:p text:style-name="P16">mmap()</text:p>
        </text:list-item>
        <text:list-item>
          <text:p text:style-name="P16">munmap()</text:p>
        </text:list-item>
        <text:list-item>
          <text:p text:style-name="P16">shm_unlink()</text:p>
        </text:list-item>
      </text:list>
      <text:p text:style-name="Text_20_body">For safety always combine with:</text:p>
      <text:list xml:id="list3690626758" text:style-name="L15">
        <text:list-item>
          <text:p text:style-name="P17">sem_open()</text:p>
        </text:list-item>
        <text:list-item>
          <text:p text:style-name="P17">pthread_mutex</text:p>
        </text:list-item>
        <text:list-item>
          <text:p text:style-name="P17">Priority inheritance (for RTOS)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8:54:50.332117833</meta:creation-date>
    <dc:date>2026-02-19T08:55:32.999213292</dc:date>
    <meta:editing-duration>PT43S</meta:editing-duration>
    <meta:editing-cycles>1</meta:editing-cycles>
    <meta:document-statistic meta:table-count="3" meta:image-count="0" meta:object-count="0" meta:page-count="8" meta:paragraph-count="242" meta:word-count="853" meta:character-count="5505" meta:non-whitespace-character-count="4654"/>
    <meta:generator>LibreOffice/7.3.7.2$Linux_X86_64 LibreOffice_project/30$Build-2</meta:generator>
  </office:meta>
</office:document-meta>
</file>