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67cm" table:align="left"/>
    </style:style>
    <style:style style:name="Table1.A" style:family="table-column">
      <style:table-column-properties style:column-width="3.304cm"/>
    </style:style>
    <style:style style:name="Table1.B" style:family="table-column">
      <style:table-column-properties style:column-width="3.6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97cm" table:align="left"/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3.198cm"/>
    </style:style>
    <style:style style:name="Table2.C" style:family="table-column">
      <style:table-column-properties style:column-width="3.37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essage Queue in Operating Systems (IPC)</text:h>
      <text:p text:style-name="Text_20_body">A <text:span text:style-name="Strong_20_Emphasis">Message Queue</text:span> is an Inter-Process Communication (IPC) mechanism that allows processes to communicate by sending and receiving messages in a structured way.</text:p>
      <text:p text:style-name="Text_20_body">Unlike pipes (byte stream), message queues preserve <text:span text:style-name="Strong_20_Emphasis">message boundaries</text:span> — each <text:span text:style-name="Source_20_Text">send()</text:span> corresponds to one complete <text:span text:style-name="Source_20_Text">receive()</text:span>.</text:p>
      <text:p text:style-name="Text_20_body">In POSIX systems (like Linux, QNX), we use <text:span text:style-name="Strong_20_Emphasis">POSIX Message Queues</text:span> defined in the <text:span text:style-name="Source_20_Text">&lt;mqueue.h&gt;</text:span> library.</text:p>
      <text:p text:style-name="Horizontal_20_Line"/>
      <text:h text:style-name="Heading_20_1" text:outline-level="1">🔹 Why Use Message Queues?</text:h>
      <text:p text:style-name="Text_20_body">✔ Asynchronous communication<text:line-break/>✔ No parent–child relationship required<text:line-break/>✔ Messages have priority<text:line-break/>✔ Works between unrelated processes<text:line-break/>✔ Kernel managed</text:p>
      <text:p text:style-name="Horizontal_20_Line"/>
      <text:h text:style-name="Heading_20_1" text:outline-level="1">🔹 POSIX Message Queue System Call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mq_open()</text:span></text:p>
          </table:table-cell>
          <table:table-cell table:style-name="Table1.A1" office:value-type="string">
            <text:p text:style-name="Table_20_Contents">Create/Open queue</text:p>
          </table:table-cell>
        </table:table-row>
        <table:table-row>
          <table:table-cell table:style-name="Table1.A1" office:value-type="string">
            <text:p text:style-name="Table_20_Contents"><text:span text:style-name="Source_20_Text">mq_send()</text:span></text:p>
          </table:table-cell>
          <table:table-cell table:style-name="Table1.A1" office:value-type="string">
            <text:p text:style-name="Table_20_Contents">Send mess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mq_receive()</text:span></text:p>
          </table:table-cell>
          <table:table-cell table:style-name="Table1.A1" office:value-type="string">
            <text:p text:style-name="Table_20_Contents">Receive mess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mq_close()</text:span></text:p>
          </table:table-cell>
          <table:table-cell table:style-name="Table1.A1" office:value-type="string">
            <text:p text:style-name="Table_20_Contents">Close queue</text:p>
          </table:table-cell>
        </table:table-row>
        <table:table-row>
          <table:table-cell table:style-name="Table1.A1" office:value-type="string">
            <text:p text:style-name="Table_20_Contents"><text:span text:style-name="Source_20_Text">mq_unlink()</text:span></text:p>
          </table:table-cell>
          <table:table-cell table:style-name="Table1.A1" office:value-type="string">
            <text:p text:style-name="Table_20_Contents">Delete queue</text:p>
          </table:table-cell>
        </table:table-row>
        <table:table-row>
          <table:table-cell table:style-name="Table1.A1" office:value-type="string">
            <text:p text:style-name="Table_20_Contents"><text:span text:style-name="Source_20_Text">mq_getattr()</text:span></text:p>
          </table:table-cell>
          <table:table-cell table:style-name="Table1.A1" office:value-type="string">
            <text:p text:style-name="Table_20_Contents">Get queue attributes</text:p>
          </table:table-cell>
        </table:table-row>
      </table:table>
      <text:p text:style-name="Horizontal_20_Line"/>
      <text:h text:style-name="Heading_20_1" text:outline-level="1">🔹 Basic Workflow</text:h>
      <text:h text:style-name="Heading_20_3" text:outline-level="3">Sender:</text:h>
      <text:list xml:id="list2228979796" text:style-name="L1">
        <text:list-item>
          <text:p text:style-name="P4"><text:span text:style-name="Source_20_Text">mq_open()</text:span></text:p>
        </text:list-item>
        <text:list-item>
          <text:p text:style-name="P4"><text:span text:style-name="Source_20_Text">mq_send()</text:span></text:p>
        </text:list-item>
        <text:list-item>
          <text:p text:style-name="P4"><text:span text:style-name="Source_20_Text">mq_close()</text:span></text:p>
        </text:list-item>
      </text:list>
      <text:h text:style-name="Heading_20_3" text:outline-level="3">Receiver:</text:h>
      <text:list xml:id="list2664133843" text:style-name="L2">
        <text:list-item>
          <text:p text:style-name="P5"><text:span text:style-name="Source_20_Text">mq_open()</text:span></text:p>
        </text:list-item>
        <text:list-item>
          <text:p text:style-name="P5"><text:span text:style-name="Source_20_Text">mq_receive()</text:span></text:p>
        </text:list-item>
        <text:list-item>
          <text:p text:style-name="P5"><text:soft-page-break/><text:span text:style-name="Source_20_Text">mq_close()</text:span></text:p>
        </text:list-item>
        <text:list-item>
          <text:p text:style-name="P5"><text:span text:style-name="Source_20_Text">mq_unlink()</text:span> (optional cleanup)</text:p>
        </text:list-item>
      </text:list>
      <text:p text:style-name="Horizontal_20_Line"/>
      <text:h text:style-name="Heading_20_1" text:outline-level="1">🔹 Important Structure</text:h>
      <text:p text:style-name="P1"><text:span text:style-name="Source_20_Text">struct mq_attr {</text:span></text:p>
      <text:p text:style-name="P1"><text:span text:style-name="Source_20_Text"><text:s text:c="4"/>long mq_flags; <text:s text:c="4"/>// 0 or O_NONBLOCK</text:span></text:p>
      <text:p text:style-name="P1"><text:span text:style-name="Source_20_Text"><text:s text:c="4"/>long mq_maxmsg; <text:s text:c="3"/>// Maximum number of messages</text:span></text:p>
      <text:p text:style-name="P1"><text:span text:style-name="Source_20_Text"><text:s text:c="4"/>long mq_msgsize; <text:s text:c="2"/>// Maximum size of each message</text:span></text:p>
      <text:p text:style-name="P1"><text:span text:style-name="Source_20_Text"><text:s text:c="4"/>long mq_curmsgs; <text:s text:c="2"/>// Current number of messages</text:span></text:p>
      <text:p text:style-name="P2"><text:span text:style-name="Source_20_Text">};</text:span></text:p>
      <text:p text:style-name="Horizontal_20_Line"/>
      <text:h text:style-name="Heading_20_1" text:outline-level="1">🔹 Example 1: Simple POSIX Message Queue (Sender + Receiver)</text:h>
      <text:p text:style-name="Text_20_body">Compile with:</text:p>
      <text:p text:style-name="P1"><text:span text:style-name="Source_20_Text">gcc sender.c -o sender -lrt</text:span></text:p>
      <text:p text:style-name="P2"><text:span text:style-name="Source_20_Text">gcc receiver.c -o receiver -lrt</text:span></text:p>
      <text:p text:style-name="Text_20_body">(<text:span text:style-name="Source_20_Text">-lrt</text:span> links real-time library for mqueue)</text:p>
      <text:p text:style-name="Horizontal_20_Line"/>
      <text:h text:style-name="Heading_20_2" text:outline-level="2">📌 Sender Program (sender.c)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string.h&gt;</text:span></text:p>
      <text:p text:style-name="P1"><text:span text:style-name="Source_20_Text">#include &lt;fcntl.h&gt;</text:span></text:p>
      <text:p text:style-name="P1"><text:span text:style-name="Source_20_Text">#include &lt;sys/stat.h&gt;</text:span></text:p>
      <text:p text:style-name="P1"><text:span text:style-name="Source_20_Text">#include &lt;mqueue.h&gt;</text:span></text:p>
      <text:p text:style-name="P1"/>
      <text:p text:style-name="P1"><text:span text:style-name="Source_20_Text">#define QUEUE_NAME "/myqueue"</text:span></text:p>
      <text:p text:style-name="P1"><text:span text:style-name="Source_20_Text">#define MAX_SIZE 100</text:span></text:p>
      <text:p text:style-name="P1"/>
      <text:p text:style-name="P1"><text:span text:style-name="Source_20_Text">int main() {</text:span></text:p>
      <text:p text:style-name="P1"><text:span text:style-name="Source_20_Text"><text:s text:c="4"/>mqd_t mq;</text:span></text:p>
      <text:p text:style-name="P1"><text:span text:style-name="Source_20_Text"><text:s text:c="4"/>struct mq_attr attr;</text:span></text:p>
      <text:p text:style-name="P1"/>
      <text:p text:style-name="P1"><text:span text:style-name="Source_20_Text"><text:s text:c="4"/>attr.mq_flags = 0;</text:span></text:p>
      <text:p text:style-name="P1"><text:span text:style-name="Source_20_Text"><text:s text:c="4"/>attr.mq_maxmsg = 10;</text:span></text:p>
      <text:p text:style-name="P1"><text:span text:style-name="Source_20_Text"><text:s text:c="4"/>attr.mq_msgsize = MAX_SIZE;</text:span></text:p>
      <text:p text:style-name="P1"><text:span text:style-name="Source_20_Text"><text:s text:c="4"/>attr.mq_curmsgs = 0;</text:span></text:p>
      <text:p text:style-name="P1"/>
      <text:p text:style-name="P1"><text:span text:style-name="Source_20_Text"><text:s text:c="4"/>mq = mq_open(QUEUE_NAME, O_CREAT | O_WRONLY, 0644, &amp;attr);</text:span></text:p>
      <text:p text:style-name="P1"><text:span text:style-name="Source_20_Text"><text:s text:c="4"/>if (mq == -1) {</text:span></text:p>
      <text:p text:style-name="P1"><text:span text:style-name="Source_20_Text"><text:s text:c="8"/>perror("mq_open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har message[] = "Hello from Sender";</text:span></text:p>
      <text:p text:style-name="P1"><text:soft-page-break/></text:p>
      <text:p text:style-name="P1"><text:span text:style-name="Source_20_Text"><text:s text:c="4"/>if (mq_send(mq, message, strlen(message) + 1, 0) == -1) {</text:span></text:p>
      <text:p text:style-name="P1"><text:span text:style-name="Source_20_Text"><text:s text:c="8"/>perror("mq_send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Message sent\n");</text:span></text:p>
      <text:p text:style-name="P1"/>
      <text:p text:style-name="P1"><text:span text:style-name="Source_20_Text"><text:s text:c="4"/>mq_close(mq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2" text:outline-level="2">📌 Receiver Program (receiver.c)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fcntl.h&gt;</text:span></text:p>
      <text:p text:style-name="P1"><text:span text:style-name="Source_20_Text">#include &lt;sys/stat.h&gt;</text:span></text:p>
      <text:p text:style-name="P1"><text:span text:style-name="Source_20_Text">#include &lt;mqueue.h&gt;</text:span></text:p>
      <text:p text:style-name="P1"/>
      <text:p text:style-name="P1"><text:span text:style-name="Source_20_Text">#define QUEUE_NAME "/myqueue"</text:span></text:p>
      <text:p text:style-name="P1"><text:span text:style-name="Source_20_Text">#define MAX_SIZE 100</text:span></text:p>
      <text:p text:style-name="P1"/>
      <text:p text:style-name="P1"><text:span text:style-name="Source_20_Text">int main() {</text:span></text:p>
      <text:p text:style-name="P1"><text:span text:style-name="Source_20_Text"><text:s text:c="4"/>mqd_t mq;</text:span></text:p>
      <text:p text:style-name="P1"><text:span text:style-name="Source_20_Text"><text:s text:c="4"/>char buffer[MAX_SIZE];</text:span></text:p>
      <text:p text:style-name="P1"/>
      <text:p text:style-name="P1"><text:span text:style-name="Source_20_Text"><text:s text:c="4"/>mq = mq_open(QUEUE_NAME, O_RDONLY);</text:span></text:p>
      <text:p text:style-name="P1"><text:span text:style-name="Source_20_Text"><text:s text:c="4"/>if (mq == -1) {</text:span></text:p>
      <text:p text:style-name="P1"><text:span text:style-name="Source_20_Text"><text:s text:c="8"/>perror("mq_open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if (mq_receive(mq, buffer, MAX_SIZE, NULL) == -1) {</text:span></text:p>
      <text:p text:style-name="P1"><text:span text:style-name="Source_20_Text"><text:s text:c="8"/>perror("mq_receive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Received message: %s\n", buffer);</text:span></text:p>
      <text:p text:style-name="P1"/>
      <text:p text:style-name="P1"><text:span text:style-name="Source_20_Text"><text:s text:c="4"/>mq_close(mq);</text:span></text:p>
      <text:p text:style-name="P1"><text:span text:style-name="Source_20_Text"><text:s text:c="4"/>mq_unlink(QUEUE_NAME); <text:s text:c="2"/>// delete queue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🔹 Example 2: Using Message Priority</text:h>
      <text:p text:style-name="P1"><text:span text:style-name="Source_20_Text">mq_send(mq, "High Priority", 14, 5);</text:span></text:p>
      <text:p text:style-name="P2"><text:span text:style-name="Source_20_Text">mq_send(mq, "Low Priority", 13, 1);</text:span></text:p>
      <text:p text:style-name="Text_20_body">Higher priority number → received first.</text:p>
      <text:p text:style-name="Horizontal_20_Line"/>
      <text:h text:style-name="Heading_20_1" text:outline-level="1"><text:soft-page-break/>🔹 Blocking vs Non-Blocking</text:h>
      <text:h text:style-name="Heading_20_3" text:outline-level="3">Default → Blocking</text:h>
      <text:list xml:id="list1688241028" text:style-name="L3">
        <text:list-item>
          <text:p text:style-name="P6">If queue is empty → <text:span text:style-name="Source_20_Text">mq_receive()</text:span> waits.</text:p>
        </text:list-item>
        <text:list-item>
          <text:p text:style-name="P6">If queue is full → <text:span text:style-name="Source_20_Text">mq_send()</text:span> waits.</text:p>
        </text:list-item>
      </text:list>
      <text:h text:style-name="Heading_20_3" text:outline-level="3">Non-Blocking Mode:</text:h>
      <text:p text:style-name="P2"><text:span text:style-name="Source_20_Text">attr.mq_flags = O_NONBLOCK;</text:span></text:p>
      <text:p text:style-name="Text_20_body">or</text:p>
      <text:p text:style-name="P2"><text:span text:style-name="Source_20_Text">mq_open(name, O_RDONLY | O_NONBLOCK);</text:span></text:p>
      <text:p text:style-name="Text_20_body">Then functions return <text:span text:style-name="Source_20_Text">-1</text:span> with <text:span text:style-name="Source_20_Text">errno = EAGAIN</text:span> if no message.</text:p>
      <text:p text:style-name="Horizontal_20_Line"/>
      <text:h text:style-name="Heading_20_1" text:outline-level="1">🔹 Real-World Example</text:h>
      <text:p text:style-name="Text_20_body">Printer server:</text:p>
      <text:list xml:id="list3640065619" text:style-name="L4">
        <text:list-item>
          <text:p text:style-name="P7">Multiple clients send print jobs to queue.</text:p>
        </text:list-item>
        <text:list-item>
          <text:p text:style-name="P7">Printer process reads from queue in priority order.</text:p>
        </text:list-item>
      </text:list>
      <text:p text:style-name="Horizontal_20_Line"/>
      <text:h text:style-name="Heading_20_1" text:outline-level="1">🔹 Comparison with Pip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Pipe</text:p>
            </table:table-cell>
            <table:table-cell table:style-name="Table2.A1" office:value-type="string">
              <text:p text:style-name="Table_20_Heading">Message Queue</text:p>
            </table:table-cell>
          </table:table-row>
        </table:table-header-rows>
        <table:table-row>
          <table:table-cell table:style-name="Table2.A1" office:value-type="string">
            <text:p text:style-name="Table_20_Contents">Relationship</text:p>
          </table:table-cell>
          <table:table-cell table:style-name="Table2.A1" office:value-type="string">
            <text:p text:style-name="Table_20_Contents">Related processes</text:p>
          </table:table-cell>
          <table:table-cell table:style-name="Table2.A1" office:value-type="string">
            <text:p text:style-name="Table_20_Contents">Unrelated allowed</text:p>
          </table:table-cell>
        </table:table-row>
        <table:table-row>
          <table:table-cell table:style-name="Table2.A1" office:value-type="string">
            <text:p text:style-name="Table_20_Contents">Message boundary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Priority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Kernel persistent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 (until unlink)</text:p>
          </table:table-cell>
        </table:table-row>
      </table:table>
      <text:p text:style-name="Horizontal_20_Line"/>
      <text:h text:style-name="Heading_20_1" text:outline-level="1">🔹 Advantages</text:h>
      <text:p text:style-name="Text_20_body">✔ Structured communication<text:line-break/>✔ Priority support<text:line-break/>✔ Works across processes<text:line-break/>✔ Better than pipes for complex systems</text:p>
      <text:p text:style-name="Horizontal_20_Line"/>
      <text:h text:style-name="Heading_20_1" text:outline-level="1"><text:soft-page-break/>🔹 Limitations</text:h>
      <text:p text:style-name="Text_20_body">❌ Size limit on messages<text:line-break/>❌ Kernel memory usage<text:line-break/>❌ Need <text:span text:style-name="Source_20_Text">-lrt</text:span> linking</text:p>
      <text:p text:style-name="Standard"/>
      <text:p text:style-name="Standard"/>
      <text:h text:style-name="Heading_20_2" text:outline-level="2">🔄 Two-Way Communication Using POSIX Message Queues</text:h>
      <text:p text:style-name="Text_20_body">In two-way message queue communication:</text:p>
      <text:list xml:id="list625912470" text:style-name="L9">
        <text:list-item>
          <text:p text:style-name="P8">Process A → sends request</text:p>
        </text:list-item>
        <text:list-item>
          <text:p text:style-name="P8">Process B → receives request and sends reply</text:p>
        </text:list-item>
        <text:list-item>
          <text:p text:style-name="P8">Process A → receives reply</text:p>
        </text:list-item>
      </text:list>
      <text:p text:style-name="Text_20_body">We use <text:span text:style-name="Strong_20_Emphasis">two separate queues</text:span>:</text:p>
      <text:list xml:id="list337704554" text:style-name="L10">
        <text:list-item>
          <text:p text:style-name="P9"><text:span text:style-name="Source_20_Text">/req_queue</text:span> → Client → Server</text:p>
        </text:list-item>
        <text:list-item>
          <text:p text:style-name="P9"><text:span text:style-name="Source_20_Text">/res_queue</text:span> → Server → Client</text:p>
        </text:list-item>
      </text:list>
      <text:p text:style-name="Horizontal_20_Line"/>
      <text:h text:style-name="Heading_20_1" text:outline-level="1">🔹 Architecture</text:h>
      <text:p text:style-name="P1"><text:span text:style-name="Source_20_Text">Client <text:s/>----(Request)----&gt; <text:s/>/req_queue <text:s/>----&gt; <text:s/>Server</text:span></text:p>
      <text:p text:style-name="P2"><text:span text:style-name="Source_20_Text">Client <text:s/>&lt;----(Reply)------ <text:s/>/res_queue <text:s/>&lt;----</text:span></text:p>
      <text:p text:style-name="Horizontal_20_Line"/>
      <text:h text:style-name="Heading_20_1" text:outline-level="1">🔹 Example: Client–Server Using POSIX Message Queue</text:h>
      <text:p text:style-name="Text_20_body">Compile:</text:p>
      <text:p text:style-name="P1"><text:span text:style-name="Source_20_Text">gcc server.c -o server -lrt</text:span></text:p>
      <text:p text:style-name="P2"><text:span text:style-name="Source_20_Text">gcc client.c -o client -lrt</text:span></text:p>
      <text:p text:style-name="Horizontal_20_Line"/>
      <text:h text:style-name="Heading_20_1" text:outline-level="1">📌 server.c (Receiver + Reply Sender)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string.h&gt;</text:span></text:p>
      <text:p text:style-name="P1"><text:span text:style-name="Source_20_Text">#include &lt;fcntl.h&gt;</text:span></text:p>
      <text:p text:style-name="P1"><text:span text:style-name="Source_20_Text">#include &lt;sys/stat.h&gt;</text:span></text:p>
      <text:p text:style-name="P1"><text:span text:style-name="Source_20_Text">#include &lt;mqueue.h&gt;</text:span></text:p>
      <text:p text:style-name="P1"/>
      <text:p text:style-name="P1"><text:soft-page-break/><text:span text:style-name="Source_20_Text">#define REQ_QUEUE "/req_queue"</text:span></text:p>
      <text:p text:style-name="P1"><text:span text:style-name="Source_20_Text">#define RES_QUEUE "/res_queue"</text:span></text:p>
      <text:p text:style-name="P1"><text:span text:style-name="Source_20_Text">#define MAX_SIZE 100</text:span></text:p>
      <text:p text:style-name="P1"/>
      <text:p text:style-name="P1"><text:span text:style-name="Source_20_Text">int main() {</text:span></text:p>
      <text:p text:style-name="P1"><text:span text:style-name="Source_20_Text"><text:s text:c="4"/>mqd_t req_mq, res_mq;</text:span></text:p>
      <text:p text:style-name="P1"><text:span text:style-name="Source_20_Text"><text:s text:c="4"/>char buffer[MAX_SIZE];</text:span></text:p>
      <text:p text:style-name="P1"><text:span text:style-name="Source_20_Text"><text:s text:c="4"/>struct mq_attr attr;</text:span></text:p>
      <text:p text:style-name="P1"/>
      <text:p text:style-name="P1"><text:span text:style-name="Source_20_Text"><text:s text:c="4"/>attr.mq_flags = 0;</text:span></text:p>
      <text:p text:style-name="P1"><text:span text:style-name="Source_20_Text"><text:s text:c="4"/>attr.mq_maxmsg = 10;</text:span></text:p>
      <text:p text:style-name="P1"><text:span text:style-name="Source_20_Text"><text:s text:c="4"/>attr.mq_msgsize = MAX_SIZE;</text:span></text:p>
      <text:p text:style-name="P1"><text:span text:style-name="Source_20_Text"><text:s text:c="4"/>attr.mq_curmsgs = 0;</text:span></text:p>
      <text:p text:style-name="P1"/>
      <text:p text:style-name="P1"><text:span text:style-name="Source_20_Text"><text:s text:c="4"/>// Create request queue (read)</text:span></text:p>
      <text:p text:style-name="P1"><text:span text:style-name="Source_20_Text"><text:s text:c="4"/>req_mq = mq_open(REQ_QUEUE, O_CREAT | O_RDONLY, 0644, &amp;attr);</text:span></text:p>
      <text:p text:style-name="P1"><text:span text:style-name="Source_20_Text"><text:s text:c="4"/>if (req_mq == -1) {</text:span></text:p>
      <text:p text:style-name="P1"><text:span text:style-name="Source_20_Text"><text:s text:c="8"/>perror("mq_open req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Create response queue (write)</text:span></text:p>
      <text:p text:style-name="P1"><text:span text:style-name="Source_20_Text"><text:s text:c="4"/>res_mq = mq_open(RES_QUEUE, O_CREAT | O_WRONLY, 0644, &amp;attr);</text:span></text:p>
      <text:p text:style-name="P1"><text:span text:style-name="Source_20_Text"><text:s text:c="4"/>if (res_mq == -1) {</text:span></text:p>
      <text:p text:style-name="P1"><text:span text:style-name="Source_20_Text"><text:s text:c="8"/>perror("mq_open res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Server waiting for request...\n");</text:span></text:p>
      <text:p text:style-name="P1"/>
      <text:p text:style-name="P1"><text:span text:style-name="Source_20_Text"><text:s text:c="4"/>// Receive request</text:span></text:p>
      <text:p text:style-name="P1"><text:span text:style-name="Source_20_Text"><text:s text:c="4"/>if (mq_receive(req_mq, buffer, MAX_SIZE, NULL) == -1) {</text:span></text:p>
      <text:p text:style-name="P1"><text:span text:style-name="Source_20_Text"><text:s text:c="8"/>perror("mq_receive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Server received: %s\n", buffer);</text:span></text:p>
      <text:p text:style-name="P1"/>
      <text:p text:style-name="P1"><text:span text:style-name="Source_20_Text"><text:s text:c="4"/>// Prepare reply</text:span></text:p>
      <text:p text:style-name="P1"><text:span text:style-name="Source_20_Text"><text:s text:c="4"/>char reply[MAX_SIZE];</text:span></text:p>
      <text:p text:style-name="P1"><text:span text:style-name="Source_20_Text"><text:s text:c="4"/>snprintf(reply, MAX_SIZE, "Server processed: %s", buffer);</text:span></text:p>
      <text:p text:style-name="P1"/>
      <text:p text:style-name="P1"><text:span text:style-name="Source_20_Text"><text:s text:c="4"/>// Send reply</text:span></text:p>
      <text:p text:style-name="P1"><text:span text:style-name="Source_20_Text"><text:s text:c="4"/>if (mq_send(res_mq, reply, strlen(reply) + 1, 0) == -1) {</text:span></text:p>
      <text:p text:style-name="P1"><text:span text:style-name="Source_20_Text"><text:s text:c="8"/>perror("mq_send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Server sent reply\n");</text:span></text:p>
      <text:p text:style-name="P1"/>
      <text:p text:style-name="P1"><text:span text:style-name="Source_20_Text"><text:s text:c="4"/>mq_close(req_mq);</text:span></text:p>
      <text:p text:style-name="P1"><text:span text:style-name="Source_20_Text"><text:s text:c="4"/>mq_close(res_mq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📌 client.c (Sender + Reply Receiver)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oft-page-break/><text:span text:style-name="Source_20_Text">#include &lt;string.h&gt;</text:span></text:p>
      <text:p text:style-name="P1"><text:span text:style-name="Source_20_Text">#include &lt;fcntl.h&gt;</text:span></text:p>
      <text:p text:style-name="P1"><text:span text:style-name="Source_20_Text">#include &lt;sys/stat.h&gt;</text:span></text:p>
      <text:p text:style-name="P1"><text:span text:style-name="Source_20_Text">#include &lt;mqueue.h&gt;</text:span></text:p>
      <text:p text:style-name="P1"/>
      <text:p text:style-name="P1"><text:span text:style-name="Source_20_Text">#define REQ_QUEUE "/req_queue"</text:span></text:p>
      <text:p text:style-name="P1"><text:span text:style-name="Source_20_Text">#define RES_QUEUE "/res_queue"</text:span></text:p>
      <text:p text:style-name="P1"><text:span text:style-name="Source_20_Text">#define MAX_SIZE 100</text:span></text:p>
      <text:p text:style-name="P1"/>
      <text:p text:style-name="P1"><text:span text:style-name="Source_20_Text">int main() {</text:span></text:p>
      <text:p text:style-name="P1"><text:span text:style-name="Source_20_Text"><text:s text:c="4"/>mqd_t req_mq, res_mq;</text:span></text:p>
      <text:p text:style-name="P1"><text:span text:style-name="Source_20_Text"><text:s text:c="4"/>char buffer[MAX_SIZE];</text:span></text:p>
      <text:p text:style-name="P1"/>
      <text:p text:style-name="P1"><text:span text:style-name="Source_20_Text"><text:s text:c="4"/>// Open request queue (write)</text:span></text:p>
      <text:p text:style-name="P1"><text:span text:style-name="Source_20_Text"><text:s text:c="4"/>req_mq = mq_open(REQ_QUEUE, O_WRONLY);</text:span></text:p>
      <text:p text:style-name="P1"><text:span text:style-name="Source_20_Text"><text:s text:c="4"/>if (req_mq == -1) {</text:span></text:p>
      <text:p text:style-name="P1"><text:span text:style-name="Source_20_Text"><text:s text:c="8"/>perror("mq_open req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Open response queue (read)</text:span></text:p>
      <text:p text:style-name="P1"><text:span text:style-name="Source_20_Text"><text:s text:c="4"/>res_mq = mq_open(RES_QUEUE, O_RDONLY);</text:span></text:p>
      <text:p text:style-name="P1"><text:span text:style-name="Source_20_Text"><text:s text:c="4"/>if (res_mq == -1) {</text:span></text:p>
      <text:p text:style-name="P1"><text:span text:style-name="Source_20_Text"><text:s text:c="8"/>perror("mq_open res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har message[] = "Hello Server";</text:span></text:p>
      <text:p text:style-name="P1"/>
      <text:p text:style-name="P1"><text:span text:style-name="Source_20_Text"><text:s text:c="4"/>// Send request</text:span></text:p>
      <text:p text:style-name="P1"><text:span text:style-name="Source_20_Text"><text:s text:c="4"/>if (mq_send(req_mq, message, strlen(message) + 1, 0) == -1) {</text:span></text:p>
      <text:p text:style-name="P1"><text:span text:style-name="Source_20_Text"><text:s text:c="8"/>perror("mq_send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Client sent: %s\n", message);</text:span></text:p>
      <text:p text:style-name="P1"/>
      <text:p text:style-name="P1"><text:span text:style-name="Source_20_Text"><text:s text:c="4"/>// Receive reply</text:span></text:p>
      <text:p text:style-name="P1"><text:span text:style-name="Source_20_Text"><text:s text:c="4"/>if (mq_receive(res_mq, buffer, MAX_SIZE, NULL) == -1) {</text:span></text:p>
      <text:p text:style-name="P1"><text:span text:style-name="Source_20_Text"><text:s text:c="8"/>perror("mq_receive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Client received reply: %s\n", buffer);</text:span></text:p>
      <text:p text:style-name="P1"/>
      <text:p text:style-name="P1"><text:span text:style-name="Source_20_Text"><text:s text:c="4"/>mq_close(req_mq);</text:span></text:p>
      <text:p text:style-name="P1"><text:span text:style-name="Source_20_Text"><text:s text:c="4"/>mq_close(res_mq);</text:span></text:p>
      <text:p text:style-name="P1"/>
      <text:p text:style-name="P1"><text:span text:style-name="Source_20_Text"><text:s text:c="4"/>// Cleanup</text:span></text:p>
      <text:p text:style-name="P1"><text:span text:style-name="Source_20_Text"><text:s text:c="4"/>mq_unlink(REQ_QUEUE);</text:span></text:p>
      <text:p text:style-name="P1"><text:span text:style-name="Source_20_Text"><text:s text:c="4"/>mq_unlink(RES_QUEUE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🔹 Execution Order</text:h>
      <text:list xml:id="list3822941088" text:style-name="L11">
        <text:list-item>
          <text:p text:style-name="P10">Run server first:</text:p>
        </text:list-item>
      </text:list>
      <text:p text:style-name="P2"><text:span text:style-name="Source_20_Text">./server</text:span></text:p>
      <text:list xml:id="list1400624576" text:style-name="L12">
        <text:list-item>
          <text:p text:style-name="P11"><text:soft-page-break/>Then run client:</text:p>
        </text:list-item>
      </text:list>
      <text:p text:style-name="P2"><text:span text:style-name="Source_20_Text">./client</text:span></text:p>
      <text:p text:style-name="Horizontal_20_Line"/>
      <text:h text:style-name="Heading_20_1" text:outline-level="1">🔹 Output Example</text:h>
      <text:p text:style-name="Text_20_body">Server:</text:p>
      <text:p text:style-name="P1"><text:span text:style-name="Source_20_Text">Server waiting for request...</text:span></text:p>
      <text:p text:style-name="P1"><text:span text:style-name="Source_20_Text">Server received: Hello Server</text:span></text:p>
      <text:p text:style-name="P2"><text:span text:style-name="Source_20_Text">Server sent reply</text:span></text:p>
      <text:p text:style-name="Text_20_body">Client:</text:p>
      <text:p text:style-name="P1"><text:span text:style-name="Source_20_Text">Client sent: Hello Server</text:span></text:p>
      <text:p text:style-name="P2"><text:span text:style-name="Source_20_Text">Client received reply: Server processed: Hello Server</text:span></text:p>
      <text:p text:style-name="Horizontal_20_Line"/>
      <text:h text:style-name="Heading_20_1" text:outline-level="1">🔹 Important Concepts Demonstrated</text:h>
      <text:p text:style-name="Text_20_body">✔ Two independent queues<text:line-break/>✔ Full duplex communication<text:line-break/>✔ Blocking behavior<text:line-break/>✔ Kernel-managed message storage</text:p>
      <text:p text:style-name="Horizontal_20_Line"/>
      <text:h text:style-name="Heading_20_1" text:outline-level="1">🔹 Real-Time Use Case (Your Embedded/QNX Context)</text:h>
      <text:p text:style-name="Text_20_body">This pattern is useful in:</text:p>
      <text:list xml:id="list2026923484" text:style-name="L13">
        <text:list-item>
          <text:p text:style-name="P12">Sensor manager ↔ UI process</text:p>
        </text:list-item>
        <text:list-item>
          <text:p text:style-name="P12">Python wrapper ↔ QNX server</text:p>
        </text:list-item>
        <text:list-item>
          <text:p text:style-name="P12">Command dispatcher ↔ Motor controller</text:p>
        </text:list-item>
        <text:list-item>
          <text:p text:style-name="P12">Logging server ↔ Multiple clients</text:p>
        </text:list-item>
      </text:list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1:23:05.631767772</meta:creation-date>
    <dc:date>2026-02-19T09:03:46.435984770</dc:date>
    <meta:editing-duration>PT21H40M41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9" meta:paragraph-count="266" meta:word-count="945" meta:character-count="6965" meta:non-whitespace-character-count="5761"/>
  </office:meta>
</office:document-meta>
</file>